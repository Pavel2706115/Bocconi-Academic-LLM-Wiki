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3" style:family="table-cell" style:parent-style-name="Default" style:data-style-name="N0">
      <style:table-cell-properties fo:border-top="none" fo:border-bottom="2pt solid #000000" fo:border-left="thin solid #999999" fo:border-right="thin solid #999999" style:vertical-align="middle" fo:background-color="#F1A983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4" style:family="table-cell" style:parent-style-name="Default" style:data-style-name="N37">
      <style:text-properties style:font-name="Arial" style:font-name-asian="Arial" style:font-name-complex="Arial" fo:font-size="9pt" style:font-size-asian="9pt" style:font-size-complex="9pt"/>
    </style:style>
    <style:style style:name="ce5" style:family="table-cell" style:parent-style-name="Default" style:data-style-name="N14">
      <style:text-properties style:font-name="Arial" style:font-name-asian="Arial" style:font-name-complex="Arial" fo:font-size="9pt" style:font-size-asian="9pt" style:font-size-complex="9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6pt" style:font-size-asian="16pt" style:font-size-complex="16pt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middle"/>
      <style:text-properties fo:font-size="16pt" style:font-size-asian="16pt" style:font-size-complex="16pt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11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2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3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F1A983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14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14">
      <style:table-cell-properties fo:border="thin solid #000000" style:vertical-align="middl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36">
      <style:table-cell-properties fo:border="thin solid #000000" style:vertical-align="middl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start" fo:margin-left="0cm"/>
      <style:text-properties fo:font-size="16pt" style:font-size-asian="16pt" style:font-size-complex="16pt"/>
    </style:style>
    <style:style style:name="ce23" style:family="table-cell" style:parent-style-name="Default" style:data-style-name="N0">
      <style:table-cell-properties fo:border-top="2pt solid #000000" fo:border-bottom="none" fo:border-left="none" fo:border-right="2pt solid #000000" style:vertical-align="automatic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transparent" style:repeat-content="false"/>
      <style:paragraph-properties fo:text-align="center"/>
    </style:style>
    <style:style style:name="ce25" style:family="table-cell" style:parent-style-name="Default" style:data-style-name="N0"/>
    <style:style style:name="ce26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color="#666666" style:font-name="Arial" style:font-name-asian="Arial" style:font-name-complex="Arial" fo:font-size="9pt" style:font-size-asian="9pt" style:font-size-complex="9pt" fo:font-style="italic" style:font-style-asian="italic" style:font-style-complex="italic"/>
    </style:style>
    <style:style style:name="ce27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background-color="#F1A983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28" style:family="table-cell" style:parent-style-name="Default" style:data-style-name="N2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2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2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2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14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2">
      <style:table-cell-properties fo:border="thin solid #000000" style:vertical-align="middl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14">
      <style:table-cell-properties fo:border="thin solid #000000" style:vertical-align="middl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3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7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38" style:family="table-cell" style:parent-style-name="Default" style:data-style-name="N0">
      <style:table-cell-properties fo:border="thin solid #000000"/>
    </style:style>
    <style:style style:name="ce39" style:family="table-cell" style:parent-style-name="Default" style:data-style-name="N14">
      <style:table-cell-properties fo:border="thin solid #000000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41" style:family="table-cell" style:parent-style-name="Default" style:data-style-name="N14">
      <style:table-cell-properties fo:border-top="none" fo:border-bottom="thin solid #000000" fo:border-left="thin solid #000000" fo:border-right="thin solid #000000"/>
    </style:style>
    <style:style style:name="ce42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1A983"/>
      <style:text-properties fo:font-weight="bold" style:font-weight-asian="bold" style:font-weight-complex="bold"/>
    </style:style>
    <style:style style:name="ce43" style:family="table-cell" style:parent-style-name="Default" style:data-style-name="N20">
      <style:table-cell-properties fo:border-top="2pt solid #000000" fo:border-bottom="2pt solid #000000" fo:border-left="thin solid #000000" fo:border-right="thin solid #000000" fo:background-color="#F1A983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2pt solid #000000" fo:border-left="thin solid #000000" fo:border-right="thin solid #000000" fo:background-color="#F1A983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</style:style>
    <style:style style:name="ce4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F1A983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9" style:family="table-cell" style:parent-style-name="Default" style:data-style-name="N2">
      <style:table-cell-properties fo:border="thin solid #000000" style:vertical-align="middl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0" style:family="table-cell" style:parent-style-name="Default" style:data-style-name="N14">
      <style:table-cell-properties fo:border="thin solid #000000" style:vertical-align="middl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2" style:family="table-cell" style:parent-style-name="Default" style:data-style-name="N2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3" style:family="table-cell" style:parent-style-name="Default" style:data-style-name="N14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4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F1A983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5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6" style:family="table-cell" style:parent-style-name="Default" style:data-style-name="N14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8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9" style:family="table-cell" style:parent-style-name="Default" style:data-style-name="N14">
      <style:table-cell-properties fo:border="thin solid #000000" style:vertical-align="middle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6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61" style:family="table-cell" style:parent-style-name="Default" style:data-style-name="N47">
      <style:table-cell-properties fo:border="thin solid #000000" style:vertical-align="middle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62" style:family="table-cell" style:parent-style-name="Default" style:data-style-name="N0">
      <style:table-cell-properties style:vertical-align="automatic" fo:wrap-option="wrap"/>
    </style:style>
    <style:style style:name="ce63" style:family="table-cell" style:parent-style-name="Default" style:data-style-name="N0">
      <style:table-cell-properties fo:border="thin solid #000000" style:vertical-align="middle" fo:wrap-option="wrap" fo:background-color="#F7C7A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4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7C7A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  <style:text-properties fo:font-size="16pt" style:font-size-asian="16pt" style:font-size-complex="16pt"/>
    </style:style>
    <style:style style:name="ce68" style:family="table-cell" style:parent-style-name="Default" style:data-style-name="N2">
      <style:table-cell-properties fo:border="thin solid #000000"/>
    </style:style>
    <style:style style:name="ce69" style:family="table-cell" style:parent-style-name="Default" style:data-style-name="N2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70" style:family="table-cell" style:parent-style-name="Default" style:data-style-name="N0">
      <style:table-cell-properties fo:border-top="thin solid #000000" fo:border-bottom="2pt solid #000000" fo:border-left="none" fo:border-right="none"/>
    </style:style>
    <style:style style:name="ce71" style:family="table-cell" style:parent-style-name="Default" style:data-style-name="N2">
      <style:table-cell-properties fo:border="thin solid #000000"/>
    </style:style>
    <style:style style:name="ce72" style:family="table-cell" style:parent-style-name="Default" style:data-style-name="N2">
      <style:table-cell-properties fo:border-top="none" fo:border-bottom="thin solid #000000" fo:border-left="thin solid #000000" fo:border-right="thin solid #000000"/>
    </style:style>
    <style:style style:name="ce7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74" style:family="table-cell" style:parent-style-name="Default" style:data-style-name="N2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style:repeat-content="false"/>
      <style:paragraph-properties fo:text-align="start" fo:margin-left="0cm"/>
      <style:text-properties fo:font-size="16pt" style:font-size-asian="16pt" style:font-size-complex="16pt"/>
    </style:style>
    <style:style style:name="ce7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F7C7AC"/>
    </style:style>
    <style:style style:name="ce78" style:family="table-cell" style:parent-style-name="Default" style:data-style-name="N0">
      <style:table-cell-properties fo:border="thin solid #000000" style:vertical-align="automatic" fo:wrap-option="wrap" fo:background-color="#F7C7AC"/>
    </style:style>
    <style:style style:name="ce79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start" fo:margin-left="0cm"/>
    </style:style>
    <style:style style:name="ce80" style:family="table-cell" style:parent-style-name="Default" style:data-style-name="N14">
      <style:table-cell-properties fo:border-top="none" fo:border-bottom="thin solid #000000" fo:border-left="thin solid #000000" fo:border-right="thin solid #000000" fo:background-color="transparent"/>
    </style:style>
    <style:style style:name="ce81" style:family="table-cell" style:parent-style-name="Default" style:data-style-name="N14">
      <style:table-cell-properties fo:border-top="none" fo:border-bottom="thin solid #000000" fo:border-left="thin solid #000000" fo:border-right="thin solid #000000" fo:background-color="#83E28E"/>
    </style:style>
    <style:style style:name="ce8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start" fo:margin-left="0cm"/>
    </style:style>
    <style:style style:name="ce83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style:repeat-content="false"/>
      <style:paragraph-properties fo:text-align="start" fo:margin-left="0cm"/>
      <style:text-properties fo:font-size="16pt" style:font-size-asian="16pt" style:font-size-complex="16pt"/>
    </style:style>
    <style:style style:name="ce84" style:family="table-cell" style:parent-style-name="Default" style:data-style-name="N2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85" style:family="table-cell" style:parent-style-name="Default" style:data-style-name="N0">
      <style:table-cell-properties fo:border-top="2pt solid #000000" fo:border-bottom="2pt solid #000000" fo:border-left="none" fo:border-right="none" style:vertical-align="middle" style:repeat-content="false"/>
      <style:paragraph-properties fo:text-align="start" fo:margin-left="0cm"/>
      <style:text-properties fo:font-size="16pt" style:font-size-asian="16pt" style:font-size-complex="16pt"/>
    </style:style>
    <style:style style:name="ce8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56633333333333cm" style:use-optimal-column-width="true"/>
    </style:style>
    <style:style style:name="co2" style:family="table-column">
      <style:table-column-properties fo:break-before="auto" style:column-width="3.89466666666667cm"/>
    </style:style>
    <style:style style:name="co3" style:family="table-column">
      <style:table-column-properties fo:break-before="auto" style:column-width="5.88433333333333cm" style:use-optimal-column-width="true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43933333333333cm" style:use-optimal-column-width="true"/>
    </style:style>
    <style:style style:name="co6" style:family="table-column">
      <style:table-column-properties fo:break-before="auto" style:column-width="1.7145cm" style:use-optimal-column-width="true"/>
    </style:style>
    <style:style style:name="co7" style:family="table-column">
      <style:table-column-properties fo:break-before="auto" style:column-width="3.40783333333333cm" style:use-optimal-column-width="true"/>
    </style:style>
    <style:style style:name="co8" style:family="table-column">
      <style:table-column-properties fo:break-before="auto" style:column-width="2.68816666666667cm" style:use-optimal-column-width="true"/>
    </style:style>
    <style:style style:name="co9" style:family="table-column">
      <style:table-column-properties fo:break-before="auto" style:column-width="3.91583333333333cm" style:use-optimal-column-width="true"/>
    </style:style>
    <style:style style:name="co10" style:family="table-column">
      <style:table-column-properties fo:break-before="auto" style:column-width="2.81516666666667cm" style:use-optimal-column-width="true"/>
    </style:style>
    <style:style style:name="co11" style:family="table-column">
      <style:table-column-properties fo:break-before="auto" style:column-width="3.2385cm" style:use-optimal-column-width="true"/>
    </style:style>
    <style:style style:name="co12" style:family="table-column">
      <style:table-column-properties fo:break-before="auto" style:column-width="2.7305cm" style:use-optimal-column-width="true"/>
    </style:style>
    <style:style style:name="co13" style:family="table-column">
      <style:table-column-properties fo:break-before="auto" style:column-width="1.778cm" style:use-optimal-column-width="true"/>
    </style:style>
    <style:style style:name="co14" style:family="table-column">
      <style:table-column-properties fo:break-before="auto" style:column-width="1.48166666666667cm" style:use-optimal-column-width="true"/>
    </style:style>
    <style:style style:name="co15" style:family="table-column">
      <style:table-column-properties fo:break-before="auto" style:column-width="1.397cm" style:use-optimal-column-width="true"/>
    </style:style>
    <style:style style:name="co16" style:family="table-column">
      <style:table-column-properties fo:break-before="auto" style:column-width="2.286cm" style:use-optimal-column-width="true"/>
    </style:style>
    <style:style style:name="co17" style:family="table-column">
      <style:table-column-properties fo:break-before="auto" style:column-width="3.28083333333333cm" style:use-optimal-column-width="true"/>
    </style:style>
    <style:style style:name="co18" style:family="table-column">
      <style:table-column-properties fo:break-before="auto" style:column-width="4.67783333333333cm" style:use-optimal-column-width="true"/>
    </style:style>
    <style:style style:name="co19" style:family="table-column">
      <style:table-column-properties fo:break-before="auto" style:column-width="3.15383333333333cm" style:use-optimal-column-width="true"/>
    </style:style>
    <style:style style:name="co20" style:family="table-column">
      <style:table-column-properties fo:break-before="auto" style:column-width="3.64066666666667cm" style:use-optimal-column-width="true"/>
    </style:style>
    <style:style style:name="co21" style:family="table-column">
      <style:table-column-properties fo:break-before="auto" style:column-width="2.94216666666667cm" style:use-optimal-column-width="true"/>
    </style:style>
    <style:style style:name="co22" style:family="table-column">
      <style:table-column-properties fo:break-before="auto" style:column-width="4.1275cm" style:use-optimal-column-width="true"/>
    </style:style>
    <style:style style:name="co23" style:family="table-column">
      <style:table-column-properties fo:break-before="auto" style:column-width="2.9845cm" style:use-optimal-column-width="true"/>
    </style:style>
    <style:style style:name="co24" style:family="table-column">
      <style:table-column-properties fo:break-before="auto" style:column-width="2.56116666666667cm" style:use-optimal-column-width="true"/>
    </style:style>
    <style:style style:name="co25" style:family="table-column">
      <style:table-column-properties fo:break-before="auto" style:column-width="3.175cm" style:use-optimal-column-width="true"/>
    </style:style>
    <style:style style:name="co26" style:family="table-column">
      <style:table-column-properties fo:break-before="auto" style:column-width="0.867833333333333cm" style:use-optimal-column-width="true"/>
    </style:style>
    <style:style style:name="co27" style:family="table-column">
      <style:table-column-properties fo:break-before="auto" style:column-width="2.43416666666667cm" style:use-optimal-column-width="true"/>
    </style:style>
    <style:style style:name="co28" style:family="table-column">
      <style:table-column-properties fo:break-before="auto" style:column-width="3.09033333333333cm" style:use-optimal-column-width="true"/>
    </style:style>
    <style:style style:name="co29" style:family="table-column">
      <style:table-column-properties fo:break-before="auto" style:column-width="3.76766666666667cm" style:use-optimal-column-width="true"/>
    </style:style>
    <style:style style:name="co30" style:family="table-column">
      <style:table-column-properties fo:break-before="auto" style:column-width="4.08516666666667cm" style:use-optimal-column-width="true"/>
    </style:style>
    <style:style style:name="co31" style:family="table-column">
      <style:table-column-properties fo:break-before="auto" style:column-width="2.62466666666667cm" style:use-optimal-column-width="true"/>
    </style:style>
    <style:style style:name="co32" style:family="table-column">
      <style:table-column-properties fo:break-before="auto" style:column-width="2.01083333333333cm" style:use-optimal-column-width="true"/>
    </style:style>
    <style:style style:name="co33" style:family="table-column">
      <style:table-column-properties fo:break-before="auto" style:column-width="1.94733333333333cm" style:use-optimal-column-width="true"/>
    </style:style>
    <style:style style:name="co34" style:family="table-column">
      <style:table-column-properties fo:break-before="auto" style:column-width="2.75166666666667cm" style:use-optimal-column-width="true"/>
    </style:style>
    <style:style style:name="co35" style:family="table-column">
      <style:table-column-properties fo:break-before="auto" style:column-width="1.54516666666667cm" style:use-optimal-column-width="true"/>
    </style:style>
    <style:style style:name="co36" style:family="table-column">
      <style:table-column-properties fo:break-before="auto" style:column-width="3.34433333333333cm" style:use-optimal-column-width="true"/>
    </style:style>
    <style:style style:name="co37" style:family="table-column">
      <style:table-column-properties fo:break-before="auto" style:column-width="1.37583333333333cm" style:use-optimal-column-width="true"/>
    </style:style>
    <style:style style:name="co38" style:family="table-column">
      <style:table-column-properties fo:break-before="auto" style:column-width="0.9525cm" style:use-optimal-column-width="true"/>
    </style:style>
    <style:style style:name="co39" style:family="table-column">
      <style:table-column-properties fo:break-before="auto" style:column-width="0.973666666666667cm" style:use-optimal-column-width="true"/>
    </style:style>
    <style:style style:name="co40" style:family="table-column">
      <style:table-column-properties fo:break-before="auto" style:column-width="4.10633333333333cm" style:use-optimal-column-width="true"/>
    </style:style>
    <style:style style:name="co41" style:family="table-column">
      <style:table-column-properties fo:break-before="auto" style:column-width="2.45533333333333cm" style:use-optimal-column-width="true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21.6pt" style:use-optimal-row-height="tru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26.4pt" style:use-optimal-row-height="true" fo:break-before="auto"/>
    </style:style>
    <style:style style:name="ro7" style:family="table-row">
      <style:table-row-properties style:row-height="86.4pt" style:use-optimal-row-height="true" fo:break-before="auto"/>
    </style:style>
    <style:style style:name="ro8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Assumpt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number-columns-spanned="2" table:number-rows-spanned="1" table:style-name="ce6">
            <text:p>Exhibit 5</text:p>
          </table:table-cell>
          <table:covered-table-cell/>
          <table:table-cell office:value-type="string" table:style-name="ce9">
            <text:p>Treasury Yields</text:p>
          </table:table-cell>
          <table:table-cell table:number-columns-repeated="17" table:style-name="ce9"/>
          <table:table-cell table:number-columns-repeated="16364"/>
        </table:table-row>
        <table:table-row table:style-name="ro2">
          <table:table-cell table:number-columns-repeated="3" table:style-name="ce37"/>
          <table:table-cell table:number-columns-repeated="16381" table:style-name="ce1"/>
        </table:table-row>
        <table:table-row table:style-name="ro2">
          <table:table-cell office:value-type="string" table:style-name="ce42">
            <text:p>Maturity</text:p>
          </table:table-cell>
          <table:table-cell office:value-type="date" office:date-value="2020-12-31T00:00:00" table:style-name="ce43">
            <text:p>31-Dec-20</text:p>
          </table:table-cell>
          <table:table-cell office:value-type="string" table:style-name="ce42">
            <text:p>Average Month End from 2016 - 2020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40">
            <text:p>3 Months</text:p>
          </table:table-cell>
          <table:table-cell office:value-type="percentage" office:value="1E-3" table:style-name="ce41">
            <text:p>0.10%</text:p>
          </table:table-cell>
          <table:table-cell office:value-type="percentage" office:value="1.0999999999999999E-2" table:style-name="ce41">
            <text:p>1.10%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38">
            <text:p>1 Year</text:p>
          </table:table-cell>
          <table:table-cell office:value-type="percentage" office:value="1E-3" table:style-name="ce39">
            <text:p>0.10%</text:p>
          </table:table-cell>
          <table:table-cell office:value-type="percentage" office:value="1.2999999999999999E-2" table:style-name="ce39">
            <text:p>1.30%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38">
            <text:p>5 Years</text:p>
          </table:table-cell>
          <table:table-cell office:value-type="percentage" office:value="4.0000000000000001E-3" table:style-name="ce39">
            <text:p>0.40%</text:p>
          </table:table-cell>
          <table:table-cell office:value-type="percentage" office:value="1.7000000000000001E-2" table:style-name="ce39">
            <text:p>1.70%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38">
            <text:p>10 Years</text:p>
          </table:table-cell>
          <table:table-cell office:value-type="percentage" office:value="8.9999999999999993E-3" table:style-name="ce39">
            <text:p>0.90%</text:p>
          </table:table-cell>
          <table:table-cell office:value-type="percentage" office:value="0.02" table:style-name="ce39">
            <text:p>2.00%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38">
            <text:p>20 Years</text:p>
          </table:table-cell>
          <table:table-cell office:value-type="percentage" office:value="1.4999999999999999E-2" table:style-name="ce39">
            <text:p>1.50%</text:p>
          </table:table-cell>
          <table:table-cell office:value-type="percentage" office:value="2.3E-2" table:style-name="ce39">
            <text:p>2.30%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38">
            <text:p>30 Years</text:p>
          </table:table-cell>
          <table:table-cell office:value-type="percentage" office:value="1.7000000000000001E-2" table:style-name="ce39">
            <text:p>1.70%</text:p>
          </table:table-cell>
          <table:table-cell office:value-type="percentage" office:value="2.5000000000000001E-2" table:style-name="ce39">
            <text:p>2.50%</text:p>
          </table:table-cell>
          <table:table-cell table:number-columns-repeated="16381" table:style-name="ce1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6">
            <text:p>Exhibit 10</text:p>
          </table:table-cell>
          <table:covered-table-cell/>
          <table:table-cell office:value-type="string" table:number-columns-spanned="4" table:number-rows-spanned="1" table:style-name="ce6">
            <text:p>Debt Betas by Credit Rating Index, 2016-2020</text:p>
          </table:table-cell>
          <table:covered-table-cell table:number-columns-repeated="3"/>
          <table:table-cell table:number-columns-repeated="16378" table:style-name="ce1"/>
        </table:table-row>
        <table:table-row table:style-name="ro2">
          <table:table-cell table:number-columns-repeated="2" table:style-name="ce37"/>
          <table:table-cell table:number-columns-repeated="16382" table:style-name="ce1"/>
        </table:table-row>
        <table:table-row table:style-name="ro2">
          <table:table-cell office:value-type="string" table:style-name="ce44">
            <text:p>Rating</text:p>
          </table:table-cell>
          <table:table-cell office:value-type="string" table:style-name="ce44">
            <text:p>Beta [1]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40">
            <text:p>AAA</text:p>
          </table:table-cell>
          <table:table-cell office:value-type="float" office:value="0.04" table:style-name="ce40">
            <text:p>0.04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38">
            <text:p>AA</text:p>
          </table:table-cell>
          <table:table-cell office:value-type="float" office:value="0.08" table:style-name="ce38">
            <text:p>0.08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38">
            <text:p>A</text:p>
          </table:table-cell>
          <table:table-cell office:value-type="float" office:value="0.13" table:style-name="ce38">
            <text:p>0.13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38">
            <text:p>BBB</text:p>
          </table:table-cell>
          <table:table-cell office:value-type="float" office:value="0.27" table:style-name="ce38">
            <text:p>0.27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38">
            <text:p>BB</text:p>
          </table:table-cell>
          <table:table-cell office:value-type="float" office:value="0.35" table:style-name="ce38">
            <text:p>0.35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38">
            <text:p>B</text:p>
          </table:table-cell>
          <table:table-cell office:value-type="float" office:value="0.41" table:style-name="ce38">
            <text:p>0.41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38">
            <text:p>CCC</text:p>
          </table:table-cell>
          <table:table-cell office:value-type="float" office:value="0.62" table:style-name="ce38">
            <text:p>0.62</text:p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number-columns-spanned="5" table:number-rows-spanned="1" table:style-name="ce6">
            <text:p>Market Risk Premium (according to case study page 4)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table:number-columns-repeated="3" table:style-name="ce37"/>
          <table:table-cell table:number-columns-repeated="16381" table:style-name="ce1"/>
        </table:table-row>
        <table:table-row table:style-name="ro2">
          <table:table-cell office:value-type="string" table:number-columns-spanned="2" table:number-rows-spanned="1" table:style-name="ce47">
            <text:p>Source/Methodology</text:p>
          </table:table-cell>
          <table:covered-table-cell/>
          <table:table-cell office:value-type="string" table:style-name="ce42">
            <text:p>MRP(%)</text:p>
          </table:table-cell>
          <table:table-cell table:number-columns-repeated="16381" table:style-name="ce1"/>
        </table:table-row>
        <table:table-row table:style-name="ro3">
          <table:table-cell office:value-type="string" table:number-columns-spanned="2" table:number-rows-spanned="1" table:style-name="ce82">
            <text:p>2021 CFO Survey</text:p>
          </table:table-cell>
          <table:covered-table-cell/>
          <table:table-cell office:value-type="percentage" office:value="4.5999999999999999E-2" table:style-name="ce41">
            <text:p>4.60%</text:p>
          </table:table-cell>
          <table:table-cell table:number-columns-repeated="16381" table:style-name="ce1"/>
        </table:table-row>
        <table:table-row table:style-name="ro3">
          <table:table-cell office:value-type="string" table:number-columns-spanned="2" table:number-rows-spanned="1" table:style-name="ce45">
            <text:p>2021 Surveys</text:p>
          </table:table-cell>
          <table:covered-table-cell/>
          <table:table-cell office:value-type="percentage" office:value="0.05" table:style-name="ce39">
            <text:p>5.00%</text:p>
          </table:table-cell>
          <table:table-cell table:number-columns-repeated="16381" table:style-name="ce1"/>
        </table:table-row>
        <table:table-row table:style-name="ro3">
          <table:table-cell office:value-type="string" table:number-columns-spanned="2" table:number-rows-spanned="1" table:style-name="ce45">
            <text:p>2021 Investor-Professional surveys</text:p>
          </table:table-cell>
          <table:covered-table-cell/>
          <table:table-cell office:value-type="percentage" office:value="5.5E-2" table:style-name="ce39">
            <text:p>5.50%</text:p>
          </table:table-cell>
          <table:table-cell table:number-columns-repeated="16381" table:style-name="ce1"/>
        </table:table-row>
        <table:table-row table:style-name="ro3">
          <table:table-cell office:value-type="string" table:number-columns-spanned="2" table:number-rows-spanned="1" table:style-name="ce45">
            <text:p>Historical Data (1872-2021)</text:p>
          </table:table-cell>
          <table:covered-table-cell/>
          <table:table-cell office:value-type="percentage" office:value="6.4000000000000001E-2" table:style-name="ce39">
            <text:p>6.40%</text:p>
          </table:table-cell>
          <table:table-cell table:number-columns-repeated="16381" table:style-name="ce1"/>
        </table:table-row>
        <table:table-row table:number-rows-repeated="1048548" table:style-name="ro3">
          <table:table-cell table:number-columns-repeated="16384"/>
        </table:table-row>
      </table:table>
      <table:table table:name="Returns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4" table:default-cell-style-name="ce1"/>
        <table:table-column table:style-name="co24" table:default-cell-style-name="ce1"/>
        <table:table-column table:style-name="co4" table:number-columns-repeated="16362" table:default-cell-style-name="ce1"/>
        <table:table-row table:style-name="ro1">
          <table:table-cell office:value-type="string" table:number-columns-spanned="2" table:number-rows-spanned="1" table:style-name="ce6">
            <text:p>Exhibit 9</text:p>
          </table:table-cell>
          <table:covered-table-cell/>
          <table:table-cell office:value-type="string" table:number-columns-spanned="20" table:number-rows-spanned="1" table:style-name="ce6">
            <text:p>Comparable Firms and the S&amp;P 500, Stock Return Data, 2016-2020</text:p>
          </table:table-cell>
          <table:covered-table-cell table:number-columns-repeated="19"/>
          <table:table-cell table:number-columns-repeated="16362"/>
        </table:table-row>
        <table:table-row table:style-name="ro3">
          <table:table-cell table:number-columns-repeated="22" table:style-name="ce2"/>
          <table:table-cell table:number-columns-repeated="16362"/>
        </table:table-row>
        <table:table-row table:style-name="ro3">
          <table:table-cell office:value-type="string" table:style-name="ce3">
            <text:p>Month</text:p>
          </table:table-cell>
          <table:table-cell office:value-type="string" table:style-name="ce3">
            <text:p>S&amp;P 500</text:p>
          </table:table-cell>
          <table:table-cell office:value-type="string" table:style-name="ce3">
            <text:p>Las Vegas Sands</text:p>
          </table:table-cell>
          <table:table-cell office:value-type="string" table:style-name="ce3">
            <text:p>MGM Resorts</text:p>
          </table:table-cell>
          <table:table-cell office:value-type="string" table:style-name="ce3">
            <text:p>Caesars</text:p>
          </table:table-cell>
          <table:table-cell office:value-type="string" table:style-name="ce3">
            <text:p>Penn Entertainment</text:p>
          </table:table-cell>
          <table:table-cell office:value-type="string" table:style-name="ce3">
            <text:p>Wynn Resorts</text:p>
          </table:table-cell>
          <table:table-cell office:value-type="string" table:style-name="ce3">
            <text:p>Churchill Downs</text:p>
          </table:table-cell>
          <table:table-cell office:value-type="string" table:style-name="ce3">
            <text:p>Boyd Gaming</text:p>
          </table:table-cell>
          <table:table-cell office:value-type="string" table:style-name="ce3">
            <text:p>Monarch</text:p>
          </table:table-cell>
          <table:table-cell office:value-type="string" table:style-name="ce3">
            <text:p>Disney</text:p>
          </table:table-cell>
          <table:table-cell office:value-type="string" table:style-name="ce3">
            <text:p>Netflix</text:p>
          </table:table-cell>
          <table:table-cell office:value-type="string" table:style-name="ce3">
            <text:p>Live Nation</text:p>
          </table:table-cell>
          <table:table-cell office:value-type="string" table:style-name="ce3">
            <text:p>Warner Brothers</text:p>
          </table:table-cell>
          <table:table-cell office:value-type="string" table:style-name="ce3">
            <text:p>Madison Square Garden</text:p>
          </table:table-cell>
          <table:table-cell office:value-type="string" table:style-name="ce3">
            <text:p>World Wrestling</text:p>
          </table:table-cell>
          <table:table-cell office:value-type="string" table:style-name="ce3">
            <text:p>Activision Blizzard</text:p>
          </table:table-cell>
          <table:table-cell office:value-type="string" table:style-name="ce3">
            <text:p>Electronic Arts</text:p>
          </table:table-cell>
          <table:table-cell office:value-type="string" table:style-name="ce3">
            <text:p>Take-Two Interactive</text:p>
          </table:table-cell>
          <table:table-cell office:value-type="string" table:style-name="ce3">
            <text:p>Meta Platforms</text:p>
          </table:table-cell>
          <table:table-cell office:value-type="string" table:style-name="ce3">
            <text:p>Twitter</text:p>
          </table:table-cell>
          <table:table-cell office:value-type="string" table:style-name="ce3">
            <text:p>Match Group</text:p>
          </table:table-cell>
          <table:table-cell table:number-columns-repeated="16362"/>
        </table:table-row>
        <table:table-row table:style-name="ro3">
          <table:table-cell office:value-type="date" office:date-value="2016-01-29T00:00:00" table:style-name="ce4">
            <text:p>2016-01</text:p>
          </table:table-cell>
          <table:table-cell office:value-type="percentage" office:value="-5.0735339999999997E-2" table:style-name="ce5">
            <text:p>-5.07%</text:p>
          </table:table-cell>
          <table:table-cell office:value-type="percentage" office:value="2.8740838170051599E-2" table:style-name="ce5">
            <text:p>2.87%</text:p>
          </table:table-cell>
          <table:table-cell office:value-type="percentage" office:value="-0.116197161376476" table:style-name="ce5">
            <text:p>-11.62%</text:p>
          </table:table-cell>
          <table:table-cell office:value-type="percentage" office:value="-6.1818208545446403E-2" table:style-name="ce5">
            <text:p>-6.18%</text:p>
          </table:table-cell>
          <table:table-cell office:value-type="percentage" office:value="-0.117977544665337" table:style-name="ce5">
            <text:p>-11.80%</text:p>
          </table:table-cell>
          <table:table-cell office:value-type="percentage" office:value="-2.6738055050373102E-2" table:style-name="ce5">
            <text:p>-2.67%</text:p>
          </table:table-cell>
          <table:table-cell office:value-type="percentage" office:value="-2.3676626384258301E-2" table:style-name="ce5">
            <text:p>-2.37%</text:p>
          </table:table-cell>
          <table:table-cell office:value-type="percentage" office:value="-0.10367394238710401" table:style-name="ce5">
            <text:p>-10.37%</text:p>
          </table:table-cell>
          <table:table-cell office:value-type="percentage" office:value="-8.8908389210701003E-2" table:style-name="ce5">
            <text:p>-8.89%</text:p>
          </table:table-cell>
          <table:table-cell office:value-type="percentage" office:value="-8.8123351335525499E-2" table:style-name="ce5">
            <text:p>-8.81%</text:p>
          </table:table-cell>
          <table:table-cell office:value-type="percentage" office:value="-0.197062432765961" table:style-name="ce5">
            <text:p>-19.71%</text:p>
          </table:table-cell>
          <table:table-cell office:value-type="percentage" office:value="-7.6109036803245503E-2" table:style-name="ce5">
            <text:p>-7.61%</text:p>
          </table:table-cell>
          <table:table-cell office:value-type="percentage" office:value="3.4107938408851603E-2" table:style-name="ce5">
            <text:p>3.41%</text:p>
          </table:table-cell>
          <table:table-cell office:value-type="percentage" office:value="-4.77132312953472E-2" table:style-name="ce5">
            <text:p>-4.77%</text:p>
          </table:table-cell>
          <table:table-cell office:value-type="percentage" office:value="3.3631988335400798E-3" table:style-name="ce5">
            <text:p>0.34%</text:p>
          </table:table-cell>
          <table:table-cell office:value-type="percentage" office:value="-0.100490815937519" table:style-name="ce5">
            <text:p>-10.05%</text:p>
          </table:table-cell>
          <table:table-cell office:value-type="percentage" office:value="-6.0753826051950503E-2" table:style-name="ce5">
            <text:p>-6.08%</text:p>
          </table:table-cell>
          <table:table-cell office:value-type="percentage" office:value="-4.0183523669838897E-3" table:style-name="ce5">
            <text:p>-0.40%</text:p>
          </table:table-cell>
          <table:table-cell office:value-type="percentage" office:value="7.2138309478759793E-2" table:style-name="ce5">
            <text:p>7.21%</text:p>
          </table:table-cell>
          <table:table-cell office:value-type="percentage" office:value="-0.27398446202278098" table:style-name="ce5">
            <text:p>-27.40%</text:p>
          </table:table-cell>
          <table:table-cell office:value-type="percentage" office:value="-7.3800735175609603E-2" table:style-name="ce5">
            <text:p>-7.38%</text:p>
          </table:table-cell>
          <table:table-cell table:number-columns-repeated="16362"/>
        </table:table-row>
        <table:table-row table:style-name="ro3">
          <table:table-cell office:value-type="date" office:date-value="2016-02-29T00:00:00" table:style-name="ce4">
            <text:p>2016-02</text:p>
          </table:table-cell>
          <table:table-cell office:value-type="percentage" office:value="-4.1283550000000002E-3" table:style-name="ce5">
            <text:p>-0.41%</text:p>
          </table:table-cell>
          <table:table-cell office:value-type="percentage" office:value="7.0509985089302105E-2" table:style-name="ce5">
            <text:p>7.05%</text:p>
          </table:table-cell>
          <table:table-cell office:value-type="percentage" office:value="-5.7270899415016202E-2" table:style-name="ce5">
            <text:p>-5.73%</text:p>
          </table:table-cell>
          <table:table-cell office:value-type="percentage" office:value="-3.0038708820939099E-2" table:style-name="ce5">
            <text:p>-3.00%</text:p>
          </table:table-cell>
          <table:table-cell office:value-type="percentage" office:value="-2.0523706451058402E-2" table:style-name="ce5">
            <text:p>-2.05%</text:p>
          </table:table-cell>
          <table:table-cell office:value-type="percentage" office:value="0.23225435614585899" table:style-name="ce5">
            <text:p>23.23%</text:p>
          </table:table-cell>
          <table:table-cell office:value-type="percentage" office:value="-1.8242394551634799E-2" table:style-name="ce5">
            <text:p>-1.82%</text:p>
          </table:table-cell>
          <table:table-cell office:value-type="percentage" office:value="-2.7512621134519601E-2" table:style-name="ce5">
            <text:p>-2.75%</text:p>
          </table:table-cell>
          <table:table-cell office:value-type="percentage" office:value="-2.8019318357109999E-2" table:style-name="ce5">
            <text:p>-2.80%</text:p>
          </table:table-cell>
          <table:table-cell office:value-type="percentage" office:value="-3.13090230338275E-3" table:style-name="ce5">
            <text:p>-0.31%</text:p>
          </table:table-cell>
          <table:table-cell office:value-type="percentage" office:value="1.7095027491450299E-2" table:style-name="ce5">
            <text:p>1.71%</text:p>
          </table:table-cell>
          <table:table-cell office:value-type="percentage" office:value="-3.1277574598789201E-2" table:style-name="ce5">
            <text:p>-3.13%</text:p>
          </table:table-cell>
          <table:table-cell office:value-type="percentage" office:value="-9.3874596059322399E-2" table:style-name="ce5">
            <text:p>-9.39%</text:p>
          </table:table-cell>
          <table:table-cell office:value-type="percentage" office:value="5.9709120541810998E-3" table:style-name="ce5">
            <text:p>0.60%</text:p>
          </table:table-cell>
          <table:table-cell office:value-type="percentage" office:value="-6.5921805799007402E-2" table:style-name="ce5">
            <text:p>-6.59%</text:p>
          </table:table-cell>
          <table:table-cell office:value-type="percentage" office:value="-9.0465240180492401E-2" table:style-name="ce5">
            <text:p>-9.05%</text:p>
          </table:table-cell>
          <table:table-cell office:value-type="percentage" office:value="-4.7253901138901702E-3" table:style-name="ce5">
            <text:p>-0.47%</text:p>
          </table:table-cell>
          <table:table-cell office:value-type="percentage" office:value="3.7175819277763401E-2" table:style-name="ce5">
            <text:p>3.72%</text:p>
          </table:table-cell>
          <table:table-cell office:value-type="percentage" office:value="-4.7143757343292202E-2" table:style-name="ce5">
            <text:p>-4.71%</text:p>
          </table:table-cell>
          <table:table-cell office:value-type="percentage" office:value="7.8571528196334797E-2" table:style-name="ce5">
            <text:p>7.86%</text:p>
          </table:table-cell>
          <table:table-cell office:value-type="percentage" office:value="-0.132270902395248" table:style-name="ce5">
            <text:p>-13.23%</text:p>
          </table:table-cell>
          <table:table-cell table:number-columns-repeated="16362"/>
        </table:table-row>
        <table:table-row table:style-name="ro3">
          <table:table-cell office:value-type="date" office:date-value="2016-03-31T00:00:00" table:style-name="ce4">
            <text:p>2016-03</text:p>
          </table:table-cell>
          <table:table-cell office:value-type="percentage" office:value="6.5991110000000006E-2" table:style-name="ce5">
            <text:p>6.60%</text:p>
          </table:table-cell>
          <table:table-cell office:value-type="percentage" office:value="8.5335575044155093E-2" table:style-name="ce5">
            <text:p>8.53%</text:p>
          </table:table-cell>
          <table:table-cell office:value-type="percentage" office:value="0.13259378075599701" table:style-name="ce5">
            <text:p>13.26%</text:p>
          </table:table-cell>
          <table:table-cell office:value-type="percentage" office:value="0.14285707473754899" table:style-name="ce5">
            <text:p>14.29%</text:p>
          </table:table-cell>
          <table:table-cell office:value-type="percentage" office:value="0.20592488348484" table:style-name="ce5">
            <text:p>20.59%</text:p>
          </table:table-cell>
          <table:table-cell office:value-type="percentage" office:value="0.13275940716266599" table:style-name="ce5">
            <text:p>13.28%</text:p>
          </table:table-cell>
          <table:table-cell office:value-type="percentage" office:value="9.0399719774723095E-2" table:style-name="ce5">
            <text:p>9.04%</text:p>
          </table:table-cell>
          <table:table-cell office:value-type="percentage" office:value="0.192840665578842" table:style-name="ce5">
            <text:p>19.28%</text:p>
          </table:table-cell>
          <table:table-cell office:value-type="percentage" office:value="-3.2803267240524299E-2" table:style-name="ce5">
            <text:p>-3.28%</text:p>
          </table:table-cell>
          <table:table-cell office:value-type="percentage" office:value="3.9677564054727603E-2" table:style-name="ce5">
            <text:p>3.97%</text:p>
          </table:table-cell>
          <table:table-cell office:value-type="percentage" office:value="9.4422429800033597E-2" table:style-name="ce5">
            <text:p>9.44%</text:p>
          </table:table-cell>
          <table:table-cell office:value-type="percentage" office:value="1.45520558580756E-2" table:style-name="ce5">
            <text:p>1.46%</text:p>
          </table:table-cell>
          <table:table-cell office:value-type="percentage" office:value="0.145199969410896" table:style-name="ce5">
            <text:p>14.52%</text:p>
          </table:table-cell>
          <table:table-cell office:value-type="percentage" office:value="7.3290325701236697E-2" table:style-name="ce5">
            <text:p>7.33%</text:p>
          </table:table-cell>
          <table:table-cell office:value-type="percentage" office:value="6.3397161662578597E-2" table:style-name="ce5">
            <text:p>6.34%</text:p>
          </table:table-cell>
          <table:table-cell office:value-type="percentage" office:value="7.6728768646717099E-2" table:style-name="ce5">
            <text:p>7.67%</text:p>
          </table:table-cell>
          <table:table-cell office:value-type="percentage" office:value="2.91096325963736E-2" table:style-name="ce5">
            <text:p>2.91%</text:p>
          </table:table-cell>
          <table:table-cell office:value-type="percentage" office:value="4.6679534018039703E-2" table:style-name="ce5">
            <text:p>4.67%</text:p>
          </table:table-cell>
          <table:table-cell office:value-type="percentage" office:value="6.7153014242649106E-2" table:style-name="ce5">
            <text:p>6.72%</text:p>
          </table:table-cell>
          <table:table-cell office:value-type="percentage" office:value="-8.6644679307937594E-2" table:style-name="ce5">
            <text:p>-8.66%</text:p>
          </table:table-cell>
          <table:table-cell office:value-type="percentage" office:value="1.56106585636735E-2" table:style-name="ce5">
            <text:p>1.56%</text:p>
          </table:table-cell>
          <table:table-cell table:number-columns-repeated="16362"/>
        </table:table-row>
        <table:table-row table:style-name="ro3">
          <table:table-cell office:value-type="date" office:date-value="2016-04-29T00:00:00" table:style-name="ce4">
            <text:p>2016-04</text:p>
          </table:table-cell>
          <table:table-cell office:value-type="percentage" office:value="2.69937E-3" table:style-name="ce5">
            <text:p>0.27%</text:p>
          </table:table-cell>
          <table:table-cell office:value-type="percentage" office:value="-0.126354470849037" table:style-name="ce5">
            <text:p>-12.64%</text:p>
          </table:table-cell>
          <table:table-cell office:value-type="percentage" office:value="-6.5299109555780896E-3" table:style-name="ce5">
            <text:p>-0.65%</text:p>
          </table:table-cell>
          <table:table-cell office:value-type="percentage" office:value="0.14597903192043299" table:style-name="ce5">
            <text:p>14.60%</text:p>
          </table:table-cell>
          <table:table-cell office:value-type="percentage" office:value="-3.35531085729599E-2" table:style-name="ce5">
            <text:p>-3.36%</text:p>
          </table:table-cell>
          <table:table-cell office:value-type="percentage" office:value="-5.4907388985156999E-2" table:style-name="ce5">
            <text:p>-5.49%</text:p>
          </table:table-cell>
          <table:table-cell office:value-type="percentage" office:value="-9.2642761766910595E-2" table:style-name="ce5">
            <text:p>-9.26%</text:p>
          </table:table-cell>
          <table:table-cell office:value-type="percentage" office:value="-9.7773499786853804E-2" table:style-name="ce5">
            <text:p>-9.78%</text:p>
          </table:table-cell>
          <table:table-cell office:value-type="percentage" office:value="-2.3638186976313601E-2" table:style-name="ce5">
            <text:p>-2.36%</text:p>
          </table:table-cell>
          <table:table-cell office:value-type="percentage" office:value="3.97744923830032E-2" table:style-name="ce5">
            <text:p>3.98%</text:p>
          </table:table-cell>
          <table:table-cell office:value-type="percentage" office:value="-0.11933878809213599" table:style-name="ce5">
            <text:p>-11.93%</text:p>
          </table:table-cell>
          <table:table-cell office:value-type="percentage" office:value="-3.7203043699264499E-2" table:style-name="ce5">
            <text:p>-3.72%</text:p>
          </table:table-cell>
          <table:table-cell office:value-type="percentage" office:value="-4.6105474233627299E-2" table:style-name="ce5">
            <text:p>-4.61%</text:p>
          </table:table-cell>
          <table:table-cell office:value-type="percentage" office:value="-5.6383773684501703E-2" table:style-name="ce5">
            <text:p>-5.64%</text:p>
          </table:table-cell>
          <table:table-cell office:value-type="percentage" office:value="-5.7757671922445297E-2" table:style-name="ce5">
            <text:p>-5.78%</text:p>
          </table:table-cell>
          <table:table-cell office:value-type="percentage" office:value="1.8617052584886599E-2" table:style-name="ce5">
            <text:p>1.86%</text:p>
          </table:table-cell>
          <table:table-cell office:value-type="percentage" office:value="-6.4438089728355394E-2" table:style-name="ce5">
            <text:p>-6.44%</text:p>
          </table:table-cell>
          <table:table-cell office:value-type="percentage" office:value="-9.2646613717079204E-2" table:style-name="ce5">
            <text:p>-9.26%</text:p>
          </table:table-cell>
          <table:table-cell office:value-type="percentage" office:value="3.0499592423439002E-2" table:style-name="ce5">
            <text:p>3.05%</text:p>
          </table:table-cell>
          <table:table-cell office:value-type="percentage" office:value="-0.116616278886795" table:style-name="ce5">
            <text:p>-11.66%</text:p>
          </table:table-cell>
          <table:table-cell office:value-type="percentage" office:value="3.0741337686777101E-2" table:style-name="ce5">
            <text:p>3.07%</text:p>
          </table:table-cell>
          <table:table-cell table:number-columns-repeated="16362"/>
        </table:table-row>
        <table:table-row table:style-name="ro3">
          <table:table-cell office:value-type="date" office:date-value="2016-05-31T00:00:00" table:style-name="ce4">
            <text:p>2016-05</text:p>
          </table:table-cell>
          <table:table-cell office:value-type="percentage" office:value="1.5329489999999999E-2" table:style-name="ce5">
            <text:p>1.53%</text:p>
          </table:table-cell>
          <table:table-cell office:value-type="percentage" office:value="2.4141753092408201E-2" table:style-name="ce5">
            <text:p>2.41%</text:p>
          </table:table-cell>
          <table:table-cell office:value-type="percentage" office:value="7.2770006954669994E-2" table:style-name="ce5">
            <text:p>7.28%</text:p>
          </table:table-cell>
          <table:table-cell office:value-type="percentage" office:value="0.136537000536919" table:style-name="ce5">
            <text:p>13.65%</text:p>
          </table:table-cell>
          <table:table-cell office:value-type="percentage" office:value="-2.8518233448267E-2" table:style-name="ce5">
            <text:p>-2.85%</text:p>
          </table:table-cell>
          <table:table-cell office:value-type="percentage" office:value="9.4903700053691906E-2" table:style-name="ce5">
            <text:p>9.49%</text:p>
          </table:table-cell>
          <table:table-cell office:value-type="percentage" office:value="-6.4614631235599504E-2" table:style-name="ce5">
            <text:p>-6.46%</text:p>
          </table:table-cell>
          <table:table-cell office:value-type="percentage" office:value="1.4485003426671E-2" table:style-name="ce5">
            <text:p>1.45%</text:p>
          </table:table-cell>
          <table:table-cell office:value-type="percentage" office:value="0.11157899349927899" table:style-name="ce5">
            <text:p>11.16%</text:p>
          </table:table-cell>
          <table:table-cell office:value-type="percentage" office:value="-3.9124548435211202E-2" table:style-name="ce5">
            <text:p>-3.91%</text:p>
          </table:table-cell>
          <table:table-cell office:value-type="percentage" office:value="0.13928692042827601" table:style-name="ce5">
            <text:p>13.93%</text:p>
          </table:table-cell>
          <table:table-cell office:value-type="percentage" office:value="0.124301679432392" table:style-name="ce5">
            <text:p>12.43%</text:p>
          </table:table-cell>
          <table:table-cell office:value-type="percentage" office:value="1.97730101644993E-2" table:style-name="ce5">
            <text:p>1.98%</text:p>
          </table:table-cell>
          <table:table-cell office:value-type="percentage" office:value="6.7206032574176802E-2" table:style-name="ce5">
            <text:p>6.72%</text:p>
          </table:table-cell>
          <table:table-cell office:value-type="percentage" office:value="5.5889442563057001E-2" table:style-name="ce5">
            <text:p>5.59%</text:p>
          </table:table-cell>
          <table:table-cell office:value-type="percentage" office:value="0.13896133005619099" table:style-name="ce5">
            <text:p>13.90%</text:p>
          </table:table-cell>
          <table:table-cell office:value-type="percentage" office:value="0.24090544879436501" table:style-name="ce5">
            <text:p>24.09%</text:p>
          </table:table-cell>
          <table:table-cell office:value-type="percentage" office:value="0.13838501274585699" table:style-name="ce5">
            <text:p>13.84%</text:p>
          </table:table-cell>
          <table:table-cell office:value-type="percentage" office:value="1.0460926219821001E-2" table:style-name="ce5">
            <text:p>1.05%</text:p>
          </table:table-cell>
          <table:table-cell office:value-type="percentage" office:value="4.1039697825908703E-2" table:style-name="ce5">
            <text:p>4.10%</text:p>
          </table:table-cell>
          <table:table-cell office:value-type="percentage" office:value="0.22807021439075501" table:style-name="ce5">
            <text:p>22.81%</text:p>
          </table:table-cell>
          <table:table-cell table:number-columns-repeated="16362"/>
        </table:table-row>
        <table:table-row table:style-name="ro3">
          <table:table-cell office:value-type="date" office:date-value="2016-06-30T00:00:00" table:style-name="ce4">
            <text:p>2016-06</text:p>
          </table:table-cell>
          <table:table-cell office:value-type="percentage" office:value="9.0607350000000003E-4" table:style-name="ce5">
            <text:p>0.09%</text:p>
          </table:table-cell>
          <table:table-cell office:value-type="percentage" office:value="-4.3901380151510197E-2" table:style-name="ce5">
            <text:p>-4.39%</text:p>
          </table:table-cell>
          <table:table-cell office:value-type="percentage" office:value="-9.6280621364712698E-3" table:style-name="ce5">
            <text:p>-0.96%</text:p>
          </table:table-cell>
          <table:table-cell office:value-type="percentage" office:value="1.9798662513494499E-2" table:style-name="ce5">
            <text:p>1.98%</text:p>
          </table:table-cell>
          <table:table-cell office:value-type="percentage" office:value="-0.10976389795541799" table:style-name="ce5">
            <text:p>-10.98%</text:p>
          </table:table-cell>
          <table:table-cell office:value-type="percentage" office:value="-5.7600341737270397E-2" table:style-name="ce5">
            <text:p>-5.76%</text:p>
          </table:table-cell>
          <table:table-cell office:value-type="percentage" office:value="6.7723565734922903E-3" table:style-name="ce5">
            <text:p>0.68%</text:p>
          </table:table-cell>
          <table:table-cell office:value-type="percentage" office:value="-2.6969868689775502E-2" table:style-name="ce5">
            <text:p>-2.70%</text:p>
          </table:table-cell>
          <table:table-cell office:value-type="percentage" office:value="4.0246136486530297E-2" table:style-name="ce5">
            <text:p>4.02%</text:p>
          </table:table-cell>
          <table:table-cell office:value-type="percentage" office:value="-1.4110073447227501E-2" table:style-name="ce5">
            <text:p>-1.41%</text:p>
          </table:table-cell>
          <table:table-cell office:value-type="percentage" office:value="-0.108121246099472" table:style-name="ce5">
            <text:p>-10.81%</text:p>
          </table:table-cell>
          <table:table-cell office:value-type="percentage" office:value="-2.6915097609162299E-2" table:style-name="ce5">
            <text:p>-2.69%</text:p>
          </table:table-cell>
          <table:table-cell office:value-type="percentage" office:value="-9.4075433909892994E-2" table:style-name="ce5">
            <text:p>-9.41%</text:p>
          </table:table-cell>
          <table:table-cell office:value-type="percentage" office:value="2.9725993052125001E-2" table:style-name="ce5">
            <text:p>2.97%</text:p>
          </table:table-cell>
          <table:table-cell office:value-type="percentage" office:value="5.4638598114252097E-2" table:style-name="ce5">
            <text:p>5.46%</text:p>
          </table:table-cell>
          <table:table-cell office:value-type="percentage" office:value="9.4244210049510002E-3" table:style-name="ce5">
            <text:p>0.94%</text:p>
          </table:table-cell>
          <table:table-cell office:value-type="percentage" office:value="-1.2898994609713599E-2" table:style-name="ce5">
            <text:p>-1.29%</text:p>
          </table:table-cell>
          <table:table-cell office:value-type="percentage" office:value="-2.5443373247981099E-2" table:style-name="ce5">
            <text:p>-2.54%</text:p>
          </table:table-cell>
          <table:table-cell office:value-type="percentage" office:value="-3.8128092885017402E-2" table:style-name="ce5">
            <text:p>-3.81%</text:p>
          </table:table-cell>
          <table:table-cell office:value-type="percentage" office:value="0.11103808134794201" table:style-name="ce5">
            <text:p>11.10%</text:p>
          </table:table-cell>
          <table:table-cell office:value-type="percentage" office:value="7.6785698533058194E-2" table:style-name="ce5">
            <text:p>7.68%</text:p>
          </table:table-cell>
          <table:table-cell table:number-columns-repeated="16362"/>
        </table:table-row>
        <table:table-row table:style-name="ro3">
          <table:table-cell office:value-type="date" office:date-value="2016-07-29T00:00:00" table:style-name="ce4">
            <text:p>2016-07</text:p>
          </table:table-cell>
          <table:table-cell office:value-type="percentage" office:value="3.5609809999999999E-2" table:style-name="ce5">
            <text:p>3.56%</text:p>
          </table:table-cell>
          <table:table-cell office:value-type="percentage" office:value="0.16463553905487099" table:style-name="ce5">
            <text:p>16.46%</text:p>
          </table:table-cell>
          <table:table-cell office:value-type="percentage" office:value="5.96553422510624E-2" table:style-name="ce5">
            <text:p>5.97%</text:p>
          </table:table-cell>
          <table:table-cell office:value-type="percentage" office:value="-4.9029279500246097E-2" table:style-name="ce5">
            <text:p>-4.90%</text:p>
          </table:table-cell>
          <table:table-cell office:value-type="percentage" office:value="7.6702557504177094E-2" table:style-name="ce5">
            <text:p>7.67%</text:p>
          </table:table-cell>
          <table:table-cell office:value-type="percentage" office:value="8.0648690462112399E-2" table:style-name="ce5">
            <text:p>8.06%</text:p>
          </table:table-cell>
          <table:table-cell office:value-type="percentage" office:value="3.7749320268631002E-2" table:style-name="ce5">
            <text:p>3.77%</text:p>
          </table:table-cell>
          <table:table-cell office:value-type="percentage" office:value="6.5760925412177998E-2" table:style-name="ce5">
            <text:p>6.58%</text:p>
          </table:table-cell>
          <table:table-cell office:value-type="percentage" office:value="6.1902623623609501E-2" table:style-name="ce5">
            <text:p>6.19%</text:p>
          </table:table-cell>
          <table:table-cell office:value-type="percentage" office:value="-1.18585443124175E-2" table:style-name="ce5">
            <text:p>-1.19%</text:p>
          </table:table-cell>
          <table:table-cell office:value-type="percentage" office:value="-2.5142473168671101E-3" table:style-name="ce5">
            <text:p>-0.25%</text:p>
          </table:table-cell>
          <table:table-cell office:value-type="percentage" office:value="0.16680851578712499" table:style-name="ce5">
            <text:p>16.68%</text:p>
          </table:table-cell>
          <table:table-cell office:value-type="percentage" office:value="-5.5489256046712399E-3" table:style-name="ce5">
            <text:p>-0.55%</text:p>
          </table:table-cell>
          <table:table-cell office:value-type="percentage" office:value="5.95907419919968E-2" table:style-name="ce5">
            <text:p>5.96%</text:p>
          </table:table-cell>
          <table:table-cell office:value-type="percentage" office:value="7.2786539793014499E-2" table:style-name="ce5">
            <text:p>7.28%</text:p>
          </table:table-cell>
          <table:table-cell office:value-type="percentage" office:value="1.3373675756156399E-2" table:style-name="ce5">
            <text:p>1.34%</text:p>
          </table:table-cell>
          <table:table-cell office:value-type="percentage" office:value="7.3917312547564498E-3" table:style-name="ce5">
            <text:p>0.74%</text:p>
          </table:table-cell>
          <table:table-cell office:value-type="percentage" office:value="5.9599217027425801E-2" table:style-name="ce5">
            <text:p>5.96%</text:p>
          </table:table-cell>
          <table:table-cell office:value-type="percentage" office:value="8.4529258310794803E-2" table:style-name="ce5">
            <text:p>8.45%</text:p>
          </table:table-cell>
          <table:table-cell office:value-type="percentage" office:value="-1.5966910868883102E-2" table:style-name="ce5">
            <text:p>-1.60%</text:p>
          </table:table-cell>
          <table:table-cell office:value-type="percentage" office:value="4.4776134192943601E-2" table:style-name="ce5">
            <text:p>4.48%</text:p>
          </table:table-cell>
          <table:table-cell table:number-columns-repeated="16362"/>
        </table:table-row>
        <table:table-row table:style-name="ro3">
          <table:table-cell office:value-type="date" office:date-value="2016-08-31T00:00:00" table:style-name="ce4">
            <text:p>2016-08</text:p>
          </table:table-cell>
          <table:table-cell office:value-type="percentage" office:value="-1.219176E-3" table:style-name="ce5">
            <text:p>-0.12%</text:p>
          </table:table-cell>
          <table:table-cell office:value-type="percentage" office:value="-8.6871162056922895E-3" table:style-name="ce5">
            <text:p>-0.87%</text:p>
          </table:table-cell>
          <table:table-cell office:value-type="percentage" office:value="-3.75313404947519E-3" table:style-name="ce5">
            <text:p>-0.38%</text:p>
          </table:table-cell>
          <table:table-cell office:value-type="percentage" office:value="-3.3910017460584599E-2" table:style-name="ce5">
            <text:p>-3.39%</text:p>
          </table:table-cell>
          <table:table-cell office:value-type="percentage" office:value="-5.5925440043210997E-2" table:style-name="ce5">
            <text:p>-5.59%</text:p>
          </table:table-cell>
          <table:table-cell office:value-type="percentage" office:value="-8.3001509308815002E-2" table:style-name="ce5">
            <text:p>-8.30%</text:p>
          </table:table-cell>
          <table:table-cell office:value-type="percentage" office:value="0.13917486369609799" table:style-name="ce5">
            <text:p>13.92%</text:p>
          </table:table-cell>
          <table:table-cell office:value-type="percentage" office:value="-5.6094140745699397E-3" table:style-name="ce5">
            <text:p>-0.56%</text:p>
          </table:table-cell>
          <table:table-cell office:value-type="percentage" office:value="1.97171457111836E-2" table:style-name="ce5">
            <text:p>1.97%</text:p>
          </table:table-cell>
          <table:table-cell office:value-type="percentage" office:value="-1.5528899617493199E-2" table:style-name="ce5">
            <text:p>-1.55%</text:p>
          </table:table-cell>
          <table:table-cell office:value-type="percentage" office:value="6.79451748728752E-2" table:style-name="ce5">
            <text:p>6.79%</text:p>
          </table:table-cell>
          <table:table-cell office:value-type="percentage" office:value="-2.5528838858008399E-2" table:style-name="ce5">
            <text:p>-2.55%</text:p>
          </table:table-cell>
          <table:table-cell office:value-type="percentage" office:value="1.67397391051054E-2" table:style-name="ce5">
            <text:p>1.67%</text:p>
          </table:table-cell>
          <table:table-cell office:value-type="percentage" office:value="-1.1707420460879799E-2" table:style-name="ce5">
            <text:p>-1.17%</text:p>
          </table:table-cell>
          <table:table-cell office:value-type="percentage" office:value="5.1645591855049099E-2" table:style-name="ce5">
            <text:p>5.16%</text:p>
          </table:table-cell>
          <table:table-cell office:value-type="percentage" office:value="3.0129458755254801E-2" table:style-name="ce5">
            <text:p>3.01%</text:p>
          </table:table-cell>
          <table:table-cell office:value-type="percentage" office:value="6.4334429800510406E-2" table:style-name="ce5">
            <text:p>6.43%</text:p>
          </table:table-cell>
          <table:table-cell office:value-type="percentage" office:value="8.1881552934646606E-2" table:style-name="ce5">
            <text:p>8.19%</text:p>
          </table:table-cell>
          <table:table-cell office:value-type="percentage" office:value="1.7589157447218898E-2" table:style-name="ce5">
            <text:p>1.76%</text:p>
          </table:table-cell>
          <table:table-cell office:value-type="percentage" office:value="0.15444710850715601" table:style-name="ce5">
            <text:p>15.44%</text:p>
          </table:table-cell>
          <table:table-cell office:value-type="percentage" office:value="2.79365424066782E-2" table:style-name="ce5">
            <text:p>2.79%</text:p>
          </table:table-cell>
          <table:table-cell table:number-columns-repeated="16362"/>
        </table:table-row>
        <table:table-row table:style-name="ro3">
          <table:table-cell office:value-type="date" office:date-value="2016-09-30T00:00:00" table:style-name="ce4">
            <text:p>2016-09</text:p>
          </table:table-cell>
          <table:table-cell office:value-type="percentage" office:value="-1.234483E-3" table:style-name="ce5">
            <text:p>-0.12%</text:p>
          </table:table-cell>
          <table:table-cell office:value-type="percentage" office:value="0.16032667458057401" table:style-name="ce5">
            <text:p>16.03%</text:p>
          </table:table-cell>
          <table:table-cell office:value-type="percentage" office:value="8.9577287435531602E-2" table:style-name="ce5">
            <text:p>8.96%</text:p>
          </table:table-cell>
          <table:table-cell office:value-type="percentage" office:value="7.1633509360253802E-3" table:style-name="ce5">
            <text:p>0.72%</text:p>
          </table:table-cell>
          <table:table-cell office:value-type="percentage" office:value="-4.3018378317356103E-2" table:style-name="ce5">
            <text:p>-4.30%</text:p>
          </table:table-cell>
          <table:table-cell office:value-type="percentage" office:value="9.0685158967971802E-2" table:style-name="ce5">
            <text:p>9.07%</text:p>
          </table:table-cell>
          <table:table-cell office:value-type="percentage" office:value="-2.0283831283450099E-2" table:style-name="ce5">
            <text:p>-2.03%</text:p>
          </table:table-cell>
          <table:table-cell office:value-type="percentage" office:value="1.4359009452164199E-2" table:style-name="ce5">
            <text:p>1.44%</text:p>
          </table:table-cell>
          <table:table-cell office:value-type="percentage" office:value="5.8007527142763103E-2" table:style-name="ce5">
            <text:p>5.80%</text:p>
          </table:table-cell>
          <table:table-cell office:value-type="percentage" office:value="-1.6938369721174198E-2" table:style-name="ce5">
            <text:p>-1.69%</text:p>
          </table:table-cell>
          <table:table-cell office:value-type="percentage" office:value="1.1287902481854E-2" table:style-name="ce5">
            <text:p>1.13%</text:p>
          </table:table-cell>
          <table:table-cell office:value-type="percentage" office:value="2.84431222826242E-2" table:style-name="ce5">
            <text:p>2.84%</text:p>
          </table:table-cell>
          <table:table-cell office:value-type="percentage" office:value="5.5272433906793601E-2" table:style-name="ce5">
            <text:p>5.53%</text:p>
          </table:table-cell>
          <table:table-cell office:value-type="percentage" office:value="-6.2219709157943698E-2" table:style-name="ce5">
            <text:p>-6.22%</text:p>
          </table:table-cell>
          <table:table-cell office:value-type="percentage" office:value="3.1295076012611403E-2" table:style-name="ce5">
            <text:p>3.13%</text:p>
          </table:table-cell>
          <table:table-cell office:value-type="percentage" office:value="7.0824280381202698E-2" table:style-name="ce5">
            <text:p>7.08%</text:p>
          </table:table-cell>
          <table:table-cell office:value-type="percentage" office:value="5.1335688680410399E-2" table:style-name="ce5">
            <text:p>5.13%</text:p>
          </table:table-cell>
          <table:table-cell office:value-type="percentage" office:value="3.7037048488855397E-2" table:style-name="ce5">
            <text:p>3.70%</text:p>
          </table:table-cell>
          <table:table-cell office:value-type="percentage" office:value="1.70472674071789E-2" table:style-name="ce5">
            <text:p>1.70%</text:p>
          </table:table-cell>
          <table:table-cell office:value-type="percentage" office:value="0.19989590346813199" table:style-name="ce5">
            <text:p>19.99%</text:p>
          </table:table-cell>
          <table:table-cell office:value-type="percentage" office:value="9.8826453089714106E-2" table:style-name="ce5">
            <text:p>9.88%</text:p>
          </table:table-cell>
          <table:table-cell table:number-columns-repeated="16362"/>
        </table:table-row>
        <table:table-row table:style-name="ro3">
          <table:table-cell office:value-type="date" office:date-value="2016-10-31T00:00:00" table:style-name="ce4">
            <text:p>2016-10</text:p>
          </table:table-cell>
          <table:table-cell office:value-type="percentage" office:value="-1.9425620000000001E-2" table:style-name="ce5">
            <text:p>-1.94%</text:p>
          </table:table-cell>
          <table:table-cell office:value-type="percentage" office:value="5.9089353308081601E-3" table:style-name="ce5">
            <text:p>0.59%</text:p>
          </table:table-cell>
          <table:table-cell office:value-type="percentage" office:value="5.3783860057592401E-3" table:style-name="ce5">
            <text:p>0.54%</text:p>
          </table:table-cell>
          <table:table-cell office:value-type="percentage" office:value="-0.13940255343913999" table:style-name="ce5">
            <text:p>-13.94%</text:p>
          </table:table-cell>
          <table:table-cell office:value-type="percentage" office:value="-4.7162815928459202E-2" table:style-name="ce5">
            <text:p>-4.72%</text:p>
          </table:table-cell>
          <table:table-cell office:value-type="percentage" office:value="-2.9460020363330799E-2" table:style-name="ce5">
            <text:p>-2.95%</text:p>
          </table:table-cell>
          <table:table-cell office:value-type="percentage" office:value="-7.0720911026001004E-2" table:style-name="ce5">
            <text:p>-7.07%</text:p>
          </table:table-cell>
          <table:table-cell office:value-type="percentage" office:value="-9.7067743539810195E-2" table:style-name="ce5">
            <text:p>-9.71%</text:p>
          </table:table-cell>
          <table:table-cell office:value-type="percentage" office:value="-6.0389369726181003E-2" table:style-name="ce5">
            <text:p>-6.04%</text:p>
          </table:table-cell>
          <table:table-cell office:value-type="percentage" office:value="-1.83069321792573E-3" table:style-name="ce5">
            <text:p>-0.18%</text:p>
          </table:table-cell>
          <table:table-cell office:value-type="percentage" office:value="0.26707252860069303" table:style-name="ce5">
            <text:p>26.71%</text:p>
          </table:table-cell>
          <table:table-cell office:value-type="percentage" office:value="6.9141387939453099E-3" table:style-name="ce5">
            <text:p>0.69%</text:p>
          </table:table-cell>
          <table:table-cell office:value-type="percentage" office:value="-3.0089132487773899E-2" table:style-name="ce5">
            <text:p>-3.01%</text:p>
          </table:table-cell>
          <table:table-cell office:value-type="percentage" office:value="-2.3139119148254401E-2" table:style-name="ce5">
            <text:p>-2.31%</text:p>
          </table:table-cell>
          <table:table-cell office:value-type="percentage" office:value="-0.169953003525734" table:style-name="ce5">
            <text:p>-17.00%</text:p>
          </table:table-cell>
          <table:table-cell office:value-type="percentage" office:value="-2.5507925078272799E-2" table:style-name="ce5">
            <text:p>-2.55%</text:p>
          </table:table-cell>
          <table:table-cell office:value-type="percentage" office:value="-8.05621147155762E-2" table:style-name="ce5">
            <text:p>-8.06%</text:p>
          </table:table-cell>
          <table:table-cell office:value-type="percentage" office:value="-1.5306175686419E-2" table:style-name="ce5">
            <text:p>-1.53%</text:p>
          </table:table-cell>
          <table:table-cell office:value-type="percentage" office:value="2.12052781134844E-2" table:style-name="ce5">
            <text:p>2.12%</text:p>
          </table:table-cell>
          <table:table-cell office:value-type="percentage" office:value="-0.221258074045181" table:style-name="ce5">
            <text:p>-22.13%</text:p>
          </table:table-cell>
          <table:table-cell office:value-type="percentage" office:value="1.51769835501909E-2" table:style-name="ce5">
            <text:p>1.52%</text:p>
          </table:table-cell>
          <table:table-cell table:number-columns-repeated="16362"/>
        </table:table-row>
        <table:table-row table:style-name="ro3">
          <table:table-cell office:value-type="date" office:date-value="2016-11-30T00:00:00" table:style-name="ce4">
            <text:p>2016-11</text:p>
          </table:table-cell>
          <table:table-cell office:value-type="percentage" office:value="3.4174450000000002E-2" table:style-name="ce5">
            <text:p>3.42%</text:p>
          </table:table-cell>
          <table:table-cell office:value-type="percentage" office:value="8.2757376134395599E-2" table:style-name="ce5">
            <text:p>8.28%</text:p>
          </table:table-cell>
          <table:table-cell office:value-type="percentage" office:value="9.7057662904262501E-2" table:style-name="ce5">
            <text:p>9.71%</text:p>
          </table:table-cell>
          <table:table-cell office:value-type="percentage" office:value="0.136363595724106" table:style-name="ce5">
            <text:p>13.64%</text:p>
          </table:table-cell>
          <table:table-cell office:value-type="percentage" office:value="2.70687881857157E-2" table:style-name="ce5">
            <text:p>2.71%</text:p>
          </table:table-cell>
          <table:table-cell office:value-type="percentage" office:value="8.3976671099662795E-2" table:style-name="ce5">
            <text:p>8.40%</text:p>
          </table:table-cell>
          <table:table-cell office:value-type="percentage" office:value="0.135441228747368" table:style-name="ce5">
            <text:p>13.54%</text:p>
          </table:table-cell>
          <table:table-cell office:value-type="percentage" office:value="5.4871194064617199E-2" table:style-name="ce5">
            <text:p>5.49%</text:p>
          </table:table-cell>
          <table:table-cell office:value-type="percentage" office:value="5.2008438855409601E-2" table:style-name="ce5">
            <text:p>5.20%</text:p>
          </table:table-cell>
          <table:table-cell office:value-type="percentage" office:value="6.93710222840309E-2" table:style-name="ce5">
            <text:p>6.94%</text:p>
          </table:table-cell>
          <table:table-cell office:value-type="percentage" office:value="-6.3025563955307007E-2" table:style-name="ce5">
            <text:p>-6.30%</text:p>
          </table:table-cell>
          <table:table-cell office:value-type="percentage" office:value="3.6141052260063599E-4" table:style-name="ce5">
            <text:p>0.04%</text:p>
          </table:table-cell>
          <table:table-cell office:value-type="percentage" office:value="3.7533491849899299E-2" table:style-name="ce5">
            <text:p>3.75%</text:p>
          </table:table-cell>
          <table:table-cell office:value-type="percentage" office:value="4.9247648566961302E-2" table:style-name="ce5">
            <text:p>4.92%</text:p>
          </table:table-cell>
          <table:table-cell office:value-type="percentage" office:value="6.2217213213443798E-2" table:style-name="ce5">
            <text:p>6.22%</text:p>
          </table:table-cell>
          <table:table-cell office:value-type="percentage" office:value="-0.151957333087921" table:style-name="ce5">
            <text:p>-15.20%</text:p>
          </table:table-cell>
          <table:table-cell office:value-type="percentage" office:value="9.1696539893746393E-3" table:style-name="ce5">
            <text:p>0.92%</text:p>
          </table:table-cell>
          <table:table-cell office:value-type="percentage" office:value="0.10903356969356499" table:style-name="ce5">
            <text:p>10.90%</text:p>
          </table:table-cell>
          <table:table-cell office:value-type="percentage" office:value="-9.5961578190326705E-2" table:style-name="ce5">
            <text:p>-9.60%</text:p>
          </table:table-cell>
          <table:table-cell office:value-type="percentage" office:value="3.0083509162068402E-2" table:style-name="ce5">
            <text:p>3.01%</text:p>
          </table:table-cell>
          <table:table-cell office:value-type="percentage" office:value="-4.4296747073531203E-3" table:style-name="ce5">
            <text:p>-0.44%</text:p>
          </table:table-cell>
          <table:table-cell table:number-columns-repeated="16362"/>
        </table:table-row>
        <table:table-row table:style-name="ro3">
          <table:table-cell office:value-type="date" office:date-value="2016-12-30T00:00:00" table:style-name="ce4">
            <text:p>2016-12</text:p>
          </table:table-cell>
          <table:table-cell office:value-type="percentage" office:value="1.8200750000000002E-2" table:style-name="ce5">
            <text:p>1.82%</text:p>
          </table:table-cell>
          <table:table-cell office:value-type="percentage" office:value="-0.136269330978394" table:style-name="ce5">
            <text:p>-13.63%</text:p>
          </table:table-cell>
          <table:table-cell office:value-type="percentage" office:value="4.17975755408406E-3" table:style-name="ce5">
            <text:p>0.42%</text:p>
          </table:table-cell>
          <table:table-cell office:value-type="percentage" office:value="0.23272733390331299" table:style-name="ce5">
            <text:p>23.27%</text:p>
          </table:table-cell>
          <table:table-cell office:value-type="percentage" office:value="3.8403633981943103E-2" table:style-name="ce5">
            <text:p>3.84%</text:p>
          </table:table-cell>
          <table:table-cell office:value-type="percentage" office:value="-0.15177954733371701" table:style-name="ce5">
            <text:p>-15.18%</text:p>
          </table:table-cell>
          <table:table-cell office:value-type="percentage" office:value="-1.7309008166194E-2" table:style-name="ce5">
            <text:p>-1.73%</text:p>
          </table:table-cell>
          <table:table-cell office:value-type="percentage" office:value="7.0594474673271193E-2" table:style-name="ce5">
            <text:p>7.06%</text:p>
          </table:table-cell>
          <table:table-cell office:value-type="percentage" office:value="3.6173697561025599E-2" table:style-name="ce5">
            <text:p>3.62%</text:p>
          </table:table-cell>
          <table:table-cell office:value-type="percentage" office:value="5.9322018176317201E-2" table:style-name="ce5">
            <text:p>5.93%</text:p>
          </table:table-cell>
          <table:table-cell office:value-type="percentage" office:value="5.8119684457778903E-2" table:style-name="ce5">
            <text:p>5.81%</text:p>
          </table:table-cell>
          <table:table-cell office:value-type="percentage" office:value="-3.9017338305711802E-2" table:style-name="ce5">
            <text:p>-3.90%</text:p>
          </table:table-cell>
          <table:table-cell office:value-type="percentage" office:value="1.1812465265393301E-2" table:style-name="ce5">
            <text:p>1.18%</text:p>
          </table:table-cell>
          <table:table-cell office:value-type="percentage" office:value="-1.2266786769032499E-2" table:style-name="ce5">
            <text:p>-1.23%</text:p>
          </table:table-cell>
          <table:table-cell office:value-type="percentage" office:value="-1.3844572007656099E-2" table:style-name="ce5">
            <text:p>-1.38%</text:p>
          </table:table-cell>
          <table:table-cell office:value-type="percentage" office:value="-1.36574702337384E-2" table:style-name="ce5">
            <text:p>-1.37%</text:p>
          </table:table-cell>
          <table:table-cell office:value-type="percentage" office:value="-6.0574929229915099E-3" table:style-name="ce5">
            <text:p>-0.61%</text:p>
          </table:table-cell>
          <table:table-cell office:value-type="percentage" office:value="1.2187969405204101E-3" table:style-name="ce5">
            <text:p>0.12%</text:p>
          </table:table-cell>
          <table:table-cell office:value-type="percentage" office:value="-2.8457989916205399E-2" table:style-name="ce5">
            <text:p>-2.85%</text:p>
          </table:table-cell>
          <table:table-cell office:value-type="percentage" office:value="-0.118442431092262" table:style-name="ce5">
            <text:p>-11.84%</text:p>
          </table:table-cell>
          <table:table-cell office:value-type="percentage" office:value="-4.8943225294351599E-2" table:style-name="ce5">
            <text:p>-4.89%</text:p>
          </table:table-cell>
          <table:table-cell table:number-columns-repeated="16362"/>
        </table:table-row>
        <table:table-row table:style-name="ro3">
          <table:table-cell office:value-type="date" office:date-value="2017-01-31T00:00:00" table:style-name="ce4">
            <text:p>2017-01</text:p>
          </table:table-cell>
          <table:table-cell office:value-type="percentage" office:value="1.7884339999999999E-2" table:style-name="ce5">
            <text:p>1.79%</text:p>
          </table:table-cell>
          <table:table-cell office:value-type="percentage" office:value="-1.5540123917162399E-2" table:style-name="ce5">
            <text:p>-1.55%</text:p>
          </table:table-cell>
          <table:table-cell office:value-type="percentage" office:value="-1.04060652665794E-3" table:style-name="ce5">
            <text:p>-0.10%</text:p>
          </table:table-cell>
          <table:table-cell office:value-type="percentage" office:value="-8.5545763373374897E-2" table:style-name="ce5">
            <text:p>-8.55%</text:p>
          </table:table-cell>
          <table:table-cell office:value-type="percentage" office:value="-7.2517973603680697E-4" table:style-name="ce5">
            <text:p>-0.07%</text:p>
          </table:table-cell>
          <table:table-cell office:value-type="percentage" office:value="0.17246559262275701" table:style-name="ce5">
            <text:p>17.25%</text:p>
          </table:table-cell>
          <table:table-cell office:value-type="percentage" office:value="-4.7191698104143101E-2" table:style-name="ce5">
            <text:p>-4.72%</text:p>
          </table:table-cell>
          <table:table-cell office:value-type="percentage" office:value="7.4367681518197103E-3" table:style-name="ce5">
            <text:p>0.74%</text:p>
          </table:table-cell>
          <table:table-cell office:value-type="percentage" office:value="-7.8355327248573303E-2" table:style-name="ce5">
            <text:p>-7.84%</text:p>
          </table:table-cell>
          <table:table-cell office:value-type="percentage" office:value="6.1696413904428503E-2" table:style-name="ce5">
            <text:p>6.17%</text:p>
          </table:table-cell>
          <table:table-cell office:value-type="percentage" office:value="0.13659130036830899" table:style-name="ce5">
            <text:p>13.66%</text:p>
          </table:table-cell>
          <table:table-cell office:value-type="percentage" office:value="7.5939863920211806E-2" table:style-name="ce5">
            <text:p>7.59%</text:p>
          </table:table-cell>
          <table:table-cell office:value-type="percentage" office:value="3.4294072538614301E-2" table:style-name="ce5">
            <text:p>3.43%</text:p>
          </table:table-cell>
          <table:table-cell office:value-type="percentage" office:value="2.4255167692899701E-2" table:style-name="ce5">
            <text:p>2.43%</text:p>
          </table:table-cell>
          <table:table-cell office:value-type="percentage" office:value="6.4130455255508395E-2" table:style-name="ce5">
            <text:p>6.41%</text:p>
          </table:table-cell>
          <table:table-cell office:value-type="percentage" office:value="0.11354190856218301" table:style-name="ce5">
            <text:p>11.35%</text:p>
          </table:table-cell>
          <table:table-cell office:value-type="percentage" office:value="5.9294033795595197E-2" table:style-name="ce5">
            <text:p>5.93%</text:p>
          </table:table-cell>
          <table:table-cell office:value-type="percentage" office:value="8.8456086814403506E-2" table:style-name="ce5">
            <text:p>8.85%</text:p>
          </table:table-cell>
          <table:table-cell office:value-type="percentage" office:value="0.13272494077682501" table:style-name="ce5">
            <text:p>13.27%</text:p>
          </table:table-cell>
          <table:table-cell office:value-type="percentage" office:value="8.0981694161891896E-2" table:style-name="ce5">
            <text:p>8.10%</text:p>
          </table:table-cell>
          <table:table-cell office:value-type="percentage" office:value="1.5789499506354301E-2" table:style-name="ce5">
            <text:p>1.58%</text:p>
          </table:table-cell>
          <table:table-cell table:number-columns-repeated="16362"/>
        </table:table-row>
        <table:table-row table:style-name="ro3">
          <table:table-cell office:value-type="date" office:date-value="2017-02-28T00:00:00" table:style-name="ce4">
            <text:p>2017-02</text:p>
          </table:table-cell>
          <table:table-cell office:value-type="percentage" office:value="3.7198259999999997E-2" table:style-name="ce5">
            <text:p>3.72%</text:p>
          </table:table-cell>
          <table:table-cell office:value-type="percentage" office:value="7.0368754677474499E-3" table:style-name="ce5">
            <text:p>0.70%</text:p>
          </table:table-cell>
          <table:table-cell office:value-type="percentage" office:value="-8.7152719497680706E-2" table:style-name="ce5">
            <text:p>-8.72%</text:p>
          </table:table-cell>
          <table:table-cell office:value-type="percentage" office:value="5.1612854003906299E-2" table:style-name="ce5">
            <text:p>5.16%</text:p>
          </table:table-cell>
          <table:table-cell office:value-type="percentage" office:value="5.0072610378265402E-2" table:style-name="ce5">
            <text:p>5.01%</text:p>
          </table:table-cell>
          <table:table-cell office:value-type="percentage" office:value="-4.7126084566116298E-2" table:style-name="ce5">
            <text:p>-4.71%</text:p>
          </table:table-cell>
          <table:table-cell office:value-type="percentage" office:value="4.8482712358236299E-2" table:style-name="ce5">
            <text:p>4.85%</text:p>
          </table:table-cell>
          <table:table-cell office:value-type="percentage" office:value="-3.1988169997930499E-2" table:style-name="ce5">
            <text:p>-3.20%</text:p>
          </table:table-cell>
          <table:table-cell office:value-type="percentage" office:value="7.2390541434287997E-2" table:style-name="ce5">
            <text:p>7.24%</text:p>
          </table:table-cell>
          <table:table-cell office:value-type="percentage" office:value="-5.0610499456524901E-3" table:style-name="ce5">
            <text:p>-0.51%</text:p>
          </table:table-cell>
          <table:table-cell office:value-type="percentage" office:value="1.00916642695665E-2" table:style-name="ce5">
            <text:p>1.01%</text:p>
          </table:table-cell>
          <table:table-cell office:value-type="percentage" office:value="-7.3375608772039396E-3" table:style-name="ce5">
            <text:p>-0.73%</text:p>
          </table:table-cell>
          <table:table-cell office:value-type="percentage" office:value="1.4462075196206599E-2" table:style-name="ce5">
            <text:p>1.45%</text:p>
          </table:table-cell>
          <table:table-cell office:value-type="percentage" office:value="2.1005308255553301E-2" table:style-name="ce5">
            <text:p>2.10%</text:p>
          </table:table-cell>
          <table:table-cell office:value-type="percentage" office:value="7.1501515805721297E-2" table:style-name="ce5">
            <text:p>7.15%</text:p>
          </table:table-cell>
          <table:table-cell office:value-type="percentage" office:value="0.122357673943043" table:style-name="ce5">
            <text:p>12.24%</text:p>
          </table:table-cell>
          <table:table-cell office:value-type="percentage" office:value="3.6797311156988102E-2" table:style-name="ce5">
            <text:p>3.68%</text:p>
          </table:table-cell>
          <table:table-cell office:value-type="percentage" office:value="6.20689280331135E-2" table:style-name="ce5">
            <text:p>6.21%</text:p>
          </table:table-cell>
          <table:table-cell office:value-type="percentage" office:value="4.0055137127637898E-2" table:style-name="ce5">
            <text:p>4.01%</text:p>
          </table:table-cell>
          <table:table-cell office:value-type="percentage" office:value="-0.104994341731072" table:style-name="ce5">
            <text:p>-10.50%</text:p>
          </table:table-cell>
          <table:table-cell office:value-type="percentage" office:value="-6.96603879332542E-2" table:style-name="ce5">
            <text:p>-6.97%</text:p>
          </table:table-cell>
          <table:table-cell table:number-columns-repeated="16362"/>
        </table:table-row>
        <table:table-row table:style-name="ro3">
          <table:table-cell office:value-type="date" office:date-value="2017-03-31T00:00:00" table:style-name="ce4">
            <text:p>2017-03</text:p>
          </table:table-cell>
          <table:table-cell office:value-type="percentage" office:value="-3.8923020000000003E-4" table:style-name="ce5">
            <text:p>-0.04%</text:p>
          </table:table-cell>
          <table:table-cell office:value-type="percentage" office:value="9.1595821082591997E-2" table:style-name="ce5">
            <text:p>9.16%</text:p>
          </table:table-cell>
          <table:table-cell office:value-type="percentage" office:value="4.6405427157878897E-2" table:style-name="ce5">
            <text:p>4.64%</text:p>
          </table:table-cell>
          <table:table-cell office:value-type="percentage" office:value="0.16104295849800099" table:style-name="ce5">
            <text:p>16.10%</text:p>
          </table:table-cell>
          <table:table-cell office:value-type="percentage" office:value="0.27366966009139998" table:style-name="ce5">
            <text:p>27.37%</text:p>
          </table:table-cell>
          <table:table-cell office:value-type="percentage" office:value="0.191991671919823" table:style-name="ce5">
            <text:p>19.20%</text:p>
          </table:table-cell>
          <table:table-cell office:value-type="percentage" office:value="5.6886248290538802E-2" table:style-name="ce5">
            <text:p>5.69%</text:p>
          </table:table-cell>
          <table:table-cell office:value-type="percentage" office:value="0.11896289139985999" table:style-name="ce5">
            <text:p>11.90%</text:p>
          </table:table-cell>
          <table:table-cell office:value-type="percentage" office:value="0.159340709447861" table:style-name="ce5">
            <text:p>15.93%</text:p>
          </table:table-cell>
          <table:table-cell office:value-type="percentage" office:value="2.99755036830902E-2" table:style-name="ce5">
            <text:p>3.00%</text:p>
          </table:table-cell>
          <table:table-cell office:value-type="percentage" office:value="3.9963360875844997E-2" table:style-name="ce5">
            <text:p>4.00%</text:p>
          </table:table-cell>
          <table:table-cell office:value-type="percentage" office:value="6.89898282289505E-2" table:style-name="ce5">
            <text:p>6.90%</text:p>
          </table:table-cell>
          <table:table-cell office:value-type="percentage" office:value="1.14742666482925E-2" table:style-name="ce5">
            <text:p>1.15%</text:p>
          </table:table-cell>
          <table:table-cell office:value-type="percentage" office:value="0.11345899850130101" table:style-name="ce5">
            <text:p>11.35%</text:p>
          </table:table-cell>
          <table:table-cell office:value-type="percentage" office:value="6.4823634922504397E-2" table:style-name="ce5">
            <text:p>6.48%</text:p>
          </table:table-cell>
          <table:table-cell office:value-type="percentage" office:value="0.111455783247948" table:style-name="ce5">
            <text:p>11.15%</text:p>
          </table:table-cell>
          <table:table-cell office:value-type="percentage" office:value="3.4913256764411899E-2" table:style-name="ce5">
            <text:p>3.49%</text:p>
          </table:table-cell>
          <table:table-cell office:value-type="percentage" office:value="4.0189556777477299E-2" table:style-name="ce5">
            <text:p>4.02%</text:p>
          </table:table-cell>
          <table:table-cell office:value-type="percentage" office:value="4.8030175268650097E-2" table:style-name="ce5">
            <text:p>4.80%</text:p>
          </table:table-cell>
          <table:table-cell office:value-type="percentage" office:value="-5.1997501403093303E-2" table:style-name="ce5">
            <text:p>-5.20%</text:p>
          </table:table-cell>
          <table:table-cell office:value-type="percentage" office:value="1.0519807226955899E-2" table:style-name="ce5">
            <text:p>1.05%</text:p>
          </table:table-cell>
          <table:table-cell table:number-columns-repeated="16362"/>
        </table:table-row>
        <table:table-row table:style-name="ro3">
          <table:table-cell office:value-type="date" office:date-value="2017-04-28T00:00:00" table:style-name="ce4">
            <text:p>2017-04</text:p>
          </table:table-cell>
          <table:table-cell office:value-type="percentage" office:value="9.0912170000000004E-3" table:style-name="ce5">
            <text:p>0.91%</text:p>
          </table:table-cell>
          <table:table-cell office:value-type="percentage" office:value="3.3642929047346101E-2" table:style-name="ce5">
            <text:p>3.36%</text:p>
          </table:table-cell>
          <table:table-cell office:value-type="percentage" office:value="0.120802901685238" table:style-name="ce5">
            <text:p>12.08%</text:p>
          </table:table-cell>
          <table:table-cell office:value-type="percentage" office:value="1.05680720880628E-2" table:style-name="ce5">
            <text:p>1.06%</text:p>
          </table:table-cell>
          <table:table-cell office:value-type="percentage" office:value="2.7129265945404798E-3" table:style-name="ce5">
            <text:p>0.27%</text:p>
          </table:table-cell>
          <table:table-cell office:value-type="percentage" office:value="7.32920467853546E-2" table:style-name="ce5">
            <text:p>7.33%</text:p>
          </table:table-cell>
          <table:table-cell office:value-type="percentage" office:value="5.0047192722559003E-2" table:style-name="ce5">
            <text:p>5.00%</text:p>
          </table:table-cell>
          <table:table-cell office:value-type="percentage" office:value="3.04407123476267E-2" table:style-name="ce5">
            <text:p>3.04%</text:p>
          </table:table-cell>
          <table:table-cell office:value-type="percentage" office:value="-2.3697223514318501E-3" table:style-name="ce5">
            <text:p>-0.24%</text:p>
          </table:table-cell>
          <table:table-cell office:value-type="percentage" office:value="1.949024759233E-2" table:style-name="ce5">
            <text:p>1.95%</text:p>
          </table:table-cell>
          <table:table-cell office:value-type="percentage" office:value="2.9700286686420399E-2" table:style-name="ce5">
            <text:p>2.97%</text:p>
          </table:table-cell>
          <table:table-cell office:value-type="percentage" office:value="5.8939710259437603E-2" table:style-name="ce5">
            <text:p>5.89%</text:p>
          </table:table-cell>
          <table:table-cell office:value-type="percentage" office:value="-1.0656564496457599E-2" table:style-name="ce5">
            <text:p>-1.07%</text:p>
          </table:table-cell>
          <table:table-cell office:value-type="percentage" office:value="1.03149442002177E-2" table:style-name="ce5">
            <text:p>1.03%</text:p>
          </table:table-cell>
          <table:table-cell office:value-type="percentage" office:value="-3.5553511232137701E-2" table:style-name="ce5">
            <text:p>-3.56%</text:p>
          </table:table-cell>
          <table:table-cell office:value-type="percentage" office:value="4.79342043399811E-2" table:style-name="ce5">
            <text:p>4.79%</text:p>
          </table:table-cell>
          <table:table-cell office:value-type="percentage" office:value="5.9204682707786602E-2" table:style-name="ce5">
            <text:p>5.92%</text:p>
          </table:table-cell>
          <table:table-cell office:value-type="percentage" office:value="6.0401517897844301E-2" table:style-name="ce5">
            <text:p>6.04%</text:p>
          </table:table-cell>
          <table:table-cell office:value-type="percentage" office:value="5.7726129889488199E-2" table:style-name="ce5">
            <text:p>5.77%</text:p>
          </table:table-cell>
          <table:table-cell office:value-type="percentage" office:value="0.102341122925282" table:style-name="ce5">
            <text:p>10.23%</text:p>
          </table:table-cell>
          <table:table-cell office:value-type="percentage" office:value="0.14084503054618799" table:style-name="ce5">
            <text:p>14.08%</text:p>
          </table:table-cell>
          <table:table-cell table:number-columns-repeated="16362"/>
        </table:table-row>
        <table:table-row table:style-name="ro3">
          <table:table-cell office:value-type="date" office:date-value="2017-05-31T00:00:00" table:style-name="ce4">
            <text:p>2017-05</text:p>
          </table:table-cell>
          <table:table-cell office:value-type="percentage" office:value="1.157621E-2" table:style-name="ce5">
            <text:p>1.16%</text:p>
          </table:table-cell>
          <table:table-cell office:value-type="percentage" office:value="2.37327325157821E-3" table:style-name="ce5">
            <text:p>0.24%</text:p>
          </table:table-cell>
          <table:table-cell office:value-type="percentage" office:value="3.2888319343328497E-2" table:style-name="ce5">
            <text:p>3.29%</text:p>
          </table:table-cell>
          <table:table-cell office:value-type="percentage" office:value="8.4967322647571605E-2" table:style-name="ce5">
            <text:p>8.50%</text:p>
          </table:table-cell>
          <table:table-cell office:value-type="percentage" office:value="4.5995693653822001E-2" table:style-name="ce5">
            <text:p>4.60%</text:p>
          </table:table-cell>
          <table:table-cell office:value-type="percentage" office:value="5.0321068614721298E-2" table:style-name="ce5">
            <text:p>5.03%</text:p>
          </table:table-cell>
          <table:table-cell office:value-type="percentage" office:value="5.09586837142706E-3" table:style-name="ce5">
            <text:p>0.51%</text:p>
          </table:table-cell>
          <table:table-cell office:value-type="percentage" office:value="0.120370350778103" table:style-name="ce5">
            <text:p>12.04%</text:p>
          </table:table-cell>
          <table:table-cell office:value-type="percentage" office:value="2.3074323311448101E-2" table:style-name="ce5">
            <text:p>2.31%</text:p>
          </table:table-cell>
          <table:table-cell office:value-type="percentage" office:value="-6.6262945532798795E-2" table:style-name="ce5">
            <text:p>-6.63%</text:p>
          </table:table-cell>
          <table:table-cell office:value-type="percentage" office:value="7.1419253945350702E-2" table:style-name="ce5">
            <text:p>7.14%</text:p>
          </table:table-cell>
          <table:table-cell office:value-type="percentage" office:value="7.2450302541256006E-2" table:style-name="ce5">
            <text:p>7.25%</text:p>
          </table:table-cell>
          <table:table-cell office:value-type="percentage" office:value="-7.9221703112125397E-2" table:style-name="ce5">
            <text:p>-7.92%</text:p>
          </table:table-cell>
          <table:table-cell office:value-type="percentage" office:value="-3.15210409462452E-2" table:style-name="ce5">
            <text:p>-3.15%</text:p>
          </table:table-cell>
          <table:table-cell office:value-type="percentage" office:value="-4.7596845775842701E-2" table:style-name="ce5">
            <text:p>-4.76%</text:p>
          </table:table-cell>
          <table:table-cell office:value-type="percentage" office:value="0.12114836275577601" table:style-name="ce5">
            <text:p>12.11%</text:p>
          </table:table-cell>
          <table:table-cell office:value-type="percentage" office:value="0.195212006568909" table:style-name="ce5">
            <text:p>19.52%</text:p>
          </table:table-cell>
          <table:table-cell office:value-type="percentage" office:value="0.22100238502025599" table:style-name="ce5">
            <text:p>22.10%</text:p>
          </table:table-cell>
          <table:table-cell office:value-type="percentage" office:value="8.05328972637653E-3" table:style-name="ce5">
            <text:p>0.81%</text:p>
          </table:table-cell>
          <table:table-cell office:value-type="percentage" office:value="0.11165049672126801" table:style-name="ce5">
            <text:p>11.17%</text:p>
          </table:table-cell>
          <table:table-cell office:value-type="percentage" office:value="4.5625358819961603E-2" table:style-name="ce5">
            <text:p>4.56%</text:p>
          </table:table-cell>
          <table:table-cell table:number-columns-repeated="16362"/>
        </table:table-row>
        <table:table-row table:style-name="ro3">
          <table:table-cell office:value-type="date" office:date-value="2017-06-30T00:00:00" table:style-name="ce4">
            <text:p>2017-06</text:p>
          </table:table-cell>
          <table:table-cell office:value-type="percentage" office:value="4.8138319999999997E-3" table:style-name="ce5">
            <text:p>0.48%</text:p>
          </table:table-cell>
          <table:table-cell office:value-type="percentage" office:value="9.2846244573593098E-2" table:style-name="ce5">
            <text:p>9.28%</text:p>
          </table:table-cell>
          <table:table-cell office:value-type="percentage" office:value="-1.0088222101330801E-2" table:style-name="ce5">
            <text:p>-1.01%</text:p>
          </table:table-cell>
          <table:table-cell office:value-type="percentage" office:value="-3.6144576966762501E-2" table:style-name="ce5">
            <text:p>-3.61%</text:p>
          </table:table-cell>
          <table:table-cell office:value-type="percentage" office:value="0.10708741098642401" table:style-name="ce5">
            <text:p>10.71%</text:p>
          </table:table-cell>
          <table:table-cell office:value-type="percentage" office:value="4.2113427072763401E-2" table:style-name="ce5">
            <text:p>4.21%</text:p>
          </table:table-cell>
          <table:table-cell office:value-type="percentage" office:value="9.3349300324916798E-2" table:style-name="ce5">
            <text:p>9.33%</text:p>
          </table:table-cell>
          <table:table-cell office:value-type="percentage" office:value="-2.1645037457346899E-2" table:style-name="ce5">
            <text:p>-2.16%</text:p>
          </table:table-cell>
          <table:table-cell office:value-type="percentage" office:value="3.3167623914778198E-3" table:style-name="ce5">
            <text:p>0.33%</text:p>
          </table:table-cell>
          <table:table-cell office:value-type="percentage" office:value="-1.5656867995858199E-2" table:style-name="ce5">
            <text:p>-1.57%</text:p>
          </table:table-cell>
          <table:table-cell office:value-type="percentage" office:value="-8.3767727017402704E-2" table:style-name="ce5">
            <text:p>-8.38%</text:p>
          </table:table-cell>
          <table:table-cell office:value-type="percentage" office:value="1.04377148672938E-2" table:style-name="ce5">
            <text:p>1.04%</text:p>
          </table:table-cell>
          <table:table-cell office:value-type="percentage" office:value="-2.5283021852374101E-2" table:style-name="ce5">
            <text:p>-2.53%</text:p>
          </table:table-cell>
          <table:table-cell office:value-type="percentage" office:value="7.6249432750046297E-3" table:style-name="ce5">
            <text:p>0.76%</text:p>
          </table:table-cell>
          <table:table-cell office:value-type="percentage" office:value="3.9196955040097202E-3" table:style-name="ce5">
            <text:p>0.39%</text:p>
          </table:table-cell>
          <table:table-cell office:value-type="percentage" office:value="-1.7241414636373499E-2" table:style-name="ce5">
            <text:p>-1.72%</text:p>
          </table:table-cell>
          <table:table-cell office:value-type="percentage" office:value="-6.7149035632610293E-2" table:style-name="ce5">
            <text:p>-6.71%</text:p>
          </table:table-cell>
          <table:table-cell office:value-type="percentage" office:value="-4.3784216046333299E-2" table:style-name="ce5">
            <text:p>-4.38%</text:p>
          </table:table-cell>
          <table:table-cell office:value-type="percentage" office:value="-3.1692259944975402E-3" table:style-name="ce5">
            <text:p>-0.32%</text:p>
          </table:table-cell>
          <table:table-cell office:value-type="percentage" office:value="-2.4563256651163101E-2" table:style-name="ce5">
            <text:p>-2.46%</text:p>
          </table:table-cell>
          <table:table-cell office:value-type="percentage" office:value="-0.107802897691727" table:style-name="ce5">
            <text:p>-10.78%</text:p>
          </table:table-cell>
          <table:table-cell table:number-columns-repeated="16362"/>
        </table:table-row>
        <table:table-row table:style-name="ro3">
          <table:table-cell office:value-type="date" office:date-value="2017-07-31T00:00:00" table:style-name="ce4">
            <text:p>2017-07</text:p>
          </table:table-cell>
          <table:table-cell office:value-type="percentage" office:value="1.9348770000000001E-2" table:style-name="ce5">
            <text:p>1.93%</text:p>
          </table:table-cell>
          <table:table-cell office:value-type="percentage" office:value="-3.5686317831277903E-2" table:style-name="ce5">
            <text:p>-3.57%</text:p>
          </table:table-cell>
          <table:table-cell office:value-type="percentage" office:value="5.2412889897823299E-2" table:style-name="ce5">
            <text:p>5.24%</text:p>
          </table:table-cell>
          <table:table-cell office:value-type="percentage" office:value="1.99999809265137E-2" table:style-name="ce5">
            <text:p>2.00%</text:p>
          </table:table-cell>
          <table:table-cell office:value-type="percentage" office:value="-5.7943914085626602E-2" table:style-name="ce5">
            <text:p>-5.79%</text:p>
          </table:table-cell>
          <table:table-cell office:value-type="percentage" office:value="-3.5639718174934401E-2" table:style-name="ce5">
            <text:p>-3.56%</text:p>
          </table:table-cell>
          <table:table-cell office:value-type="percentage" office:value="2.04582642763853E-2" table:style-name="ce5">
            <text:p>2.05%</text:p>
          </table:table-cell>
          <table:table-cell office:value-type="percentage" office:value="1.0076582431793201E-2" table:style-name="ce5">
            <text:p>1.01%</text:p>
          </table:table-cell>
          <table:table-cell office:value-type="percentage" office:value="9.3884304165840204E-2" table:style-name="ce5">
            <text:p>9.39%</text:p>
          </table:table-cell>
          <table:table-cell office:value-type="percentage" office:value="4.1976474225521102E-2" table:style-name="ce5">
            <text:p>4.20%</text:p>
          </table:table-cell>
          <table:table-cell office:value-type="percentage" office:value="0.21584899723529799" table:style-name="ce5">
            <text:p>21.58%</text:p>
          </table:table-cell>
          <table:table-cell office:value-type="percentage" office:value="6.9440521299839006E-2" table:style-name="ce5">
            <text:p>6.94%</text:p>
          </table:table-cell>
          <table:table-cell office:value-type="percentage" office:value="-4.761902987957E-2" table:style-name="ce5">
            <text:p>-4.76%</text:p>
          </table:table-cell>
          <table:table-cell office:value-type="percentage" office:value="0.115896433591843" table:style-name="ce5">
            <text:p>11.59%</text:p>
          </table:table-cell>
          <table:table-cell office:value-type="percentage" office:value="3.8782473653554903E-2" table:style-name="ce5">
            <text:p>3.88%</text:p>
          </table:table-cell>
          <table:table-cell office:value-type="percentage" office:value="7.3128350079059601E-2" table:style-name="ce5">
            <text:p>7.31%</text:p>
          </table:table-cell>
          <table:table-cell office:value-type="percentage" office:value="0.104237578809261" table:style-name="ce5">
            <text:p>10.42%</text:p>
          </table:table-cell>
          <table:table-cell office:value-type="percentage" office:value="8.3129003643989605E-2" table:style-name="ce5">
            <text:p>8.31%</text:p>
          </table:table-cell>
          <table:table-cell office:value-type="percentage" office:value="0.121009439229965" table:style-name="ce5">
            <text:p>12.10%</text:p>
          </table:table-cell>
          <table:table-cell office:value-type="percentage" office:value="-9.9608317017555195E-2" table:style-name="ce5">
            <text:p>-9.96%</text:p>
          </table:table-cell>
          <table:table-cell office:value-type="percentage" office:value="5.0057586282491698E-2" table:style-name="ce5">
            <text:p>5.01%</text:p>
          </table:table-cell>
          <table:table-cell table:number-columns-repeated="16362"/>
        </table:table-row>
        <table:table-row table:style-name="ro3">
          <table:table-cell office:value-type="date" office:date-value="2017-08-31T00:00:00" table:style-name="ce4">
            <text:p>2017-08</text:p>
          </table:table-cell>
          <table:table-cell office:value-type="percentage" office:value="5.4649229999999998E-4" table:style-name="ce5">
            <text:p>0.05%</text:p>
          </table:table-cell>
          <table:table-cell office:value-type="percentage" office:value="9.7386538982391392E-3" table:style-name="ce5">
            <text:p>0.97%</text:p>
          </table:table-cell>
          <table:table-cell office:value-type="percentage" office:value="9.1098633129149697E-4" table:style-name="ce5">
            <text:p>0.09%</text:p>
          </table:table-cell>
          <table:table-cell office:value-type="percentage" office:value="0.127451002597809" table:style-name="ce5">
            <text:p>12.75%</text:p>
          </table:table-cell>
          <table:table-cell office:value-type="percentage" office:value="0.100694477558136" table:style-name="ce5">
            <text:p>10.07%</text:p>
          </table:table-cell>
          <table:table-cell office:value-type="percentage" office:value="7.8475408256053897E-2" table:style-name="ce5">
            <text:p>7.85%</text:p>
          </table:table-cell>
          <table:table-cell office:value-type="percentage" office:value="4.4640421867370599E-2" table:style-name="ce5">
            <text:p>4.46%</text:p>
          </table:table-cell>
          <table:table-cell office:value-type="percentage" office:value="5.5067881941795398E-2" table:style-name="ce5">
            <text:p>5.51%</text:p>
          </table:table-cell>
          <table:table-cell office:value-type="percentage" office:value="7.4947096407413497E-2" table:style-name="ce5">
            <text:p>7.49%</text:p>
          </table:table-cell>
          <table:table-cell office:value-type="percentage" office:value="-7.9414203763008104E-2" table:style-name="ce5">
            <text:p>-7.94%</text:p>
          </table:table-cell>
          <table:table-cell office:value-type="percentage" office:value="-3.8258265703916598E-2" table:style-name="ce5">
            <text:p>-3.83%</text:p>
          </table:table-cell>
          <table:table-cell office:value-type="percentage" office:value="7.2175972163677202E-2" table:style-name="ce5">
            <text:p>7.22%</text:p>
          </table:table-cell>
          <table:table-cell office:value-type="percentage" office:value="-9.7154520452022594E-2" table:style-name="ce5">
            <text:p>-9.72%</text:p>
          </table:table-cell>
          <table:table-cell office:value-type="percentage" office:value="-3.2814521342516001E-2" table:style-name="ce5">
            <text:p>-3.28%</text:p>
          </table:table-cell>
          <table:table-cell office:value-type="percentage" office:value="3.02457176148891E-2" table:style-name="ce5">
            <text:p>3.02%</text:p>
          </table:table-cell>
          <table:table-cell office:value-type="percentage" office:value="6.1184830963611603E-2" table:style-name="ce5">
            <text:p>6.12%</text:p>
          </table:table-cell>
          <table:table-cell office:value-type="percentage" office:value="4.07743901014328E-2" table:style-name="ce5">
            <text:p>4.08%</text:p>
          </table:table-cell>
          <table:table-cell office:value-type="percentage" office:value="0.230372384190559" table:style-name="ce5">
            <text:p>23.04%</text:p>
          </table:table-cell>
          <table:table-cell office:value-type="percentage" office:value="1.60709079355001E-2" table:style-name="ce5">
            <text:p>1.61%</text:p>
          </table:table-cell>
          <table:table-cell office:value-type="percentage" office:value="5.0963312387466403E-2" table:style-name="ce5">
            <text:p>5.10%</text:p>
          </table:table-cell>
          <table:table-cell office:value-type="percentage" office:value="0.19178082048893" table:style-name="ce5">
            <text:p>19.18%</text:p>
          </table:table-cell>
          <table:table-cell table:number-columns-repeated="16362"/>
        </table:table-row>
        <table:table-row table:style-name="ro3">
          <table:table-cell office:value-type="date" office:date-value="2017-09-29T00:00:00" table:style-name="ce4">
            <text:p>2017-09</text:p>
          </table:table-cell>
          <table:table-cell office:value-type="percentage" office:value="1.9302900000000001E-2" table:style-name="ce5">
            <text:p>1.93%</text:p>
          </table:table-cell>
          <table:table-cell office:value-type="percentage" office:value="4.3079964816570303E-2" table:style-name="ce5">
            <text:p>4.31%</text:p>
          </table:table-cell>
          <table:table-cell office:value-type="percentage" office:value="-7.8883171081543003E-3" table:style-name="ce5">
            <text:p>-0.79%</text:p>
          </table:table-cell>
          <table:table-cell office:value-type="percentage" office:value="0.115217372775078" table:style-name="ce5">
            <text:p>11.52%</text:p>
          </table:table-cell>
          <table:table-cell office:value-type="percentage" office:value="5.4078359156847E-2" table:style-name="ce5">
            <text:p>5.41%</text:p>
          </table:table-cell>
          <table:table-cell office:value-type="percentage" office:value="7.14439302682877E-2" table:style-name="ce5">
            <text:p>7.14%</text:p>
          </table:table-cell>
          <table:table-cell office:value-type="percentage" office:value="5.5271256715059301E-2" table:style-name="ce5">
            <text:p>5.53%</text:p>
          </table:table-cell>
          <table:table-cell office:value-type="percentage" office:value="-1.28593528643251E-2" table:style-name="ce5">
            <text:p>-1.29%</text:p>
          </table:table-cell>
          <table:table-cell office:value-type="percentage" office:value="0.11132974922657" table:style-name="ce5">
            <text:p>11.13%</text:p>
          </table:table-cell>
          <table:table-cell office:value-type="percentage" office:value="-2.5988116860389699E-2" table:style-name="ce5">
            <text:p>-2.60%</text:p>
          </table:table-cell>
          <table:table-cell office:value-type="percentage" office:value="3.8005832582712201E-2" table:style-name="ce5">
            <text:p>3.80%</text:p>
          </table:table-cell>
          <table:table-cell office:value-type="percentage" office:value="8.9839845895767198E-2" table:style-name="ce5">
            <text:p>8.98%</text:p>
          </table:table-cell>
          <table:table-cell office:value-type="percentage" office:value="-4.1422702372074099E-2" table:style-name="ce5">
            <text:p>-4.14%</text:p>
          </table:table-cell>
          <table:table-cell office:value-type="percentage" office:value="7.4820555746555302E-3" table:style-name="ce5">
            <text:p>0.75%</text:p>
          </table:table-cell>
          <table:table-cell office:value-type="percentage" office:value="8.5779815912246704E-2" table:style-name="ce5">
            <text:p>8.58%</text:p>
          </table:table-cell>
          <table:table-cell office:value-type="percentage" office:value="-1.6015794128179599E-2" table:style-name="ce5">
            <text:p>-1.60%</text:p>
          </table:table-cell>
          <table:table-cell office:value-type="percentage" office:value="-2.8312778100371399E-2" table:style-name="ce5">
            <text:p>-2.83%</text:p>
          </table:table-cell>
          <table:table-cell office:value-type="percentage" office:value="4.5403439551591901E-2" table:style-name="ce5">
            <text:p>4.54%</text:p>
          </table:table-cell>
          <table:table-cell office:value-type="percentage" office:value="-6.3964999280870004E-3" table:style-name="ce5">
            <text:p>-0.64%</text:p>
          </table:table-cell>
          <table:table-cell office:value-type="percentage" office:value="-2.3654056712985E-3" table:style-name="ce5">
            <text:p>-0.24%</text:p>
          </table:table-cell>
          <table:table-cell office:value-type="percentage" office:value="6.6206924617290497E-2" table:style-name="ce5">
            <text:p>6.62%</text:p>
          </table:table-cell>
          <table:table-cell table:number-columns-repeated="16362"/>
        </table:table-row>
        <table:table-row table:style-name="ro3">
          <table:table-cell office:value-type="date" office:date-value="2017-10-31T00:00:00" table:style-name="ce4">
            <text:p>2017-10</text:p>
          </table:table-cell>
          <table:table-cell office:value-type="percentage" office:value="2.2188179999999998E-2" table:style-name="ce5">
            <text:p>2.22%</text:p>
          </table:table-cell>
          <table:table-cell office:value-type="percentage" office:value="-1.2157146818935901E-2" table:style-name="ce5">
            <text:p>-1.22%</text:p>
          </table:table-cell>
          <table:table-cell office:value-type="percentage" office:value="-3.8048472255468403E-2" table:style-name="ce5">
            <text:p>-3.80%</text:p>
          </table:table-cell>
          <table:table-cell office:value-type="percentage" office:value="1.9493623403832299E-3" table:style-name="ce5">
            <text:p>0.19%</text:p>
          </table:table-cell>
          <table:table-cell office:value-type="percentage" office:value="0.11543398350477201" table:style-name="ce5">
            <text:p>11.54%</text:p>
          </table:table-cell>
          <table:table-cell office:value-type="percentage" office:value="-9.6024218946695293E-3" table:style-name="ce5">
            <text:p>-0.96%</text:p>
          </table:table-cell>
          <table:table-cell office:value-type="percentage" office:value="1.1396732181310701E-2" table:style-name="ce5">
            <text:p>1.14%</text:p>
          </table:table-cell>
          <table:table-cell office:value-type="percentage" office:value="0.12207295000553101" table:style-name="ce5">
            <text:p>12.21%</text:p>
          </table:table-cell>
          <table:table-cell office:value-type="percentage" office:value="0.12851004302501701" table:style-name="ce5">
            <text:p>12.85%</text:p>
          </table:table-cell>
          <table:table-cell office:value-type="percentage" office:value="-7.7102784998714898E-3" table:style-name="ce5">
            <text:p>-0.77%</text:p>
          </table:table-cell>
          <table:table-cell office:value-type="percentage" office:value="8.3154045045375796E-2" table:style-name="ce5">
            <text:p>8.32%</text:p>
          </table:table-cell>
          <table:table-cell office:value-type="percentage" office:value="5.2812756039202196E-3" table:style-name="ce5">
            <text:p>0.53%</text:p>
          </table:table-cell>
          <table:table-cell office:value-type="percentage" office:value="-0.113198764622212" table:style-name="ce5">
            <text:p>-11.32%</text:p>
          </table:table-cell>
          <table:table-cell office:value-type="percentage" office:value="4.0121421217918403E-2" table:style-name="ce5">
            <text:p>4.01%</text:p>
          </table:table-cell>
          <table:table-cell office:value-type="percentage" office:value="0.12653934955596899" table:style-name="ce5">
            <text:p>12.65%</text:p>
          </table:table-cell>
          <table:table-cell office:value-type="percentage" office:value="1.5191376209259E-2" table:style-name="ce5">
            <text:p>1.52%</text:p>
          </table:table-cell>
          <table:table-cell office:value-type="percentage" office:value="1.30442231893539E-2" table:style-name="ce5">
            <text:p>1.30%</text:p>
          </table:table-cell>
          <table:table-cell office:value-type="percentage" office:value="8.23632776737213E-2" table:style-name="ce5">
            <text:p>8.24%</text:p>
          </table:table-cell>
          <table:table-cell office:value-type="percentage" office:value="5.3783595561981201E-2" table:style-name="ce5">
            <text:p>5.38%</text:p>
          </table:table-cell>
          <table:table-cell office:value-type="percentage" office:value="0.222288072109222" table:style-name="ce5">
            <text:p>22.23%</text:p>
          </table:table-cell>
          <table:table-cell office:value-type="percentage" office:value="0.153083190321922" table:style-name="ce5">
            <text:p>15.31%</text:p>
          </table:table-cell>
          <table:table-cell table:number-columns-repeated="16362"/>
        </table:table-row>
        <table:table-row table:style-name="ro3">
          <table:table-cell office:value-type="date" office:date-value="2017-11-30T00:00:00" table:style-name="ce4">
            <text:p>2017-11</text:p>
          </table:table-cell>
          <table:table-cell office:value-type="percentage" office:value="2.8082599999999999E-2" table:style-name="ce5">
            <text:p>2.81%</text:p>
          </table:table-cell>
          <table:table-cell office:value-type="percentage" office:value="9.3247078359127003E-2" table:style-name="ce5">
            <text:p>9.32%</text:p>
          </table:table-cell>
          <table:table-cell office:value-type="percentage" office:value="8.8357210159301799E-2" table:style-name="ce5">
            <text:p>8.84%</text:p>
          </table:table-cell>
          <table:table-cell office:value-type="percentage" office:value="0.190661460161209" table:style-name="ce5">
            <text:p>19.07%</text:p>
          </table:table-cell>
          <table:table-cell office:value-type="percentage" office:value="0.10233806073665599" table:style-name="ce5">
            <text:p>10.23%</text:p>
          </table:table-cell>
          <table:table-cell office:value-type="percentage" office:value="7.5191512703895597E-2" table:style-name="ce5">
            <text:p>7.52%</text:p>
          </table:table-cell>
          <table:table-cell office:value-type="percentage" office:value="0.134116500616074" table:style-name="ce5">
            <text:p>13.41%</text:p>
          </table:table-cell>
          <table:table-cell office:value-type="percentage" office:value="9.1002389788627597E-2" table:style-name="ce5">
            <text:p>9.10%</text:p>
          </table:table-cell>
          <table:table-cell office:value-type="percentage" office:value="5.2006270736455897E-2" table:style-name="ce5">
            <text:p>5.20%</text:p>
          </table:table-cell>
          <table:table-cell office:value-type="percentage" office:value="7.1669586002826705E-2" table:style-name="ce5">
            <text:p>7.17%</text:p>
          </table:table-cell>
          <table:table-cell office:value-type="percentage" office:value="-4.5054171234369299E-2" table:style-name="ce5">
            <text:p>-4.51%</text:p>
          </table:table-cell>
          <table:table-cell office:value-type="percentage" office:value="3.6546420305967303E-2" table:style-name="ce5">
            <text:p>3.65%</text:p>
          </table:table-cell>
          <table:table-cell office:value-type="percentage" office:value="7.41532305255532E-3" table:style-name="ce5">
            <text:p>0.74%</text:p>
          </table:table-cell>
          <table:table-cell office:value-type="percentage" office:value="-2.71229445934296E-2" table:style-name="ce5">
            <text:p>-2.71%</text:p>
          </table:table-cell>
          <table:table-cell office:value-type="percentage" office:value="7.3878593742847401E-2" table:style-name="ce5">
            <text:p>7.39%</text:p>
          </table:table-cell>
          <table:table-cell office:value-type="percentage" office:value="-4.7182720154523898E-2" table:style-name="ce5">
            <text:p>-4.72%</text:p>
          </table:table-cell>
          <table:table-cell office:value-type="percentage" office:value="-0.11078595370054201" table:style-name="ce5">
            <text:p>-11.08%</text:p>
          </table:table-cell>
          <table:table-cell office:value-type="percentage" office:value="8.1337690353393607E-3" table:style-name="ce5">
            <text:p>0.81%</text:p>
          </table:table-cell>
          <table:table-cell office:value-type="percentage" office:value="-1.5994695946574201E-2" table:style-name="ce5">
            <text:p>-1.60%</text:p>
          </table:table-cell>
          <table:table-cell office:value-type="percentage" office:value="-1.9399084849283099E-3" table:style-name="ce5">
            <text:p>-0.19%</text:p>
          </table:table-cell>
          <table:table-cell office:value-type="percentage" office:value="9.9476434290409102E-2" table:style-name="ce5">
            <text:p>9.95%</text:p>
          </table:table-cell>
          <table:table-cell table:number-columns-repeated="16362"/>
        </table:table-row>
        <table:table-row table:style-name="ro3">
          <table:table-cell office:value-type="date" office:date-value="2017-12-29T00:00:00" table:style-name="ce4">
            <text:p>2017-12</text:p>
          </table:table-cell>
          <table:table-cell office:value-type="percentage" office:value="9.8316189999999998E-3" table:style-name="ce5">
            <text:p>0.98%</text:p>
          </table:table-cell>
          <table:table-cell office:value-type="percentage" office:value="1.34218065068126E-2" table:style-name="ce5">
            <text:p>1.34%</text:p>
          </table:table-cell>
          <table:table-cell office:value-type="percentage" office:value="-1.8171148374676701E-2" table:style-name="ce5">
            <text:p>-1.82%</text:p>
          </table:table-cell>
          <table:table-cell office:value-type="percentage" office:value="8.3333373069763197E-2" table:style-name="ce5">
            <text:p>8.33%</text:p>
          </table:table-cell>
          <table:table-cell office:value-type="percentage" office:value="8.9360214769840199E-2" table:style-name="ce5">
            <text:p>8.94%</text:p>
          </table:table-cell>
          <table:table-cell office:value-type="percentage" office:value="6.6485285758972196E-2" table:style-name="ce5">
            <text:p>6.65%</text:p>
          </table:table-cell>
          <table:table-cell office:value-type="percentage" office:value="-9.7872465848922695E-3" table:style-name="ce5">
            <text:p>-0.98%</text:p>
          </table:table-cell>
          <table:table-cell office:value-type="percentage" office:value="0.100658513605595" table:style-name="ce5">
            <text:p>10.07%</text:p>
          </table:table-cell>
          <table:table-cell office:value-type="percentage" office:value="-4.4960591942071901E-2" table:style-name="ce5">
            <text:p>-4.50%</text:p>
          </table:table-cell>
          <table:table-cell office:value-type="percentage" office:value="3.3676803112030002E-2" table:style-name="ce5">
            <text:p>3.37%</text:p>
          </table:table-cell>
          <table:table-cell office:value-type="percentage" office:value="2.33500637114048E-2" table:style-name="ce5">
            <text:p>2.34%</text:p>
          </table:table-cell>
          <table:table-cell office:value-type="percentage" office:value="-6.1921581625938402E-2" table:style-name="ce5">
            <text:p>-6.19%</text:p>
          </table:table-cell>
          <table:table-cell office:value-type="percentage" office:value="0.17665608227252999" table:style-name="ce5">
            <text:p>17.67%</text:p>
          </table:table-cell>
          <table:table-cell office:value-type="percentage" office:value="-2.6771234348416301E-2" table:style-name="ce5">
            <text:p>-2.68%</text:p>
          </table:table-cell>
          <table:table-cell office:value-type="percentage" office:value="7.7571086585521698E-2" table:style-name="ce5">
            <text:p>7.76%</text:p>
          </table:table-cell>
          <table:table-cell office:value-type="percentage" office:value="1.4743559993803499E-2" table:style-name="ce5">
            <text:p>1.47%</text:p>
          </table:table-cell>
          <table:table-cell office:value-type="percentage" office:value="-1.21297687292099E-2" table:style-name="ce5">
            <text:p>-1.21%</text:p>
          </table:table-cell>
          <table:table-cell office:value-type="percentage" office:value="-1.5867361798882498E-2" table:style-name="ce5">
            <text:p>-1.59%</text:p>
          </table:table-cell>
          <table:table-cell office:value-type="percentage" office:value="-4.0635848417878203E-3" table:style-name="ce5">
            <text:p>-0.41%</text:p>
          </table:table-cell>
          <table:table-cell office:value-type="percentage" office:value="0.16666668653488201" table:style-name="ce5">
            <text:p>16.67%</text:p>
          </table:table-cell>
          <table:table-cell office:value-type="percentage" office:value="6.4965985715389293E-2" table:style-name="ce5">
            <text:p>6.50%</text:p>
          </table:table-cell>
          <table:table-cell table:number-columns-repeated="16362"/>
        </table:table-row>
        <table:table-row table:style-name="ro3">
          <table:table-cell office:value-type="date" office:date-value="2018-01-31T00:00:00" table:style-name="ce4">
            <text:p>2018-01</text:p>
          </table:table-cell>
          <table:table-cell office:value-type="percentage" office:value="5.6178730000000003E-2" table:style-name="ce5">
            <text:p>5.62%</text:p>
          </table:table-cell>
          <table:table-cell office:value-type="percentage" office:value="0.115556180477142" table:style-name="ce5">
            <text:p>11.56%</text:p>
          </table:table-cell>
          <table:table-cell office:value-type="percentage" office:value="9.1644249856472002E-2" table:style-name="ce5">
            <text:p>9.16%</text:p>
          </table:table-cell>
          <table:table-cell office:value-type="percentage" office:value="4.2232207953929901E-2" table:style-name="ce5">
            <text:p>4.22%</text:p>
          </table:table-cell>
          <table:table-cell office:value-type="percentage" office:value="1.8512604758143401E-2" table:style-name="ce5">
            <text:p>1.85%</text:p>
          </table:table-cell>
          <table:table-cell office:value-type="percentage" office:value="-1.7794650048017498E-2" table:style-name="ce5">
            <text:p>-1.78%</text:p>
          </table:table-cell>
          <table:table-cell office:value-type="percentage" office:value="0.113021068274975" table:style-name="ce5">
            <text:p>11.30%</text:p>
          </table:table-cell>
          <table:table-cell office:value-type="percentage" office:value="0.1261056214571" table:style-name="ce5">
            <text:p>12.61%</text:p>
          </table:table-cell>
          <table:table-cell office:value-type="percentage" office:value="1.6510523855686202E-2" table:style-name="ce5">
            <text:p>1.65%</text:p>
          </table:table-cell>
          <table:table-cell office:value-type="percentage" office:value="1.07896570116282E-2" table:style-name="ce5">
            <text:p>1.08%</text:p>
          </table:table-cell>
          <table:table-cell office:value-type="percentage" office:value="0.40810573101043701" table:style-name="ce5">
            <text:p>40.81%</text:p>
          </table:table-cell>
          <table:table-cell office:value-type="percentage" office:value="5.8491934090852703E-2" table:style-name="ce5">
            <text:p>5.85%</text:p>
          </table:table-cell>
          <table:table-cell office:value-type="percentage" office:value="0.120196633040905" table:style-name="ce5">
            <text:p>12.02%</text:p>
          </table:table-cell>
          <table:table-cell office:value-type="percentage" office:value="2.3666067048907301E-2" table:style-name="ce5">
            <text:p>2.37%</text:p>
          </table:table-cell>
          <table:table-cell office:value-type="percentage" office:value="0.155984252691269" table:style-name="ce5">
            <text:p>15.60%</text:p>
          </table:table-cell>
          <table:table-cell office:value-type="percentage" office:value="0.170720115303993" table:style-name="ce5">
            <text:p>17.07%</text:p>
          </table:table-cell>
          <table:table-cell office:value-type="percentage" office:value="0.208452329039574" table:style-name="ce5">
            <text:p>20.85%</text:p>
          </table:table-cell>
          <table:table-cell office:value-type="percentage" office:value="0.15385316312313099" table:style-name="ce5">
            <text:p>15.39%</text:p>
          </table:table-cell>
          <table:table-cell office:value-type="percentage" office:value="5.9106834232807201E-2" table:style-name="ce5">
            <text:p>5.91%</text:p>
          </table:table-cell>
          <table:table-cell office:value-type="percentage" office:value="7.4968732893467005E-2" table:style-name="ce5">
            <text:p>7.50%</text:p>
          </table:table-cell>
          <table:table-cell office:value-type="percentage" office:value="0.115937374532223" table:style-name="ce5">
            <text:p>11.59%</text:p>
          </table:table-cell>
          <table:table-cell table:number-columns-repeated="16362"/>
        </table:table-row>
        <table:table-row table:style-name="ro3">
          <table:table-cell office:value-type="date" office:date-value="2018-02-28T00:00:00" table:style-name="ce4">
            <text:p>2018-02</text:p>
          </table:table-cell>
          <table:table-cell office:value-type="percentage" office:value="-3.8947379999999997E-2" table:style-name="ce5">
            <text:p>-3.89%</text:p>
          </table:table-cell>
          <table:table-cell office:value-type="percentage" office:value="-6.0758505016565302E-2" table:style-name="ce5">
            <text:p>-6.08%</text:p>
          </table:table-cell>
          <table:table-cell office:value-type="percentage" office:value="-6.0905382037162802E-2" table:style-name="ce5">
            <text:p>-6.09%</text:p>
          </table:table-cell>
          <table:table-cell office:value-type="percentage" office:value="-1.30246244370937E-2" table:style-name="ce5">
            <text:p>-1.30%</text:p>
          </table:table-cell>
          <table:table-cell office:value-type="percentage" office:value="-0.16609211266040799" table:style-name="ce5">
            <text:p>-16.61%</text:p>
          </table:table-cell>
          <table:table-cell office:value-type="percentage" office:value="1.4554041437804701E-2" table:style-name="ce5">
            <text:p>1.46%</text:p>
          </table:table-cell>
          <table:table-cell office:value-type="percentage" office:value="-3.0887559987604601E-3" table:style-name="ce5">
            <text:p>-0.31%</text:p>
          </table:table-cell>
          <table:table-cell office:value-type="percentage" office:value="-0.103623002767563" table:style-name="ce5">
            <text:p>-10.36%</text:p>
          </table:table-cell>
          <table:table-cell office:value-type="percentage" office:value="-7.3090471327304798E-2" table:style-name="ce5">
            <text:p>-7.31%</text:p>
          </table:table-cell>
          <table:table-cell office:value-type="percentage" office:value="-5.0703916698694201E-2" table:style-name="ce5">
            <text:p>-5.07%</text:p>
          </table:table-cell>
          <table:table-cell office:value-type="percentage" office:value="7.7987484633922605E-2" table:style-name="ce5">
            <text:p>7.80%</text:p>
          </table:table-cell>
          <table:table-cell office:value-type="percentage" office:value="-5.7701314799487599E-3" table:style-name="ce5">
            <text:p>-0.58%</text:p>
          </table:table-cell>
          <table:table-cell office:value-type="percentage" office:value="-2.9916234314441702E-2" table:style-name="ce5">
            <text:p>-2.99%</text:p>
          </table:table-cell>
          <table:table-cell office:value-type="percentage" office:value="0.13139362633228299" table:style-name="ce5">
            <text:p>13.14%</text:p>
          </table:table-cell>
          <table:table-cell office:value-type="percentage" office:value="7.9208008944988306E-2" table:style-name="ce5">
            <text:p>7.92%</text:p>
          </table:table-cell>
          <table:table-cell office:value-type="percentage" office:value="-1.34898154065013E-2" table:style-name="ce5">
            <text:p>-1.35%</text:p>
          </table:table-cell>
          <table:table-cell office:value-type="percentage" office:value="-2.5677395984530501E-2" table:style-name="ce5">
            <text:p>-2.57%</text:p>
          </table:table-cell>
          <table:table-cell office:value-type="percentage" office:value="-0.116838999092579" table:style-name="ce5">
            <text:p>-11.68%</text:p>
          </table:table-cell>
          <table:table-cell office:value-type="percentage" office:value="-4.58558090031147E-2" table:style-name="ce5">
            <text:p>-4.59%</text:p>
          </table:table-cell>
          <table:table-cell office:value-type="percentage" office:value="0.23440532386303001" table:style-name="ce5">
            <text:p>23.44%</text:p>
          </table:table-cell>
          <table:table-cell office:value-type="percentage" office:value="0.146250739693642" table:style-name="ce5">
            <text:p>14.63%</text:p>
          </table:table-cell>
          <table:table-cell table:number-columns-repeated="16362"/>
        </table:table-row>
        <table:table-row table:style-name="ro3">
          <table:table-cell office:value-type="date" office:date-value="2018-03-29T00:00:00" table:style-name="ce4">
            <text:p>2018-03</text:p>
          </table:table-cell>
          <table:table-cell office:value-type="percentage" office:value="-2.688451E-2" table:style-name="ce5">
            <text:p>-2.69%</text:p>
          </table:table-cell>
          <table:table-cell office:value-type="percentage" office:value="-2.1974458359181898E-3" table:style-name="ce5">
            <text:p>-0.22%</text:p>
          </table:table-cell>
          <table:table-cell office:value-type="percentage" office:value="2.65848934650421E-2" table:style-name="ce5">
            <text:p>2.66%</text:p>
          </table:table-cell>
          <table:table-cell office:value-type="percentage" office:value="-3.2258022576570497E-2" table:style-name="ce5">
            <text:p>-3.23%</text:p>
          </table:table-cell>
          <table:table-cell office:value-type="percentage" office:value="-1.31529644131661E-2" table:style-name="ce5">
            <text:p>-1.32%</text:p>
          </table:table-cell>
          <table:table-cell office:value-type="percentage" office:value="8.8716425001621302E-2" table:style-name="ce5">
            <text:p>8.87%</text:p>
          </table:table-cell>
          <table:table-cell office:value-type="percentage" office:value="-5.4802510887384401E-2" table:style-name="ce5">
            <text:p>-5.48%</text:p>
          </table:table-cell>
          <table:table-cell office:value-type="percentage" office:value="-9.8078019917011303E-2" table:style-name="ce5">
            <text:p>-9.81%</text:p>
          </table:table-cell>
          <table:table-cell office:value-type="percentage" office:value="1.4208233915269401E-3" table:style-name="ce5">
            <text:p>0.14%</text:p>
          </table:table-cell>
          <table:table-cell office:value-type="percentage" office:value="-2.6366820558905602E-2" table:style-name="ce5">
            <text:p>-2.64%</text:p>
          </table:table-cell>
          <table:table-cell office:value-type="percentage" office:value="1.36248236522079E-2" table:style-name="ce5">
            <text:p>1.36%</text:p>
          </table:table-cell>
          <table:table-cell office:value-type="percentage" office:value="-5.9374999254941899E-2" table:style-name="ce5">
            <text:p>-5.94%</text:p>
          </table:table-cell>
          <table:table-cell office:value-type="percentage" office:value="-0.118832215666771" table:style-name="ce5">
            <text:p>-11.88%</text:p>
          </table:table-cell>
          <table:table-cell office:value-type="percentage" office:value="6.5520317293703599E-3" table:style-name="ce5">
            <text:p>0.66%</text:p>
          </table:table-cell>
          <table:table-cell office:value-type="percentage" office:value="-5.29489666223526E-2" table:style-name="ce5">
            <text:p>-5.29%</text:p>
          </table:table-cell>
          <table:table-cell office:value-type="percentage" office:value="-7.2883881628513295E-2" table:style-name="ce5">
            <text:p>-7.29%</text:p>
          </table:table-cell>
          <table:table-cell office:value-type="percentage" office:value="-1.9886815920472201E-2" table:style-name="ce5">
            <text:p>-1.99%</text:p>
          </table:table-cell>
          <table:table-cell office:value-type="percentage" office:value="-0.12594980001449599" table:style-name="ce5">
            <text:p>-12.59%</text:p>
          </table:table-cell>
          <table:table-cell office:value-type="percentage" office:value="-0.103914387524128" table:style-name="ce5">
            <text:p>-10.39%</text:p>
          </table:table-cell>
          <table:table-cell office:value-type="percentage" office:value="-8.9453868567943601E-2" table:style-name="ce5">
            <text:p>-8.95%</text:p>
          </table:table-cell>
          <table:table-cell office:value-type="percentage" office:value="0.109612971544266" table:style-name="ce5">
            <text:p>10.96%</text:p>
          </table:table-cell>
          <table:table-cell table:number-columns-repeated="16362"/>
        </table:table-row>
        <table:table-row table:style-name="ro3">
          <table:table-cell office:value-type="date" office:date-value="2018-04-30T00:00:00" table:style-name="ce4">
            <text:p>2018-04</text:p>
          </table:table-cell>
          <table:table-cell office:value-type="percentage" office:value="2.7188009999999999E-3" table:style-name="ce5">
            <text:p>0.27%</text:p>
          </table:table-cell>
          <table:table-cell office:value-type="percentage" office:value="1.98887381702662E-2" table:style-name="ce5">
            <text:p>1.99%</text:p>
          </table:table-cell>
          <table:table-cell office:value-type="percentage" office:value="-0.102798409759998" table:style-name="ce5">
            <text:p>-10.28%</text:p>
          </table:table-cell>
          <table:table-cell office:value-type="percentage" office:value="0.227272734045982" table:style-name="ce5">
            <text:p>22.73%</text:p>
          </table:table-cell>
          <table:table-cell office:value-type="percentage" office:value="0.154226928949356" table:style-name="ce5">
            <text:p>15.42%</text:p>
          </table:table-cell>
          <table:table-cell office:value-type="percentage" office:value="2.1002423018217101E-2" table:style-name="ce5">
            <text:p>2.10%</text:p>
          </table:table-cell>
          <table:table-cell office:value-type="percentage" office:value="0.12517927587032299" table:style-name="ce5">
            <text:p>12.52%</text:p>
          </table:table-cell>
          <table:table-cell office:value-type="percentage" office:value="4.2372833937406498E-2" table:style-name="ce5">
            <text:p>4.24%</text:p>
          </table:table-cell>
          <table:table-cell office:value-type="percentage" office:value="8.7490882724523492E-3" table:style-name="ce5">
            <text:p>0.87%</text:p>
          </table:table-cell>
          <table:table-cell office:value-type="percentage" office:value="-1.0951872682198899E-3" table:style-name="ce5">
            <text:p>-0.11%</text:p>
          </table:table-cell>
          <table:table-cell office:value-type="percentage" office:value="5.7931218296289402E-2" table:style-name="ce5">
            <text:p>5.79%</text:p>
          </table:table-cell>
          <table:table-cell office:value-type="percentage" office:value="-6.3360184431076105E-2" table:style-name="ce5">
            <text:p>-6.34%</text:p>
          </table:table-cell>
          <table:table-cell office:value-type="percentage" office:value="0.103593058884144" table:style-name="ce5">
            <text:p>10.36%</text:p>
          </table:table-cell>
          <table:table-cell office:value-type="percentage" office:value="-1.1310002766549599E-2" table:style-name="ce5">
            <text:p>-1.13%</text:p>
          </table:table-cell>
          <table:table-cell office:value-type="percentage" office:value="0.10497091710567499" table:style-name="ce5">
            <text:p>10.50%</text:p>
          </table:table-cell>
          <table:table-cell office:value-type="percentage" office:value="-1.6454204916953999E-2" table:style-name="ce5">
            <text:p>-1.65%</text:p>
          </table:table-cell>
          <table:table-cell office:value-type="percentage" office:value="-2.68887709826231E-2" table:style-name="ce5">
            <text:p>-2.69%</text:p>
          </table:table-cell>
          <table:table-cell office:value-type="percentage" office:value="1.9738191738724702E-2" table:style-name="ce5">
            <text:p>1.97%</text:p>
          </table:table-cell>
          <table:table-cell office:value-type="percentage" office:value="7.64128342270851E-2" table:style-name="ce5">
            <text:p>7.64%</text:p>
          </table:table-cell>
          <table:table-cell office:value-type="percentage" office:value="4.48121055960655E-2" table:style-name="ce5">
            <text:p>4.48%</text:p>
          </table:table-cell>
          <table:table-cell office:value-type="percentage" office:value="6.0306038707494701E-2" table:style-name="ce5">
            <text:p>6.03%</text:p>
          </table:table-cell>
          <table:table-cell table:number-columns-repeated="16362"/>
        </table:table-row>
        <table:table-row table:style-name="ro3">
          <table:table-cell office:value-type="date" office:date-value="2018-05-31T00:00:00" table:style-name="ce4">
            <text:p>2018-05</text:p>
          </table:table-cell>
          <table:table-cell office:value-type="percentage" office:value="2.1608349999999998E-2" table:style-name="ce5">
            <text:p>2.16%</text:p>
          </table:table-cell>
          <table:table-cell office:value-type="percentage" office:value="9.9277220666408497E-2" table:style-name="ce5">
            <text:p>9.93%</text:p>
          </table:table-cell>
          <table:table-cell office:value-type="percentage" office:value="9.5482770120725003E-4" table:style-name="ce5">
            <text:p>0.10%</text:p>
          </table:table-cell>
          <table:table-cell office:value-type="percentage" office:value="0.116049401462078" table:style-name="ce5">
            <text:p>11.60%</text:p>
          </table:table-cell>
          <table:table-cell office:value-type="percentage" office:value="0.12438147515058499" table:style-name="ce5">
            <text:p>12.44%</text:p>
          </table:table-cell>
          <table:table-cell office:value-type="percentage" office:value="5.6769922375679002E-2" table:style-name="ce5">
            <text:p>5.68%</text:p>
          </table:table-cell>
          <table:table-cell office:value-type="percentage" office:value="9.0313136577606201E-2" table:style-name="ce5">
            <text:p>9.03%</text:p>
          </table:table-cell>
          <table:table-cell office:value-type="percentage" office:value="0.13670584559440599" table:style-name="ce5">
            <text:p>13.67%</text:p>
          </table:table-cell>
          <table:table-cell office:value-type="percentage" office:value="4.4069409370422398E-2" table:style-name="ce5">
            <text:p>4.41%</text:p>
          </table:table-cell>
          <table:table-cell office:value-type="percentage" office:value="-8.5717188194394094E-3" table:style-name="ce5">
            <text:p>-0.86%</text:p>
          </table:table-cell>
          <table:table-cell office:value-type="percentage" office:value="0.12526407837867701" table:style-name="ce5">
            <text:p>12.53%</text:p>
          </table:table-cell>
          <table:table-cell office:value-type="percentage" office:value="8.0060802400112194E-2" table:style-name="ce5">
            <text:p>8.01%</text:p>
          </table:table-cell>
          <table:table-cell office:value-type="percentage" office:value="-0.108245223760605" table:style-name="ce5">
            <text:p>-10.82%</text:p>
          </table:table-cell>
          <table:table-cell office:value-type="percentage" office:value="7.8265182673931094E-2" table:style-name="ce5">
            <text:p>7.83%</text:p>
          </table:table-cell>
          <table:table-cell office:value-type="percentage" office:value="0.454888105392456" table:style-name="ce5">
            <text:p>45.49%</text:p>
          </table:table-cell>
          <table:table-cell office:value-type="percentage" office:value="6.8726532161235795E-2" table:style-name="ce5">
            <text:p>6.87%</text:p>
          </table:table-cell>
          <table:table-cell office:value-type="percentage" office:value="0.109594844281673" table:style-name="ce5">
            <text:p>10.96%</text:p>
          </table:table-cell>
          <table:table-cell office:value-type="percentage" office:value="0.124059803783894" table:style-name="ce5">
            <text:p>12.41%</text:p>
          </table:table-cell>
          <table:table-cell office:value-type="percentage" office:value="0.114999994635582" table:style-name="ce5">
            <text:p>11.50%</text:p>
          </table:table-cell>
          <table:table-cell office:value-type="percentage" office:value="0.14483673870563499" table:style-name="ce5">
            <text:p>14.48%</text:p>
          </table:table-cell>
          <table:table-cell office:value-type="percentage" office:value="-0.12669773399829901" table:style-name="ce5">
            <text:p>-12.67%</text:p>
          </table:table-cell>
          <table:table-cell table:number-columns-repeated="16362"/>
        </table:table-row>
        <table:table-row table:style-name="ro3">
          <table:table-cell office:value-type="date" office:date-value="2018-06-29T00:00:00" table:style-name="ce4">
            <text:p>2018-06</text:p>
          </table:table-cell>
          <table:table-cell office:value-type="percentage" office:value="4.8424000000000002E-3" table:style-name="ce5">
            <text:p>0.48%</text:p>
          </table:table-cell>
          <table:table-cell office:value-type="percentage" office:value="-4.3418928980827297E-2" table:style-name="ce5">
            <text:p>-4.34%</text:p>
          </table:table-cell>
          <table:table-cell office:value-type="percentage" office:value="-7.3131956160068498E-2" table:style-name="ce5">
            <text:p>-7.31%</text:p>
          </table:table-cell>
          <table:table-cell office:value-type="percentage" office:value="-0.13495579361915599" table:style-name="ce5">
            <text:p>-13.50%</text:p>
          </table:table-cell>
          <table:table-cell office:value-type="percentage" office:value="-1.43779823556542E-2" table:style-name="ce5">
            <text:p>-1.44%</text:p>
          </table:table-cell>
          <table:table-cell office:value-type="percentage" office:value="-0.146268039941788" table:style-name="ce5">
            <text:p>-14.63%</text:p>
          </table:table-cell>
          <table:table-cell office:value-type="percentage" office:value="-9.6860183402895893E-3" table:style-name="ce5">
            <text:p>-0.97%</text:p>
          </table:table-cell>
          <table:table-cell office:value-type="percentage" office:value="-8.0264903604984297E-2" table:style-name="ce5">
            <text:p>-8.03%</text:p>
          </table:table-cell>
          <table:table-cell office:value-type="percentage" office:value="-1.10013848170638E-2" table:style-name="ce5">
            <text:p>-1.10%</text:p>
          </table:table-cell>
          <table:table-cell office:value-type="percentage" office:value="5.3684491664171198E-2" table:style-name="ce5">
            <text:p>5.37%</text:p>
          </table:table-cell>
          <table:table-cell office:value-type="percentage" office:value="0.11328209936618799" table:style-name="ce5">
            <text:p>11.33%</text:p>
          </table:table-cell>
          <table:table-cell office:value-type="percentage" office:value="0.139338463544846" table:style-name="ce5">
            <text:p>13.93%</text:p>
          </table:table-cell>
          <table:table-cell office:value-type="percentage" office:value="0.30393549799919101" table:style-name="ce5">
            <text:p>30.39%</text:p>
          </table:table-cell>
          <table:table-cell office:value-type="percentage" office:value="0.183750540018082" table:style-name="ce5">
            <text:p>18.38%</text:p>
          </table:table-cell>
          <table:table-cell office:value-type="percentage" office:value="0.25997582077980003" table:style-name="ce5">
            <text:p>26.00%</text:p>
          </table:table-cell>
          <table:table-cell office:value-type="percentage" office:value="7.6293833553791102E-2" table:style-name="ce5">
            <text:p>7.63%</text:p>
          </table:table-cell>
          <table:table-cell office:value-type="percentage" office:value="7.7228635549545302E-2" table:style-name="ce5">
            <text:p>7.72%</text:p>
          </table:table-cell>
          <table:table-cell office:value-type="percentage" office:value="5.6031394749879802E-2" table:style-name="ce5">
            <text:p>5.60%</text:p>
          </table:table-cell>
          <table:table-cell office:value-type="percentage" office:value="1.32443867623806E-2" table:style-name="ce5">
            <text:p>1.32%</text:p>
          </table:table-cell>
          <table:table-cell office:value-type="percentage" office:value="0.25850135087966902" table:style-name="ce5">
            <text:p>25.85%</text:p>
          </table:table-cell>
          <table:table-cell office:value-type="percentage" office:value="-5.8566216379404103E-2" table:style-name="ce5">
            <text:p>-5.86%</text:p>
          </table:table-cell>
          <table:table-cell table:number-columns-repeated="16362"/>
        </table:table-row>
        <table:table-row table:style-name="ro3">
          <table:table-cell office:value-type="date" office:date-value="2018-07-31T00:00:00" table:style-name="ce4">
            <text:p>2018-07</text:p>
          </table:table-cell>
          <table:table-cell office:value-type="percentage" office:value="3.6021589999999999E-2" table:style-name="ce5">
            <text:p>3.60%</text:p>
          </table:table-cell>
          <table:table-cell office:value-type="percentage" office:value="-5.84075301885605E-2" table:style-name="ce5">
            <text:p>-5.84%</text:p>
          </table:table-cell>
          <table:table-cell office:value-type="percentage" office:value="8.0606274306774098E-2" table:style-name="ce5">
            <text:p>8.06%</text:p>
          </table:table-cell>
          <table:table-cell office:value-type="percentage" office:value="9.5907934010028797E-2" table:style-name="ce5">
            <text:p>9.59%</text:p>
          </table:table-cell>
          <table:table-cell office:value-type="percentage" office:value="-4.58470061421394E-2" table:style-name="ce5">
            <text:p>-4.58%</text:p>
          </table:table-cell>
          <table:table-cell office:value-type="percentage" office:value="-3.34646576084197E-3" table:style-name="ce5">
            <text:p>-0.33%</text:p>
          </table:table-cell>
          <table:table-cell office:value-type="percentage" office:value="-3.5581745207309702E-2" table:style-name="ce5">
            <text:p>-3.56%</text:p>
          </table:table-cell>
          <table:table-cell office:value-type="percentage" office:value="7.7611036598682404E-2" table:style-name="ce5">
            <text:p>7.76%</text:p>
          </table:table-cell>
          <table:table-cell office:value-type="percentage" office:value="8.2179315388202695E-2" table:style-name="ce5">
            <text:p>8.22%</text:p>
          </table:table-cell>
          <table:table-cell office:value-type="percentage" office:value="9.1498903930187198E-2" table:style-name="ce5">
            <text:p>9.15%</text:p>
          </table:table-cell>
          <table:table-cell office:value-type="percentage" office:value="-0.13790455460548401" table:style-name="ce5">
            <text:p>-13.79%</text:p>
          </table:table-cell>
          <table:table-cell office:value-type="percentage" office:value="1.46180586889386E-2" table:style-name="ce5">
            <text:p>1.46%</text:p>
          </table:table-cell>
          <table:table-cell office:value-type="percentage" office:value="-3.34545485675335E-2" table:style-name="ce5">
            <text:p>-3.35%</text:p>
          </table:table-cell>
          <table:table-cell office:value-type="percentage" office:value="6.4153913408517803E-3" table:style-name="ce5">
            <text:p>0.64%</text:p>
          </table:table-cell>
          <table:table-cell office:value-type="percentage" office:value="8.6377382278442397E-2" table:style-name="ce5">
            <text:p>8.64%</text:p>
          </table:table-cell>
          <table:table-cell office:value-type="percentage" office:value="-3.7997923791408497E-2" table:style-name="ce5">
            <text:p>-3.80%</text:p>
          </table:table-cell>
          <table:table-cell office:value-type="percentage" office:value="-8.7008960545063005E-2" table:style-name="ce5">
            <text:p>-8.70%</text:p>
          </table:table-cell>
          <table:table-cell office:value-type="percentage" office:value="-4.5116625726222999E-2" table:style-name="ce5">
            <text:p>-4.51%</text:p>
          </table:table-cell>
          <table:table-cell office:value-type="percentage" office:value="-0.111877337098122" table:style-name="ce5">
            <text:p>-11.19%</text:p>
          </table:table-cell>
          <table:table-cell office:value-type="percentage" office:value="-0.27020832896232599" table:style-name="ce5">
            <text:p>-27.02%</text:p>
          </table:table-cell>
          <table:table-cell office:value-type="percentage" office:value="-6.7630425095558194E-2" table:style-name="ce5">
            <text:p>-6.76%</text:p>
          </table:table-cell>
          <table:table-cell table:number-columns-repeated="16362"/>
        </table:table-row>
        <table:table-row table:style-name="ro3">
          <table:table-cell office:value-type="date" office:date-value="2018-08-31T00:00:00" table:style-name="ce4">
            <text:p>2018-08</text:p>
          </table:table-cell>
          <table:table-cell office:value-type="percentage" office:value="3.026322E-2" table:style-name="ce5">
            <text:p>3.03%</text:p>
          </table:table-cell>
          <table:table-cell office:value-type="percentage" office:value="-9.0125218033790602E-2" table:style-name="ce5">
            <text:p>-9.01%</text:p>
          </table:table-cell>
          <table:table-cell office:value-type="percentage" office:value="-7.5868695974350003E-2" table:style-name="ce5">
            <text:p>-7.59%</text:p>
          </table:table-cell>
          <table:table-cell office:value-type="percentage" office:value="0.121353581547737" table:style-name="ce5">
            <text:p>12.14%</text:p>
          </table:table-cell>
          <table:table-cell office:value-type="percentage" office:value="7.5195007026195498E-2" table:style-name="ce5">
            <text:p>7.52%</text:p>
          </table:table-cell>
          <table:table-cell office:value-type="percentage" office:value="-0.106067888438702" table:style-name="ce5">
            <text:p>-10.61%</text:p>
          </table:table-cell>
          <table:table-cell office:value-type="percentage" office:value="-1.1715355329215501E-2" table:style-name="ce5">
            <text:p>-1.17%</text:p>
          </table:table-cell>
          <table:table-cell office:value-type="percentage" office:value="-2.4899607524275801E-2" table:style-name="ce5">
            <text:p>-2.49%</text:p>
          </table:table-cell>
          <table:table-cell office:value-type="percentage" office:value="-1.3006061315536501E-2" table:style-name="ce5">
            <text:p>-1.30%</text:p>
          </table:table-cell>
          <table:table-cell office:value-type="percentage" office:value="-1.35611211881042E-2" table:style-name="ce5">
            <text:p>-1.36%</text:p>
          </table:table-cell>
          <table:table-cell office:value-type="percentage" office:value="8.9583583176136003E-2" table:style-name="ce5">
            <text:p>8.96%</text:p>
          </table:table-cell>
          <table:table-cell office:value-type="percentage" office:value="8.1169139593839697E-3" table:style-name="ce5">
            <text:p>0.81%</text:p>
          </table:table-cell>
          <table:table-cell office:value-type="percentage" office:value="4.7027841210365302E-2" table:style-name="ce5">
            <text:p>4.70%</text:p>
          </table:table-cell>
          <table:table-cell office:value-type="percentage" office:value="-3.2801557332277298E-2" table:style-name="ce5">
            <text:p>-3.28%</text:p>
          </table:table-cell>
          <table:table-cell office:value-type="percentage" office:value="0.104917243123055" table:style-name="ce5">
            <text:p>10.49%</text:p>
          </table:table-cell>
          <table:table-cell office:value-type="percentage" office:value="-1.7978748306632E-2" table:style-name="ce5">
            <text:p>-1.80%</text:p>
          </table:table-cell>
          <table:table-cell office:value-type="percentage" office:value="-0.11914560198783899" table:style-name="ce5">
            <text:p>-11.91%</text:p>
          </table:table-cell>
          <table:table-cell office:value-type="percentage" office:value="0.181737765669823" table:style-name="ce5">
            <text:p>18.17%</text:p>
          </table:table-cell>
          <table:table-cell office:value-type="percentage" office:value="1.8252369016408899E-2" table:style-name="ce5">
            <text:p>1.83%</text:p>
          </table:table-cell>
          <table:table-cell office:value-type="percentage" office:value="0.103859409689903" table:style-name="ce5">
            <text:p>10.39%</text:p>
          </table:table-cell>
          <table:table-cell office:value-type="percentage" office:value="0.385658919811249" table:style-name="ce5">
            <text:p>38.57%</text:p>
          </table:table-cell>
          <table:table-cell table:number-columns-repeated="16362"/>
        </table:table-row>
        <table:table-row table:style-name="ro3">
          <table:table-cell office:value-type="date" office:date-value="2018-09-28T00:00:00" table:style-name="ce4">
            <text:p>2018-09</text:p>
          </table:table-cell>
          <table:table-cell office:value-type="percentage" office:value="4.2943010000000004E-3" table:style-name="ce5">
            <text:p>0.43%</text:p>
          </table:table-cell>
          <table:table-cell office:value-type="percentage" office:value="-8.1626363098621396E-2" table:style-name="ce5">
            <text:p>-8.16%</text:p>
          </table:table-cell>
          <table:table-cell office:value-type="percentage" office:value="-3.3114865422248799E-2" table:style-name="ce5">
            <text:p>-3.31%</text:p>
          </table:table-cell>
          <table:table-cell office:value-type="percentage" office:value="1.14463940262795E-2" table:style-name="ce5">
            <text:p>1.14%</text:p>
          </table:table-cell>
          <table:table-cell office:value-type="percentage" office:value="-4.4689521193504299E-2" table:style-name="ce5">
            <text:p>-4.47%</text:p>
          </table:table-cell>
          <table:table-cell office:value-type="percentage" office:value="-0.143454223871231" table:style-name="ce5">
            <text:p>-14.35%</text:p>
          </table:table-cell>
          <table:table-cell office:value-type="percentage" office:value="-1.7338972538709599E-2" table:style-name="ce5">
            <text:p>-1.73%</text:p>
          </table:table-cell>
          <table:table-cell office:value-type="percentage" office:value="-6.8918168544769301E-2" table:style-name="ce5">
            <text:p>-6.89%</text:p>
          </table:table-cell>
          <table:table-cell office:value-type="percentage" office:value="-3.4006346017122303E-2" table:style-name="ce5">
            <text:p>-3.40%</text:p>
          </table:table-cell>
          <table:table-cell office:value-type="percentage" office:value="4.3920781463384601E-2" table:style-name="ce5">
            <text:p>4.39%</text:p>
          </table:table-cell>
          <table:table-cell office:value-type="percentage" office:value="1.7542460933327699E-2" table:style-name="ce5">
            <text:p>1.75%</text:p>
          </table:table-cell>
          <table:table-cell office:value-type="percentage" office:value="9.6417084336280795E-2" table:style-name="ce5">
            <text:p>9.64%</text:p>
          </table:table-cell>
          <table:table-cell office:value-type="percentage" office:value="0.14983831346035001" table:style-name="ce5">
            <text:p>14.98%</text:p>
          </table:table-cell>
          <table:table-cell office:value-type="percentage" office:value="4.4313456863164902E-2" table:style-name="ce5">
            <text:p>4.43%</text:p>
          </table:table-cell>
          <table:table-cell office:value-type="percentage" office:value="0.107996791601181" table:style-name="ce5">
            <text:p>10.80%</text:p>
          </table:table-cell>
          <table:table-cell office:value-type="percentage" office:value="0.15381421148777" table:style-name="ce5">
            <text:p>15.38%</text:p>
          </table:table-cell>
          <table:table-cell office:value-type="percentage" office:value="6.2428303062915802E-2" table:style-name="ce5">
            <text:p>6.24%</text:p>
          </table:table-cell>
          <table:table-cell office:value-type="percentage" office:value="3.3168673515319803E-2" table:style-name="ce5">
            <text:p>3.32%</text:p>
          </table:table-cell>
          <table:table-cell office:value-type="percentage" office:value="-6.41324147582054E-2" table:style-name="ce5">
            <text:p>-6.41%</text:p>
          </table:table-cell>
          <table:table-cell office:value-type="percentage" office:value="-0.19101765751838701" table:style-name="ce5">
            <text:p>-19.10%</text:p>
          </table:table-cell>
          <table:table-cell office:value-type="percentage" office:value="0.15704296529293099" table:style-name="ce5">
            <text:p>15.70%</text:p>
          </table:table-cell>
          <table:table-cell table:number-columns-repeated="16362"/>
        </table:table-row>
        <table:table-row table:style-name="ro3">
          <table:table-cell office:value-type="date" office:date-value="2018-10-31T00:00:00" table:style-name="ce4">
            <text:p>2018-10</text:p>
          </table:table-cell>
          <table:table-cell office:value-type="percentage" office:value="-6.9403359999999997E-2" table:style-name="ce5">
            <text:p>-6.94%</text:p>
          </table:table-cell>
          <table:table-cell office:value-type="percentage" office:value="-0.13989554345607799" table:style-name="ce5">
            <text:p>-13.99%</text:p>
          </table:table-cell>
          <table:table-cell office:value-type="percentage" office:value="-4.4070210307836498E-2" table:style-name="ce5">
            <text:p>-4.41%</text:p>
          </table:table-cell>
          <table:table-cell office:value-type="percentage" office:value="-0.24897116422653201" table:style-name="ce5">
            <text:p>-24.90%</text:p>
          </table:table-cell>
          <table:table-cell office:value-type="percentage" office:value="-0.26245436072349598" table:style-name="ce5">
            <text:p>-26.25%</text:p>
          </table:table-cell>
          <table:table-cell office:value-type="percentage" office:value="-0.20824806392192799" table:style-name="ce5">
            <text:p>-20.82%</text:p>
          </table:table-cell>
          <table:table-cell office:value-type="percentage" office:value="-0.101152360439301" table:style-name="ce5">
            <text:p>-10.12%</text:p>
          </table:table-cell>
          <table:table-cell office:value-type="percentage" office:value="-0.215361878275871" table:style-name="ce5">
            <text:p>-21.54%</text:p>
          </table:table-cell>
          <table:table-cell office:value-type="percentage" office:value="-0.146974697709084" table:style-name="ce5">
            <text:p>-14.70%</text:p>
          </table:table-cell>
          <table:table-cell office:value-type="percentage" office:value="-1.8043445423245399E-2" table:style-name="ce5">
            <text:p>-1.80%</text:p>
          </table:table-cell>
          <table:table-cell office:value-type="percentage" office:value="-0.19338199496269201" table:style-name="ce5">
            <text:p>-19.34%</text:p>
          </table:table-cell>
          <table:table-cell office:value-type="percentage" office:value="-3.9838477969169603E-2" table:style-name="ce5">
            <text:p>-3.98%</text:p>
          </table:table-cell>
          <table:table-cell office:value-type="percentage" office:value="1.21874809265137E-2" table:style-name="ce5">
            <text:p>1.22%</text:p>
          </table:table-cell>
          <table:table-cell office:value-type="percentage" office:value="-0.12273249775171299" table:style-name="ce5">
            <text:p>-12.27%</text:p>
          </table:table-cell>
          <table:table-cell office:value-type="percentage" office:value="-0.24956069886684401" table:style-name="ce5">
            <text:p>-24.96%</text:p>
          </table:table-cell>
          <table:table-cell office:value-type="percentage" office:value="-0.16997234523296401" table:style-name="ce5">
            <text:p>-17.00%</text:p>
          </table:table-cell>
          <table:table-cell office:value-type="percentage" office:value="-0.24491654336452501" table:style-name="ce5">
            <text:p>-24.49%</text:p>
          </table:table-cell>
          <table:table-cell office:value-type="percentage" office:value="-6.6091820597648607E-2" table:style-name="ce5">
            <text:p>-6.61%</text:p>
          </table:table-cell>
          <table:table-cell office:value-type="percentage" office:value="-7.7040091156959506E-2" table:style-name="ce5">
            <text:p>-7.70%</text:p>
          </table:table-cell>
          <table:table-cell office:value-type="percentage" office:value="0.22101198136806499" table:style-name="ce5">
            <text:p>22.10%</text:p>
          </table:table-cell>
          <table:table-cell office:value-type="percentage" office:value="-0.106889978051186" table:style-name="ce5">
            <text:p>-10.69%</text:p>
          </table:table-cell>
          <table:table-cell table:number-columns-repeated="16362"/>
        </table:table-row>
        <table:table-row table:style-name="ro3">
          <table:table-cell office:value-type="date" office:date-value="2018-11-30T00:00:00" table:style-name="ce4">
            <text:p>2018-11</text:p>
          </table:table-cell>
          <table:table-cell office:value-type="percentage" office:value="1.7859380000000001E-2" table:style-name="ce5">
            <text:p>1.79%</text:p>
          </table:table-cell>
          <table:table-cell office:value-type="percentage" office:value="7.6621592044830295E-2" table:style-name="ce5">
            <text:p>7.66%</text:p>
          </table:table-cell>
          <table:table-cell office:value-type="percentage" office:value="1.0494707152247399E-2" table:style-name="ce5">
            <text:p>1.05%</text:p>
          </table:table-cell>
          <table:table-cell office:value-type="percentage" office:value="0.20493149757385301" table:style-name="ce5">
            <text:p>20.49%</text:p>
          </table:table-cell>
          <table:table-cell office:value-type="percentage" office:value="-8.9373968541622203E-2" table:style-name="ce5">
            <text:p>-8.94%</text:p>
          </table:table-cell>
          <table:table-cell office:value-type="percentage" office:value="9.4930447638034807E-2" table:style-name="ce5">
            <text:p>9.49%</text:p>
          </table:table-cell>
          <table:table-cell office:value-type="percentage" office:value="0.112775966525078" table:style-name="ce5">
            <text:p>11.28%</text:p>
          </table:table-cell>
          <table:table-cell office:value-type="percentage" office:value="-6.5512038767337799E-2" table:style-name="ce5">
            <text:p>-6.55%</text:p>
          </table:table-cell>
          <table:table-cell office:value-type="percentage" office:value="3.1725548207759899E-2" table:style-name="ce5">
            <text:p>3.17%</text:p>
          </table:table-cell>
          <table:table-cell office:value-type="percentage" office:value="5.7475920766592E-3" table:style-name="ce5">
            <text:p>0.57%</text:p>
          </table:table-cell>
          <table:table-cell office:value-type="percentage" office:value="-5.1858950406312901E-2" table:style-name="ce5">
            <text:p>-5.19%</text:p>
          </table:table-cell>
          <table:table-cell office:value-type="percentage" office:value="6.4627170562744099E-2" table:style-name="ce5">
            <text:p>6.46%</text:p>
          </table:table-cell>
          <table:table-cell office:value-type="percentage" office:value="-5.1559127867221798E-2" table:style-name="ce5">
            <text:p>-5.16%</text:p>
          </table:table-cell>
          <table:table-cell office:value-type="percentage" office:value="-2.3859469220042201E-2" table:style-name="ce5">
            <text:p>-2.39%</text:p>
          </table:table-cell>
          <table:table-cell office:value-type="percentage" office:value="1.8873162567615499E-2" table:style-name="ce5">
            <text:p>1.89%</text:p>
          </table:table-cell>
          <table:table-cell office:value-type="percentage" office:value="-0.27762493491172802" table:style-name="ce5">
            <text:p>-27.76%</text:p>
          </table:table-cell>
          <table:table-cell office:value-type="percentage" office:value="-7.5950793921947493E-2" table:style-name="ce5">
            <text:p>-7.60%</text:p>
          </table:table-cell>
          <table:table-cell office:value-type="percentage" office:value="-0.14898733794689201" table:style-name="ce5">
            <text:p>-14.90%</text:p>
          </table:table-cell>
          <table:table-cell office:value-type="percentage" office:value="-7.3654346168041201E-2" table:style-name="ce5">
            <text:p>-7.37%</text:p>
          </table:table-cell>
          <table:table-cell office:value-type="percentage" office:value="-9.4964005053043393E-2" table:style-name="ce5">
            <text:p>-9.50%</text:p>
          </table:table-cell>
          <table:table-cell office:value-type="percentage" office:value="-0.22138439118862199" table:style-name="ce5">
            <text:p>-22.14%</text:p>
          </table:table-cell>
          <table:table-cell table:number-columns-repeated="16362"/>
        </table:table-row>
        <table:table-row table:style-name="ro3">
          <table:table-cell office:value-type="date" office:date-value="2018-12-31T00:00:00" table:style-name="ce4">
            <text:p>2018-12</text:p>
          </table:table-cell>
          <table:table-cell office:value-type="percentage" office:value="-9.1776949999999996E-2" table:style-name="ce5">
            <text:p>-9.18%</text:p>
          </table:table-cell>
          <table:table-cell office:value-type="percentage" office:value="-3.89515720307827E-2" table:style-name="ce5">
            <text:p>-3.90%</text:p>
          </table:table-cell>
          <table:table-cell office:value-type="percentage" office:value="-9.5697291195392595E-2" table:style-name="ce5">
            <text:p>-9.57%</text:p>
          </table:table-cell>
          <table:table-cell office:value-type="percentage" office:value="-0.176671221852303" table:style-name="ce5">
            <text:p>-17.67%</text:p>
          </table:table-cell>
          <table:table-cell office:value-type="percentage" office:value="-0.14834919571876501" table:style-name="ce5">
            <text:p>-14.83%</text:p>
          </table:table-cell>
          <table:table-cell office:value-type="percentage" office:value="-9.5886632800102206E-2" table:style-name="ce5">
            <text:p>-9.59%</text:p>
          </table:table-cell>
          <table:table-cell office:value-type="percentage" office:value="-0.115891441702843" table:style-name="ce5">
            <text:p>-11.59%</text:p>
          </table:table-cell>
          <table:table-cell office:value-type="percentage" office:value="-0.160354509949684" table:style-name="ce5">
            <text:p>-16.04%</text:p>
          </table:table-cell>
          <table:table-cell office:value-type="percentage" office:value="-4.6500016003847101E-2" table:style-name="ce5">
            <text:p>-4.65%</text:p>
          </table:table-cell>
          <table:table-cell office:value-type="percentage" office:value="-4.2947411537170403E-2" table:style-name="ce5">
            <text:p>-4.29%</text:p>
          </table:table-cell>
          <table:table-cell office:value-type="percentage" office:value="-6.4551077783107799E-2" table:style-name="ce5">
            <text:p>-6.46%</text:p>
          </table:table-cell>
          <table:table-cell office:value-type="percentage" office:value="-0.115481324493885" table:style-name="ce5">
            <text:p>-11.55%</text:p>
          </table:table-cell>
          <table:table-cell office:value-type="percentage" office:value="-0.19466145336627999" table:style-name="ce5">
            <text:p>-19.47%</text:p>
          </table:table-cell>
          <table:table-cell office:value-type="percentage" office:value="-8.5918707773089392E-3" table:style-name="ce5">
            <text:p>-0.86%</text:p>
          </table:table-cell>
          <table:table-cell office:value-type="percentage" office:value="1.1898352764546901E-2" table:style-name="ce5">
            <text:p>1.19%</text:p>
          </table:table-cell>
          <table:table-cell office:value-type="percentage" office:value="-6.6359288990497603E-2" table:style-name="ce5">
            <text:p>-6.64%</text:p>
          </table:table-cell>
          <table:table-cell office:value-type="percentage" office:value="-6.1377376317977898E-2" table:style-name="ce5">
            <text:p>-6.14%</text:p>
          </table:table-cell>
          <table:table-cell office:value-type="percentage" office:value="-6.1365876346826602E-2" table:style-name="ce5">
            <text:p>-6.14%</text:p>
          </table:table-cell>
          <table:table-cell office:value-type="percentage" office:value="-6.7705027759075206E-2" table:style-name="ce5">
            <text:p>-6.77%</text:p>
          </table:table-cell>
          <table:table-cell office:value-type="percentage" office:value="-8.6168549954891205E-2" table:style-name="ce5">
            <text:p>-8.62%</text:p>
          </table:table-cell>
          <table:table-cell office:value-type="percentage" office:value="0.111745715141296" table:style-name="ce5">
            <text:p>11.17%</text:p>
          </table:table-cell>
          <table:table-cell table:number-columns-repeated="16362"/>
        </table:table-row>
        <table:table-row table:style-name="ro3">
          <table:table-cell office:value-type="date" office:date-value="2019-01-31T00:00:00" table:style-name="ce4">
            <text:p>2019-01</text:p>
          </table:table-cell>
          <table:table-cell office:value-type="percentage" office:value="7.8684400000000002E-2" table:style-name="ce5">
            <text:p>7.87%</text:p>
          </table:table-cell>
          <table:table-cell office:value-type="percentage" office:value="0.121229618787766" table:style-name="ce5">
            <text:p>12.12%</text:p>
          </table:table-cell>
          <table:table-cell office:value-type="percentage" office:value="0.21352021396160101" table:style-name="ce5">
            <text:p>21.35%</text:p>
          </table:table-cell>
          <table:table-cell office:value-type="percentage" office:value="0.28748965263366699" table:style-name="ce5">
            <text:p>28.75%</text:p>
          </table:table-cell>
          <table:table-cell office:value-type="percentage" office:value="0.28730747103691101" table:style-name="ce5">
            <text:p>28.73%</text:p>
          </table:table-cell>
          <table:table-cell office:value-type="percentage" office:value="0.243655830621719" table:style-name="ce5">
            <text:p>24.37%</text:p>
          </table:table-cell>
          <table:table-cell office:value-type="percentage" office:value="0.131179824471474" table:style-name="ce5">
            <text:p>13.12%</text:p>
          </table:table-cell>
          <table:table-cell office:value-type="percentage" office:value="0.31472563743591297" table:style-name="ce5">
            <text:p>31.47%</text:p>
          </table:table-cell>
          <table:table-cell office:value-type="percentage" office:value="0.13371793925762199" table:style-name="ce5">
            <text:p>13.37%</text:p>
          </table:table-cell>
          <table:table-cell office:value-type="percentage" office:value="1.7054218798875798E-2" table:style-name="ce5">
            <text:p>1.71%</text:p>
          </table:table-cell>
          <table:table-cell office:value-type="percentage" office:value="0.26840019226074202" table:style-name="ce5">
            <text:p>26.84%</text:p>
          </table:table-cell>
          <table:table-cell office:value-type="percentage" office:value="8.6497426033020006E-2" table:style-name="ce5">
            <text:p>8.65%</text:p>
          </table:table-cell>
          <table:table-cell office:value-type="percentage" office:value="0.147130131721497" table:style-name="ce5">
            <text:p>14.71%</text:p>
          </table:table-cell>
          <table:table-cell office:value-type="percentage" office:value="3.8102284073829699E-2" table:style-name="ce5">
            <text:p>3.81%</text:p>
          </table:table-cell>
          <table:table-cell office:value-type="percentage" office:value="0.101980663836002" table:style-name="ce5">
            <text:p>10.20%</text:p>
          </table:table-cell>
          <table:table-cell office:value-type="percentage" office:value="1.43869873136282E-2" table:style-name="ce5">
            <text:p>1.44%</text:p>
          </table:table-cell>
          <table:table-cell office:value-type="percentage" office:value="0.168926537036896" table:style-name="ce5">
            <text:p>16.89%</text:p>
          </table:table-cell>
          <table:table-cell office:value-type="percentage" office:value="2.5354580953717201E-2" table:style-name="ce5">
            <text:p>2.54%</text:p>
          </table:table-cell>
          <table:table-cell office:value-type="percentage" office:value="0.27156919240951499" table:style-name="ce5">
            <text:p>27.16%</text:p>
          </table:table-cell>
          <table:table-cell office:value-type="percentage" office:value="0.16771057248115501" table:style-name="ce5">
            <text:p>16.77%</text:p>
          </table:table-cell>
          <table:table-cell office:value-type="percentage" office:value="0.25064298510551503" table:style-name="ce5">
            <text:p>25.06%</text:p>
          </table:table-cell>
          <table:table-cell table:number-columns-repeated="16362"/>
        </table:table-row>
        <table:table-row table:style-name="ro3">
          <table:table-cell office:value-type="date" office:date-value="2019-02-28T00:00:00" table:style-name="ce4">
            <text:p>2019-02</text:p>
          </table:table-cell>
          <table:table-cell office:value-type="percentage" office:value="2.9728930000000001E-2" table:style-name="ce5">
            <text:p>2.97%</text:p>
          </table:table-cell>
          <table:table-cell office:value-type="percentage" office:value="5.2604518830776201E-2" table:style-name="ce5">
            <text:p>5.26%</text:p>
          </table:table-cell>
          <table:table-cell office:value-type="percentage" office:value="-9.1372296214103699E-2" table:style-name="ce5">
            <text:p>-9.14%</text:p>
          </table:table-cell>
          <table:table-cell office:value-type="percentage" office:value="3.41055393218994E-2" table:style-name="ce5">
            <text:p>3.41%</text:p>
          </table:table-cell>
          <table:table-cell office:value-type="percentage" office:value="2.5165041908621798E-2" table:style-name="ce5">
            <text:p>2.52%</text:p>
          </table:table-cell>
          <table:table-cell office:value-type="percentage" office:value="3.4793909639120102E-2" table:style-name="ce5">
            <text:p>3.48%</text:p>
          </table:table-cell>
          <table:table-cell office:value-type="percentage" office:value="1.9786905497312601E-2" table:style-name="ce5">
            <text:p>1.98%</text:p>
          </table:table-cell>
          <table:table-cell office:value-type="percentage" office:value="8.9311882853507996E-2" table:style-name="ce5">
            <text:p>8.93%</text:p>
          </table:table-cell>
          <table:table-cell office:value-type="percentage" office:value="1.41072338446975E-2" table:style-name="ce5">
            <text:p>1.41%</text:p>
          </table:table-cell>
          <table:table-cell office:value-type="percentage" office:value="1.1836439371109E-2" table:style-name="ce5">
            <text:p>1.18%</text:p>
          </table:table-cell>
          <table:table-cell office:value-type="percentage" office:value="5.4786469787359203E-2" table:style-name="ce5">
            <text:p>5.48%</text:p>
          </table:table-cell>
          <table:table-cell office:value-type="percentage" office:value="5.6998752057552303E-2" table:style-name="ce5">
            <text:p>5.70%</text:p>
          </table:table-cell>
          <table:table-cell office:value-type="percentage" office:value="1.8322778865695E-2" table:style-name="ce5">
            <text:p>1.83%</text:p>
          </table:table-cell>
          <table:table-cell office:value-type="percentage" office:value="3.68478633463383E-2" table:style-name="ce5">
            <text:p>3.68%</text:p>
          </table:table-cell>
          <table:table-cell office:value-type="percentage" office:value="1.65168885141611E-2" table:style-name="ce5">
            <text:p>1.65%</text:p>
          </table:table-cell>
          <table:table-cell office:value-type="percentage" office:value="-0.107959404587746" table:style-name="ce5">
            <text:p>-10.80%</text:p>
          </table:table-cell>
          <table:table-cell office:value-type="percentage" office:value="3.83781529963017E-2" table:style-name="ce5">
            <text:p>3.84%</text:p>
          </table:table-cell>
          <table:table-cell office:value-type="percentage" office:value="-0.17328280210495001" table:style-name="ce5">
            <text:p>-17.33%</text:p>
          </table:table-cell>
          <table:table-cell office:value-type="percentage" office:value="-3.1435631215572399E-2" table:style-name="ce5">
            <text:p>-3.14%</text:p>
          </table:table-cell>
          <table:table-cell office:value-type="percentage" office:value="-8.2836724817752797E-2" table:style-name="ce5">
            <text:p>-8.28%</text:p>
          </table:table-cell>
          <table:table-cell office:value-type="percentage" office:value="3.5333693027496303E-2" table:style-name="ce5">
            <text:p>3.53%</text:p>
          </table:table-cell>
          <table:table-cell table:number-columns-repeated="16362"/>
        </table:table-row>
        <table:table-row table:style-name="ro3">
          <table:table-cell office:value-type="date" office:date-value="2019-03-29T00:00:00" table:style-name="ce4">
            <text:p>2019-03</text:p>
          </table:table-cell>
          <table:table-cell office:value-type="percentage" office:value="1.7924289999999999E-2" table:style-name="ce5">
            <text:p>1.79%</text:p>
          </table:table-cell>
          <table:table-cell office:value-type="percentage" office:value="4.8835873603820801E-3" table:style-name="ce5">
            <text:p>0.49%</text:p>
          </table:table-cell>
          <table:table-cell office:value-type="percentage" office:value="-3.5887856036424602E-2" table:style-name="ce5">
            <text:p>-3.59%</text:p>
          </table:table-cell>
          <table:table-cell office:value-type="percentage" office:value="-3.1528737396001802E-2" table:style-name="ce5">
            <text:p>-3.15%</text:p>
          </table:table-cell>
          <table:table-cell office:value-type="percentage" office:value="-0.19114688038826" table:style-name="ce5">
            <text:p>-19.11%</text:p>
          </table:table-cell>
          <table:table-cell office:value-type="percentage" office:value="-5.7057067751884502E-2" table:style-name="ce5">
            <text:p>-5.71%</text:p>
          </table:table-cell>
          <table:table-cell office:value-type="percentage" office:value="-3.77398803830147E-2" table:style-name="ce5">
            <text:p>-3.77%</text:p>
          </table:table-cell>
          <table:table-cell office:value-type="percentage" office:value="-7.8629016876220703E-2" table:style-name="ce5">
            <text:p>-7.86%</text:p>
          </table:table-cell>
          <table:table-cell office:value-type="percentage" office:value="1.59634428564459E-3" table:style-name="ce5">
            <text:p>0.16%</text:p>
          </table:table-cell>
          <table:table-cell office:value-type="percentage" office:value="-1.60403903573751E-2" table:style-name="ce5">
            <text:p>-1.60%</text:p>
          </table:table-cell>
          <table:table-cell office:value-type="percentage" office:value="-4.3004984036087998E-3" table:style-name="ce5">
            <text:p>-0.43%</text:p>
          </table:table-cell>
          <table:table-cell office:value-type="percentage" office:value="0.12340875715017301" table:style-name="ce5">
            <text:p>12.34%</text:p>
          </table:table-cell>
          <table:table-cell office:value-type="percentage" office:value="-6.5051876008510603E-2" table:style-name="ce5">
            <text:p>-6.51%</text:p>
          </table:table-cell>
          <table:table-cell office:value-type="percentage" office:value="1.7317935824394198E-2" table:style-name="ce5">
            <text:p>1.73%</text:p>
          </table:table-cell>
          <table:table-cell office:value-type="percentage" office:value="3.8231804966926602E-2" table:style-name="ce5">
            <text:p>3.82%</text:p>
          </table:table-cell>
          <table:table-cell office:value-type="percentage" office:value="8.9226372539997101E-2" table:style-name="ce5">
            <text:p>8.92%</text:p>
          </table:table-cell>
          <table:table-cell office:value-type="percentage" office:value="6.1077453196048702E-2" table:style-name="ce5">
            <text:p>6.11%</text:p>
          </table:table-cell>
          <table:table-cell office:value-type="percentage" office:value="8.1480637192726094E-2" table:style-name="ce5">
            <text:p>8.15%</text:p>
          </table:table-cell>
          <table:table-cell office:value-type="percentage" office:value="3.2455902546644197E-2" table:style-name="ce5">
            <text:p>3.25%</text:p>
          </table:table-cell>
          <table:table-cell office:value-type="percentage" office:value="6.82261288166046E-2" table:style-name="ce5">
            <text:p>6.82%</text:p>
          </table:table-cell>
          <table:table-cell office:value-type="percentage" office:value="2.2210175171494501E-2" table:style-name="ce5">
            <text:p>2.22%</text:p>
          </table:table-cell>
          <table:table-cell table:number-columns-repeated="16362"/>
        </table:table-row>
        <table:table-row table:style-name="ro3">
          <table:table-cell office:value-type="date" office:date-value="2019-04-30T00:00:00" table:style-name="ce4">
            <text:p>2019-04</text:p>
          </table:table-cell>
          <table:table-cell office:value-type="percentage" office:value="3.9313439999999998E-2" table:style-name="ce5">
            <text:p>3.93%</text:p>
          </table:table-cell>
          <table:table-cell office:value-type="percentage" office:value="9.9901638925075503E-2" table:style-name="ce5">
            <text:p>9.99%</text:p>
          </table:table-cell>
          <table:table-cell office:value-type="percentage" office:value="3.7801999598741497E-2" table:style-name="ce5">
            <text:p>3.78%</text:p>
          </table:table-cell>
          <table:table-cell office:value-type="percentage" office:value="5.73998801410198E-2" table:style-name="ce5">
            <text:p>5.74%</text:p>
          </table:table-cell>
          <table:table-cell office:value-type="percentage" office:value="7.8109435737132998E-2" table:style-name="ce5">
            <text:p>7.81%</text:p>
          </table:table-cell>
          <table:table-cell office:value-type="percentage" office:value="0.21061010658741" table:style-name="ce5">
            <text:p>21.06%</text:p>
          </table:table-cell>
          <table:table-cell office:value-type="percentage" office:value="0.117327675223351" table:style-name="ce5">
            <text:p>11.73%</text:p>
          </table:table-cell>
          <table:table-cell office:value-type="percentage" office:value="5.19005879759789E-2" table:style-name="ce5">
            <text:p>5.19%</text:p>
          </table:table-cell>
          <table:table-cell office:value-type="percentage" office:value="-2.8005454689264301E-2" table:style-name="ce5">
            <text:p>-2.80%</text:p>
          </table:table-cell>
          <table:table-cell office:value-type="percentage" office:value="0.23363056778907801" table:style-name="ce5">
            <text:p>23.36%</text:p>
          </table:table-cell>
          <table:table-cell office:value-type="percentage" office:value="3.9208017289638498E-2" table:style-name="ce5">
            <text:p>3.92%</text:p>
          </table:table-cell>
          <table:table-cell office:value-type="percentage" office:value="2.8328539803624202E-2" table:style-name="ce5">
            <text:p>2.83%</text:p>
          </table:table-cell>
          <table:table-cell office:value-type="percentage" office:value="0.14359730482101399" table:style-name="ce5">
            <text:p>14.36%</text:p>
          </table:table-cell>
          <table:table-cell office:value-type="percentage" office:value="6.5875202417373699E-2" table:style-name="ce5">
            <text:p>6.59%</text:p>
          </table:table-cell>
          <table:table-cell office:value-type="percentage" office:value="-3.3763542771339403E-2" table:style-name="ce5">
            <text:p>-3.38%</text:p>
          </table:table-cell>
          <table:table-cell office:value-type="percentage" office:value="5.8862298727035502E-2" table:style-name="ce5">
            <text:p>5.89%</text:p>
          </table:table-cell>
          <table:table-cell office:value-type="percentage" office:value="-6.8680465221405002E-2" table:style-name="ce5">
            <text:p>-6.87%</text:p>
          </table:table-cell>
          <table:table-cell office:value-type="percentage" office:value="2.6067595928907401E-2" table:style-name="ce5">
            <text:p>2.61%</text:p>
          </table:table-cell>
          <table:table-cell office:value-type="percentage" office:value="0.16023750603199" table:style-name="ce5">
            <text:p>16.02%</text:p>
          </table:table-cell>
          <table:table-cell office:value-type="percentage" office:value="0.21380774676799799" table:style-name="ce5">
            <text:p>21.38%</text:p>
          </table:table-cell>
          <table:table-cell office:value-type="percentage" office:value="6.6949315369129195E-2" table:style-name="ce5">
            <text:p>6.69%</text:p>
          </table:table-cell>
          <table:table-cell table:number-columns-repeated="16362"/>
        </table:table-row>
        <table:table-row table:style-name="ro3">
          <table:table-cell office:value-type="date" office:date-value="2019-05-31T00:00:00" table:style-name="ce4">
            <text:p>2019-05</text:p>
          </table:table-cell>
          <table:table-cell office:value-type="percentage" office:value="-6.5777730000000006E-2" table:style-name="ce5">
            <text:p>-6.58%</text:p>
          </table:table-cell>
          <table:table-cell office:value-type="percentage" office:value="-0.179716661572456" table:style-name="ce5">
            <text:p>-17.97%</text:p>
          </table:table-cell>
          <table:table-cell office:value-type="percentage" office:value="-6.7968435585498796E-2" table:style-name="ce5">
            <text:p>-6.80%</text:p>
          </table:table-cell>
          <table:table-cell office:value-type="percentage" office:value="-4.0510585531592404E-3" table:style-name="ce5">
            <text:p>-0.41%</text:p>
          </table:table-cell>
          <table:table-cell office:value-type="percentage" office:value="-0.130133807659149" table:style-name="ce5">
            <text:p>-13.01%</text:p>
          </table:table-cell>
          <table:table-cell office:value-type="percentage" office:value="-0.25005188584327698" table:style-name="ce5">
            <text:p>-25.01%</text:p>
          </table:table-cell>
          <table:table-cell office:value-type="percentage" office:value="-2.25086435675621E-2" table:style-name="ce5">
            <text:p>-2.25%</text:p>
          </table:table-cell>
          <table:table-cell office:value-type="percentage" office:value="-0.16886729001998901" table:style-name="ce5">
            <text:p>-16.89%</text:p>
          </table:table-cell>
          <table:table-cell office:value-type="percentage" office:value="7.9643987119197898E-3" table:style-name="ce5">
            <text:p>0.80%</text:p>
          </table:table-cell>
          <table:table-cell office:value-type="percentage" office:value="-3.5993341356515898E-2" table:style-name="ce5">
            <text:p>-3.60%</text:p>
          </table:table-cell>
          <table:table-cell office:value-type="percentage" office:value="-7.3568329215049702E-2" table:style-name="ce5">
            <text:p>-7.36%</text:p>
          </table:table-cell>
          <table:table-cell office:value-type="percentage" office:value="-6.9176569581031799E-2" table:style-name="ce5">
            <text:p>-6.92%</text:p>
          </table:table-cell>
          <table:table-cell office:value-type="percentage" office:value="-0.117799334228039" table:style-name="ce5">
            <text:p>-11.78%</text:p>
          </table:table-cell>
          <table:table-cell office:value-type="percentage" office:value="-5.3130220621824299E-2" table:style-name="ce5">
            <text:p>-5.31%</text:p>
          </table:table-cell>
          <table:table-cell office:value-type="percentage" office:value="-0.13249851763248399" table:style-name="ce5">
            <text:p>-13.25%</text:p>
          </table:table-cell>
          <table:table-cell office:value-type="percentage" office:value="-0.100394114851952" table:style-name="ce5">
            <text:p>-10.04%</text:p>
          </table:table-cell>
          <table:table-cell office:value-type="percentage" office:value="-1.6587423160672202E-2" table:style-name="ce5">
            <text:p>-1.66%</text:p>
          </table:table-cell>
          <table:table-cell office:value-type="percentage" office:value="0.11690591275692" table:style-name="ce5">
            <text:p>11.69%</text:p>
          </table:table-cell>
          <table:table-cell office:value-type="percentage" office:value="-8.2368113100528703E-2" table:style-name="ce5">
            <text:p>-8.24%</text:p>
          </table:table-cell>
          <table:table-cell office:value-type="percentage" office:value="-8.6945660412311596E-2" table:style-name="ce5">
            <text:p>-8.69%</text:p>
          </table:table-cell>
          <table:table-cell office:value-type="percentage" office:value="0.13658940792083701" table:style-name="ce5">
            <text:p>13.66%</text:p>
          </table:table-cell>
          <table:table-cell table:number-columns-repeated="16362"/>
        </table:table-row>
        <table:table-row table:style-name="ro3">
          <table:table-cell office:value-type="date" office:date-value="2019-06-28T00:00:00" table:style-name="ce4">
            <text:p>2019-06</text:p>
          </table:table-cell>
          <table:table-cell office:value-type="percentage" office:value="6.8930190000000002E-2" table:style-name="ce5">
            <text:p>6.89%</text:p>
          </table:table-cell>
          <table:table-cell office:value-type="percentage" office:value="8.8363640010356903E-2" table:style-name="ce5">
            <text:p>8.84%</text:p>
          </table:table-cell>
          <table:table-cell office:value-type="percentage" office:value="0.156325548887253" table:style-name="ce5">
            <text:p>15.63%</text:p>
          </table:table-cell>
          <table:table-cell office:value-type="percentage" office:value="-6.3046544790267903E-2" table:style-name="ce5">
            <text:p>-6.30%</text:p>
          </table:table-cell>
          <table:table-cell office:value-type="percentage" office:value="2.1750655025243801E-2" table:style-name="ce5">
            <text:p>2.18%</text:p>
          </table:table-cell>
          <table:table-cell office:value-type="percentage" office:value="0.155222177505493" table:style-name="ce5">
            <text:p>15.52%</text:p>
          </table:table-cell>
          <table:table-cell office:value-type="percentage" office:value="0.167275279760361" table:style-name="ce5">
            <text:p>16.73%</text:p>
          </table:table-cell>
          <table:table-cell office:value-type="percentage" office:value="0.12918062508106201" table:style-name="ce5">
            <text:p>12.92%</text:p>
          </table:table-cell>
          <table:table-cell office:value-type="percentage" office:value="-6.7394170910120002E-3" table:style-name="ce5">
            <text:p>-0.67%</text:p>
          </table:table-cell>
          <table:table-cell office:value-type="percentage" office:value="5.75583651661873E-2" table:style-name="ce5">
            <text:p>5.76%</text:p>
          </table:table-cell>
          <table:table-cell office:value-type="percentage" office:value="7.0030324161052704E-2" table:style-name="ce5">
            <text:p>7.00%</text:p>
          </table:table-cell>
          <table:table-cell office:value-type="percentage" office:value="8.9279845356941195E-2" table:style-name="ce5">
            <text:p>8.93%</text:p>
          </table:table-cell>
          <table:table-cell office:value-type="percentage" office:value="0.12619224190712" table:style-name="ce5">
            <text:p>12.62%</text:p>
          </table:table-cell>
          <table:table-cell office:value-type="percentage" office:value="-5.37452474236488E-2" table:style-name="ce5">
            <text:p>-5.37%</text:p>
          </table:table-cell>
          <table:table-cell office:value-type="percentage" office:value="-5.6364969350397604E-3" table:style-name="ce5">
            <text:p>-0.56%</text:p>
          </table:table-cell>
          <table:table-cell office:value-type="percentage" office:value="8.8309936225414304E-2" table:style-name="ce5">
            <text:p>8.83%</text:p>
          </table:table-cell>
          <table:table-cell office:value-type="percentage" office:value="8.7881393730640397E-2" table:style-name="ce5">
            <text:p>8.79%</text:p>
          </table:table-cell>
          <table:table-cell office:value-type="percentage" office:value="4.9745697528123897E-2" table:style-name="ce5">
            <text:p>4.97%</text:p>
          </table:table-cell>
          <table:table-cell office:value-type="percentage" office:value="8.7507739663124098E-2" table:style-name="ce5">
            <text:p>8.75%</text:p>
          </table:table-cell>
          <table:table-cell office:value-type="percentage" office:value="-4.2261172086000401E-2" table:style-name="ce5">
            <text:p>-4.23%</text:p>
          </table:table-cell>
          <table:table-cell office:value-type="percentage" office:value="-2.0102037116885199E-2" table:style-name="ce5">
            <text:p>-2.01%</text:p>
          </table:table-cell>
          <table:table-cell table:number-columns-repeated="16362"/>
        </table:table-row>
        <table:table-row table:style-name="ro3">
          <table:table-cell office:value-type="date" office:date-value="2019-07-31T00:00:00" table:style-name="ce4">
            <text:p>2019-07</text:p>
          </table:table-cell>
          <table:table-cell office:value-type="percentage" office:value="1.312819E-2" table:style-name="ce5">
            <text:p>1.31%</text:p>
          </table:table-cell>
          <table:table-cell office:value-type="percentage" office:value="2.2846478968858702E-2" table:style-name="ce5">
            <text:p>2.28%</text:p>
          </table:table-cell>
          <table:table-cell office:value-type="percentage" office:value="5.0752565264701802E-2" table:style-name="ce5">
            <text:p>5.08%</text:p>
          </table:table-cell>
          <table:table-cell office:value-type="percentage" office:value="-2.0620811730623301E-2" table:style-name="ce5">
            <text:p>-2.06%</text:p>
          </table:table-cell>
          <table:table-cell office:value-type="percentage" office:value="1.34994927793741E-2" table:style-name="ce5">
            <text:p>1.35%</text:p>
          </table:table-cell>
          <table:table-cell office:value-type="percentage" office:value="4.9036290496587802E-2" table:style-name="ce5">
            <text:p>4.90%</text:p>
          </table:table-cell>
          <table:table-cell office:value-type="percentage" office:value="3.9801876991987201E-2" table:style-name="ce5">
            <text:p>3.98%</text:p>
          </table:table-cell>
          <table:table-cell office:value-type="percentage" office:value="-1.67038142681122E-2" table:style-name="ce5">
            <text:p>-1.67%</text:p>
          </table:table-cell>
          <table:table-cell office:value-type="percentage" office:value="0.10131020098924599" table:style-name="ce5">
            <text:p>10.13%</text:p>
          </table:table-cell>
          <table:table-cell office:value-type="percentage" office:value="3.0435370281338699E-2" table:style-name="ce5">
            <text:p>3.04%</text:p>
          </table:table-cell>
          <table:table-cell office:value-type="percentage" office:value="-0.120685003697872" table:style-name="ce5">
            <text:p>-12.07%</text:p>
          </table:table-cell>
          <table:table-cell office:value-type="percentage" office:value="8.7698079645633698E-2" table:style-name="ce5">
            <text:p>8.77%</text:p>
          </table:table-cell>
          <table:table-cell office:value-type="percentage" office:value="-1.27036245539784E-2" table:style-name="ce5">
            <text:p>-1.27%</text:p>
          </table:table-cell>
          <table:table-cell office:value-type="percentage" office:value="3.6079179495573002E-2" table:style-name="ce5">
            <text:p>3.61%</text:p>
          </table:table-cell>
          <table:table-cell office:value-type="percentage" office:value="7.8936396166682209E-3" table:style-name="ce5">
            <text:p>0.79%</text:p>
          </table:table-cell>
          <table:table-cell office:value-type="percentage" office:value="3.2627139240503297E-2" table:style-name="ce5">
            <text:p>3.26%</text:p>
          </table:table-cell>
          <table:table-cell office:value-type="percentage" office:value="-8.6509995162487002E-2" table:style-name="ce5">
            <text:p>-8.65%</text:p>
          </table:table-cell>
          <table:table-cell office:value-type="percentage" office:value="7.9186096787452698E-2" table:style-name="ce5">
            <text:p>7.92%</text:p>
          </table:table-cell>
          <table:table-cell office:value-type="percentage" office:value="6.3730347901582701E-3" table:style-name="ce5">
            <text:p>0.64%</text:p>
          </table:table-cell>
          <table:table-cell office:value-type="percentage" office:value="0.21232090890407601" table:style-name="ce5">
            <text:p>21.23%</text:p>
          </table:table-cell>
          <table:table-cell office:value-type="percentage" office:value="0.119221121072769" table:style-name="ce5">
            <text:p>11.92%</text:p>
          </table:table-cell>
          <table:table-cell table:number-columns-repeated="16362"/>
        </table:table-row>
        <table:table-row table:style-name="ro3">
          <table:table-cell office:value-type="date" office:date-value="2019-08-30T00:00:00" table:style-name="ce4">
            <text:p>2019-08</text:p>
          </table:table-cell>
          <table:table-cell office:value-type="percentage" office:value="-1.8091650000000001E-2" table:style-name="ce5">
            <text:p>-1.81%</text:p>
          </table:table-cell>
          <table:table-cell office:value-type="percentage" office:value="-8.2230269908905002E-2" table:style-name="ce5">
            <text:p>-8.22%</text:p>
          </table:table-cell>
          <table:table-cell office:value-type="percentage" office:value="-6.5289840102195698E-2" table:style-name="ce5">
            <text:p>-6.53%</text:p>
          </table:table-cell>
          <table:table-cell office:value-type="percentage" office:value="-0.146498247981072" table:style-name="ce5">
            <text:p>-14.65%</text:p>
          </table:table-cell>
          <table:table-cell office:value-type="percentage" office:value="-1.79303474724293E-2" table:style-name="ce5">
            <text:p>-1.79%</text:p>
          </table:table-cell>
          <table:table-cell office:value-type="percentage" office:value="-0.14546017348766299" table:style-name="ce5">
            <text:p>-14.55%</text:p>
          </table:table-cell>
          <table:table-cell office:value-type="percentage" office:value="3.0171338468790099E-2" table:style-name="ce5">
            <text:p>3.02%</text:p>
          </table:table-cell>
          <table:table-cell office:value-type="percentage" office:value="-9.2487685382366194E-2" table:style-name="ce5">
            <text:p>-9.25%</text:p>
          </table:table-cell>
          <table:table-cell office:value-type="percentage" office:value="-5.7148899883031901E-2" table:style-name="ce5">
            <text:p>-5.71%</text:p>
          </table:table-cell>
          <table:table-cell office:value-type="percentage" office:value="-4.0206979960203199E-2" table:style-name="ce5">
            <text:p>-4.02%</text:p>
          </table:table-cell>
          <table:table-cell office:value-type="percentage" office:value="-9.0529091656207997E-2" table:style-name="ce5">
            <text:p>-9.05%</text:p>
          </table:table-cell>
          <table:table-cell office:value-type="percentage" office:value="-3.5387113690376303E-2" table:style-name="ce5">
            <text:p>-3.54%</text:p>
          </table:table-cell>
          <table:table-cell office:value-type="percentage" office:value="-8.9409403502941104E-2" table:style-name="ce5">
            <text:p>-8.94%</text:p>
          </table:table-cell>
          <table:table-cell office:value-type="percentage" office:value="-0.130016565322876" table:style-name="ce5">
            <text:p>-13.00%</text:p>
          </table:table-cell>
          <table:table-cell office:value-type="percentage" office:value="-1.8549030646681799E-2" table:style-name="ce5">
            <text:p>-1.85%</text:p>
          </table:table-cell>
          <table:table-cell office:value-type="percentage" office:value="3.81616055965424E-2" table:style-name="ce5">
            <text:p>3.82%</text:p>
          </table:table-cell>
          <table:table-cell office:value-type="percentage" office:value="1.27567602321506E-2" table:style-name="ce5">
            <text:p>1.28%</text:p>
          </table:table-cell>
          <table:table-cell office:value-type="percentage" office:value="7.7130302786827101E-2" table:style-name="ce5">
            <text:p>7.71%</text:p>
          </table:table-cell>
          <table:table-cell office:value-type="percentage" office:value="-4.40714508295059E-2" table:style-name="ce5">
            <text:p>-4.41%</text:p>
          </table:table-cell>
          <table:table-cell office:value-type="percentage" office:value="8.0359289422631298E-3" table:style-name="ce5">
            <text:p>0.80%</text:p>
          </table:table-cell>
          <table:table-cell office:value-type="percentage" office:value="0.126311615109444" table:style-name="ce5">
            <text:p>12.63%</text:p>
          </table:table-cell>
          <table:table-cell table:number-columns-repeated="16362"/>
        </table:table-row>
        <table:table-row table:style-name="ro3">
          <table:table-cell office:value-type="date" office:date-value="2019-09-30T00:00:00" table:style-name="ce4">
            <text:p>2019-09</text:p>
          </table:table-cell>
          <table:table-cell office:value-type="percentage" office:value="1.7181169999999999E-2" table:style-name="ce5">
            <text:p>1.72%</text:p>
          </table:table-cell>
          <table:table-cell office:value-type="percentage" office:value="5.51648996770382E-2" table:style-name="ce5">
            <text:p>5.52%</text:p>
          </table:table-cell>
          <table:table-cell office:value-type="percentage" office:value="-7.4839685112237904E-3" table:style-name="ce5">
            <text:p>-0.75%</text:p>
          </table:table-cell>
          <table:table-cell office:value-type="percentage" office:value="3.5315521061420399E-2" table:style-name="ce5">
            <text:p>3.53%</text:p>
          </table:table-cell>
          <table:table-cell office:value-type="percentage" office:value="-2.84298416227102E-2" table:style-name="ce5">
            <text:p>-2.84%</text:p>
          </table:table-cell>
          <table:table-cell office:value-type="percentage" office:value="-1.29822995513678E-2" table:style-name="ce5">
            <text:p>-1.30%</text:p>
          </table:table-cell>
          <table:table-cell office:value-type="percentage" office:value="1.5820192638784699E-3" table:style-name="ce5">
            <text:p>0.16%</text:p>
          </table:table-cell>
          <table:table-cell office:value-type="percentage" office:value="-8.3195307524874796E-4" table:style-name="ce5">
            <text:p>-0.08%</text:p>
          </table:table-cell>
          <table:table-cell office:value-type="percentage" office:value="-6.0612943023443201E-2" table:style-name="ce5">
            <text:p>-6.06%</text:p>
          </table:table-cell>
          <table:table-cell office:value-type="percentage" office:value="-5.0560887902975103E-2" table:style-name="ce5">
            <text:p>-5.06%</text:p>
          </table:table-cell>
          <table:table-cell office:value-type="percentage" office:value="-8.8953204452991499E-2" table:style-name="ce5">
            <text:p>-8.90%</text:p>
          </table:table-cell>
          <table:table-cell office:value-type="percentage" office:value="-4.56050299108028E-2" table:style-name="ce5">
            <text:p>-4.56%</text:p>
          </table:table-cell>
          <table:table-cell office:value-type="percentage" office:value="-3.5144969820976299E-2" table:style-name="ce5">
            <text:p>-3.51%</text:p>
          </table:table-cell>
          <table:table-cell office:value-type="percentage" office:value="4.4346638023853302E-2" table:style-name="ce5">
            <text:p>4.43%</text:p>
          </table:table-cell>
          <table:table-cell office:value-type="percentage" office:value="-2.2399381268769498E-3" table:style-name="ce5">
            <text:p>-0.22%</text:p>
          </table:table-cell>
          <table:table-cell office:value-type="percentage" office:value="4.5849796384572997E-2" table:style-name="ce5">
            <text:p>4.58%</text:p>
          </table:table-cell>
          <table:table-cell office:value-type="percentage" office:value="4.4192992150783497E-2" table:style-name="ce5">
            <text:p>4.42%</text:p>
          </table:table-cell>
          <table:table-cell office:value-type="percentage" office:value="-5.0238728523254401E-2" table:style-name="ce5">
            <text:p>-5.02%</text:p>
          </table:table-cell>
          <table:table-cell office:value-type="percentage" office:value="-4.0878959000110598E-2" table:style-name="ce5">
            <text:p>-4.09%</text:p>
          </table:table-cell>
          <table:table-cell office:value-type="percentage" office:value="-3.3997673541307498E-2" table:style-name="ce5">
            <text:p>-3.40%</text:p>
          </table:table-cell>
          <table:table-cell office:value-type="percentage" office:value="-0.15754717588424699" table:style-name="ce5">
            <text:p>-15.75%</text:p>
          </table:table-cell>
          <table:table-cell table:number-columns-repeated="16362"/>
        </table:table-row>
        <table:table-row table:style-name="ro3">
          <table:table-cell office:value-type="date" office:date-value="2019-10-31T00:00:00" table:style-name="ce4">
            <text:p>2019-10</text:p>
          </table:table-cell>
          <table:table-cell office:value-type="percentage" office:value="2.0431749999999999E-2" table:style-name="ce5">
            <text:p>2.04%</text:p>
          </table:table-cell>
          <table:table-cell office:value-type="percentage" office:value="7.0637151598930401E-2" table:style-name="ce5">
            <text:p>7.06%</text:p>
          </table:table-cell>
          <table:table-cell office:value-type="percentage" office:value="2.8138553723692901E-2" table:style-name="ce5">
            <text:p>2.81%</text:p>
          </table:table-cell>
          <table:table-cell office:value-type="percentage" office:value="0.12289946526289" table:style-name="ce5">
            <text:p>12.29%</text:p>
          </table:table-cell>
          <table:table-cell office:value-type="percentage" office:value="0.14442956447601299" table:style-name="ce5">
            <text:p>14.44%</text:p>
          </table:table-cell>
          <table:table-cell office:value-type="percentage" office:value="0.11607795208692601" table:style-name="ce5">
            <text:p>11.61%</text:p>
          </table:table-cell>
          <table:table-cell office:value-type="percentage" office:value="5.2934296429157299E-2" table:style-name="ce5">
            <text:p>5.29%</text:p>
          </table:table-cell>
          <table:table-cell office:value-type="percentage" office:value="0.13778701424598699" table:style-name="ce5">
            <text:p>13.78%</text:p>
          </table:table-cell>
          <table:table-cell office:value-type="percentage" office:value="3.5979852080345202E-2" table:style-name="ce5">
            <text:p>3.60%</text:p>
          </table:table-cell>
          <table:table-cell office:value-type="percentage" office:value="-3.0694378074258601E-3" table:style-name="ce5">
            <text:p>-0.31%</text:p>
          </table:table-cell>
          <table:table-cell office:value-type="percentage" office:value="7.3948167264461503E-2" table:style-name="ce5">
            <text:p>7.39%</text:p>
          </table:table-cell>
          <table:table-cell office:value-type="percentage" office:value="6.2707327306270599E-2" table:style-name="ce5">
            <text:p>6.27%</text:p>
          </table:table-cell>
          <table:table-cell office:value-type="percentage" office:value="1.2204309925437E-2" table:style-name="ce5">
            <text:p>1.22%</text:p>
          </table:table-cell>
          <table:table-cell office:value-type="percentage" office:value="1.2902339920401599E-2" table:style-name="ce5">
            <text:p>1.29%</text:p>
          </table:table-cell>
          <table:table-cell office:value-type="percentage" office:value="-0.21236823499202701" table:style-name="ce5">
            <text:p>-21.24%</text:p>
          </table:table-cell>
          <table:table-cell office:value-type="percentage" office:value="5.8767966926097898E-2" table:style-name="ce5">
            <text:p>5.88%</text:p>
          </table:table-cell>
          <table:table-cell office:value-type="percentage" office:value="-1.45164402201772E-2" table:style-name="ce5">
            <text:p>-1.45%</text:p>
          </table:table-cell>
          <table:table-cell office:value-type="percentage" office:value="-3.9811696857214002E-2" table:style-name="ce5">
            <text:p>-3.98%</text:p>
          </table:table-cell>
          <table:table-cell office:value-type="percentage" office:value="7.6201662421226501E-2" table:style-name="ce5">
            <text:p>7.62%</text:p>
          </table:table-cell>
          <table:table-cell office:value-type="percentage" office:value="-0.27257284522056602" table:style-name="ce5">
            <text:p>-27.26%</text:p>
          </table:table-cell>
          <table:table-cell office:value-type="percentage" office:value="2.1696463227271999E-2" table:style-name="ce5">
            <text:p>2.17%</text:p>
          </table:table-cell>
          <table:table-cell table:number-columns-repeated="16362"/>
        </table:table-row>
        <table:table-row table:style-name="ro3">
          <table:table-cell office:value-type="date" office:date-value="2019-11-29T00:00:00" table:style-name="ce4">
            <text:p>2019-11</text:p>
          </table:table-cell>
          <table:table-cell office:value-type="percentage" office:value="3.4047059999999997E-2" table:style-name="ce5">
            <text:p>3.40%</text:p>
          </table:table-cell>
          <table:table-cell office:value-type="percentage" office:value="1.4715392142534299E-2" table:style-name="ce5">
            <text:p>1.47%</text:p>
          </table:table-cell>
          <table:table-cell office:value-type="percentage" office:value="0.12105266004800801" table:style-name="ce5">
            <text:p>12.11%</text:p>
          </table:table-cell>
          <table:table-cell office:value-type="percentage" office:value="0.19521996378898601" table:style-name="ce5">
            <text:p>19.52%</text:p>
          </table:table-cell>
          <table:table-cell office:value-type="percentage" office:value="8.0459773540496798E-2" table:style-name="ce5">
            <text:p>8.05%</text:p>
          </table:table-cell>
          <table:table-cell office:value-type="percentage" office:value="4.2030834592878801E-3" table:style-name="ce5">
            <text:p>0.42%</text:p>
          </table:table-cell>
          <table:table-cell office:value-type="percentage" office:value="1.5377346426248599E-4" table:style-name="ce5">
            <text:p>0.02%</text:p>
          </table:table-cell>
          <table:table-cell office:value-type="percentage" office:value="7.9266048967838301E-2" table:style-name="ce5">
            <text:p>7.93%</text:p>
          </table:table-cell>
          <table:table-cell office:value-type="percentage" office:value="5.5799953639507301E-2" table:style-name="ce5">
            <text:p>5.58%</text:p>
          </table:table-cell>
          <table:table-cell office:value-type="percentage" office:value="0.16671800613403301" table:style-name="ce5">
            <text:p>16.67%</text:p>
          </table:table-cell>
          <table:table-cell office:value-type="percentage" office:value="9.4812288880348206E-2" table:style-name="ce5">
            <text:p>9.48%</text:p>
          </table:table-cell>
          <table:table-cell office:value-type="percentage" office:value="-9.7872689366340603E-3" table:style-name="ce5">
            <text:p>-0.98%</text:p>
          </table:table-cell>
          <table:table-cell office:value-type="percentage" office:value="0.22203667461872101" table:style-name="ce5">
            <text:p>22.20%</text:p>
          </table:table-cell>
          <table:table-cell office:value-type="percentage" office:value="5.5672053247690201E-2" table:style-name="ce5">
            <text:p>5.57%</text:p>
          </table:table-cell>
          <table:table-cell office:value-type="percentage" office:value="0.106709480285645" table:style-name="ce5">
            <text:p>10.67%</text:p>
          </table:table-cell>
          <table:table-cell office:value-type="percentage" office:value="-2.1417044103145599E-2" table:style-name="ce5">
            <text:p>-2.14%</text:p>
          </table:table-cell>
          <table:table-cell office:value-type="percentage" office:value="4.7821581363677999E-2" table:style-name="ce5">
            <text:p>4.78%</text:p>
          </table:table-cell>
          <table:table-cell office:value-type="percentage" office:value="8.3090988919138908E-3" table:style-name="ce5">
            <text:p>0.83%</text:p>
          </table:table-cell>
          <table:table-cell office:value-type="percentage" office:value="5.21263033151627E-2" table:style-name="ce5">
            <text:p>5.21%</text:p>
          </table:table-cell>
          <table:table-cell office:value-type="percentage" office:value="3.1364716589450801E-2" table:style-name="ce5">
            <text:p>3.14%</text:p>
          </table:table-cell>
          <table:table-cell office:value-type="percentage" office:value="-3.4388199448585503E-2" table:style-name="ce5">
            <text:p>-3.44%</text:p>
          </table:table-cell>
          <table:table-cell table:number-columns-repeated="16362"/>
        </table:table-row>
        <table:table-row table:style-name="ro3">
          <table:table-cell office:value-type="date" office:date-value="2019-12-31T00:00:00" table:style-name="ce4">
            <text:p>2019-12</text:p>
          </table:table-cell>
          <table:table-cell office:value-type="percentage" office:value="2.8589799999999999E-2" table:style-name="ce5">
            <text:p>2.86%</text:p>
          </table:table-cell>
          <table:table-cell office:value-type="percentage" office:value="0.112509973347187" table:style-name="ce5">
            <text:p>11.25%</text:p>
          </table:table-cell>
          <table:table-cell office:value-type="percentage" office:value="4.5383401215076502E-2" table:style-name="ce5">
            <text:p>4.54%</text:p>
          </table:table-cell>
          <table:table-cell office:value-type="percentage" office:value="0.114558048546314" table:style-name="ce5">
            <text:p>11.46%</text:p>
          </table:table-cell>
          <table:table-cell office:value-type="percentage" office:value="0.109856650233269" table:style-name="ce5">
            <text:p>10.99%</text:p>
          </table:table-cell>
          <table:table-cell office:value-type="percentage" office:value="0.14911043643951399" table:style-name="ce5">
            <text:p>14.91%</text:p>
          </table:table-cell>
          <table:table-cell office:value-type="percentage" office:value="5.9772346168756499E-2" table:style-name="ce5">
            <text:p>5.98%</text:p>
          </table:table-cell>
          <table:table-cell office:value-type="percentage" office:value="2.0401246845722198E-2" table:style-name="ce5">
            <text:p>2.04%</text:p>
          </table:table-cell>
          <table:table-cell office:value-type="percentage" office:value="6.4693003892898601E-2" table:style-name="ce5">
            <text:p>6.47%</text:p>
          </table:table-cell>
          <table:table-cell office:value-type="percentage" office:value="-4.0044840425252901E-2" table:style-name="ce5">
            <text:p>-4.00%</text:p>
          </table:table-cell>
          <table:table-cell office:value-type="percentage" office:value="2.8316289186477699E-2" table:style-name="ce5">
            <text:p>2.83%</text:p>
          </table:table-cell>
          <table:table-cell office:value-type="percentage" office:value="2.37788818776608E-2" table:style-name="ce5">
            <text:p>2.38%</text:p>
          </table:table-cell>
          <table:table-cell office:value-type="percentage" office:value="-6.0715530999004797E-3" table:style-name="ce5">
            <text:p>-0.61%</text:p>
          </table:table-cell>
          <table:table-cell office:value-type="percentage" office:value="4.4041462242603302E-2" table:style-name="ce5">
            <text:p>4.40%</text:p>
          </table:table-cell>
          <table:table-cell office:value-type="percentage" office:value="4.7887813299894298E-2" table:style-name="ce5">
            <text:p>4.79%</text:p>
          </table:table-cell>
          <table:table-cell office:value-type="percentage" office:value="8.3713226020336207E-2" table:style-name="ce5">
            <text:p>8.37%</text:p>
          </table:table-cell>
          <table:table-cell office:value-type="percentage" office:value="6.4350061118602794E-2" table:style-name="ce5">
            <text:p>6.44%</text:p>
          </table:table-cell>
          <table:table-cell office:value-type="percentage" office:value="8.8998917490243894E-3" table:style-name="ce5">
            <text:p>0.89%</text:p>
          </table:table-cell>
          <table:table-cell office:value-type="percentage" office:value="1.7903197556734099E-2" table:style-name="ce5">
            <text:p>1.79%</text:p>
          </table:table-cell>
          <table:table-cell office:value-type="percentage" office:value="3.6881249397993102E-2" table:style-name="ce5">
            <text:p>3.69%</text:p>
          </table:table-cell>
          <table:table-cell office:value-type="percentage" office:value="0.165011301636696" table:style-name="ce5">
            <text:p>16.50%</text:p>
          </table:table-cell>
          <table:table-cell table:number-columns-repeated="16362"/>
        </table:table-row>
        <table:table-row table:style-name="ro3">
          <table:table-cell office:value-type="date" office:date-value="2020-01-31T00:00:00" table:style-name="ce4">
            <text:p>2020-01</text:p>
          </table:table-cell>
          <table:table-cell office:value-type="percentage" office:value="-1.62809E-3" table:style-name="ce5">
            <text:p>-0.16%</text:p>
          </table:table-cell>
          <table:table-cell office:value-type="percentage" office:value="-5.4026700556278201E-2" table:style-name="ce5">
            <text:p>-5.40%</text:p>
          </table:table-cell>
          <table:table-cell office:value-type="percentage" office:value="-6.6426239907741602E-2" table:style-name="ce5">
            <text:p>-6.64%</text:p>
          </table:table-cell>
          <table:table-cell office:value-type="percentage" office:value="2.34740762971342E-3" table:style-name="ce5">
            <text:p>0.23%</text:p>
          </table:table-cell>
          <table:table-cell office:value-type="percentage" office:value="0.16705793142318701" table:style-name="ce5">
            <text:p>16.71%</text:p>
          </table:table-cell>
          <table:table-cell office:value-type="percentage" office:value="-9.1524392366409302E-2" table:style-name="ce5">
            <text:p>-9.15%</text:p>
          </table:table-cell>
          <table:table-cell office:value-type="percentage" office:value="5.23324199020863E-2" table:style-name="ce5">
            <text:p>5.23%</text:p>
          </table:table-cell>
          <table:table-cell office:value-type="percentage" office:value="-3.0060170684009799E-3" table:style-name="ce5">
            <text:p>-0.30%</text:p>
          </table:table-cell>
          <table:table-cell office:value-type="percentage" office:value="0.105664290487766" table:style-name="ce5">
            <text:p>10.57%</text:p>
          </table:table-cell>
          <table:table-cell office:value-type="percentage" office:value="-4.3697759509086602E-2" table:style-name="ce5">
            <text:p>-4.37%</text:p>
          </table:table-cell>
          <table:table-cell office:value-type="percentage" office:value="6.6507987678050995E-2" table:style-name="ce5">
            <text:p>6.65%</text:p>
          </table:table-cell>
          <table:table-cell office:value-type="percentage" office:value="-4.6313103288412101E-2" table:style-name="ce5">
            <text:p>-4.63%</text:p>
          </table:table-cell>
          <table:table-cell office:value-type="percentage" office:value="-0.10629203915596" table:style-name="ce5">
            <text:p>-10.63%</text:p>
          </table:table-cell>
          <table:table-cell office:value-type="percentage" office:value="6.7983274348080202E-3" table:style-name="ce5">
            <text:p>0.68%</text:p>
          </table:table-cell>
          <table:table-cell office:value-type="percentage" office:value="-0.24649299681186701" table:style-name="ce5">
            <text:p>-24.65%</text:p>
          </table:table-cell>
          <table:table-cell office:value-type="percentage" office:value="-1.5819566324353201E-2" table:style-name="ce5">
            <text:p>-1.58%</text:p>
          </table:table-cell>
          <table:table-cell office:value-type="percentage" office:value="3.8135617505759001E-3" table:style-name="ce5">
            <text:p>0.38%</text:p>
          </table:table-cell>
          <table:table-cell office:value-type="percentage" office:value="1.8051123246550602E-2" table:style-name="ce5">
            <text:p>1.81%</text:p>
          </table:table-cell>
          <table:table-cell office:value-type="percentage" office:value="-1.6272820532321899E-2" table:style-name="ce5">
            <text:p>-1.63%</text:p>
          </table:table-cell>
          <table:table-cell office:value-type="percentage" office:value="1.3416546396911099E-2" table:style-name="ce5">
            <text:p>1.34%</text:p>
          </table:table-cell>
          <table:table-cell office:value-type="percentage" office:value="-4.7375462949275998E-2" table:style-name="ce5">
            <text:p>-4.74%</text:p>
          </table:table-cell>
          <table:table-cell table:number-columns-repeated="16362"/>
        </table:table-row>
        <table:table-row table:style-name="ro3">
          <table:table-cell office:value-type="date" office:date-value="2020-02-28T00:00:00" table:style-name="ce4">
            <text:p>2020-02</text:p>
          </table:table-cell>
          <table:table-cell office:value-type="percentage" office:value="-8.4110470000000007E-2" table:style-name="ce5">
            <text:p>-8.41%</text:p>
          </table:table-cell>
          <table:table-cell office:value-type="percentage" office:value="-0.107181079685688" table:style-name="ce5">
            <text:p>-10.72%</text:p>
          </table:table-cell>
          <table:table-cell office:value-type="percentage" office:value="-0.20927238464355499" table:style-name="ce5">
            <text:p>-20.93%</text:p>
          </table:table-cell>
          <table:table-cell office:value-type="percentage" office:value="-0.16058880090713501" table:style-name="ce5">
            <text:p>-16.06%</text:p>
          </table:table-cell>
          <table:table-cell office:value-type="percentage" office:value="-8.7160654366016405E-3" table:style-name="ce5">
            <text:p>-0.87%</text:p>
          </table:table-cell>
          <table:table-cell office:value-type="percentage" office:value="-0.136176288127899" table:style-name="ce5">
            <text:p>-13.62%</text:p>
          </table:table-cell>
          <table:table-cell office:value-type="percentage" office:value="-0.12979640066623699" table:style-name="ce5">
            <text:p>-12.98%</text:p>
          </table:table-cell>
          <table:table-cell office:value-type="percentage" office:value="-0.105192668735981" table:style-name="ce5">
            <text:p>-10.52%</text:p>
          </table:table-cell>
          <table:table-cell office:value-type="percentage" office:value="-0.11922506242990499" table:style-name="ce5">
            <text:p>-11.92%</text:p>
          </table:table-cell>
          <table:table-cell office:value-type="percentage" office:value="-0.149374574422836" table:style-name="ce5">
            <text:p>-14.94%</text:p>
          </table:table-cell>
          <table:table-cell office:value-type="percentage" office:value="6.9373212754726396E-2" table:style-name="ce5">
            <text:p>6.94%</text:p>
          </table:table-cell>
          <table:table-cell office:value-type="percentage" office:value="-0.1084214001894" table:style-name="ce5">
            <text:p>-10.84%</text:p>
          </table:table-cell>
          <table:table-cell office:value-type="percentage" office:value="-0.121667787432671" table:style-name="ce5">
            <text:p>-12.17%</text:p>
          </table:table-cell>
          <table:table-cell office:value-type="percentage" office:value="-9.5783092081546797E-2" table:style-name="ce5">
            <text:p>-9.58%</text:p>
          </table:table-cell>
          <table:table-cell office:value-type="percentage" office:value="-4.3166950345039402E-2" table:style-name="ce5">
            <text:p>-4.32%</text:p>
          </table:table-cell>
          <table:table-cell office:value-type="percentage" office:value="-5.9849261306226297E-3" table:style-name="ce5">
            <text:p>-0.60%</text:p>
          </table:table-cell>
          <table:table-cell office:value-type="percentage" office:value="-6.0693062841892201E-2" table:style-name="ce5">
            <text:p>-6.07%</text:p>
          </table:table-cell>
          <table:table-cell office:value-type="percentage" office:value="-0.137676477432251" table:style-name="ce5">
            <text:p>-13.77%</text:p>
          </table:table-cell>
          <table:table-cell office:value-type="percentage" office:value="-4.67535145580769E-2" table:style-name="ce5">
            <text:p>-4.68%</text:p>
          </table:table-cell>
          <table:table-cell office:value-type="percentage" office:value="2.2167526185512501E-2" table:style-name="ce5">
            <text:p>2.22%</text:p>
          </table:table-cell>
          <table:table-cell office:value-type="percentage" office:value="-0.169010490179062" table:style-name="ce5">
            <text:p>-16.90%</text:p>
          </table:table-cell>
          <table:table-cell table:number-columns-repeated="16362"/>
        </table:table-row>
        <table:table-row table:style-name="ro3">
          <table:table-cell office:value-type="date" office:date-value="2020-03-31T00:00:00" table:style-name="ce4">
            <text:p>2020-03</text:p>
          </table:table-cell>
          <table:table-cell office:value-type="percentage" office:value="-0.12511929999999999" table:style-name="ce5">
            <text:p>-12.51%</text:p>
          </table:table-cell>
          <table:table-cell office:value-type="percentage" office:value="-0.25810325145721402" table:style-name="ce5">
            <text:p>-25.81%</text:p>
          </table:table-cell>
          <table:table-cell office:value-type="percentage" office:value="-0.51343643665313698" table:style-name="ce5">
            <text:p>-51.34%</text:p>
          </table:table-cell>
          <table:table-cell office:value-type="percentage" office:value="-0.71303308010101296" table:style-name="ce5">
            <text:p>-71.30%</text:p>
          </table:table-cell>
          <table:table-cell office:value-type="percentage" office:value="-0.57220155000686701" table:style-name="ce5">
            <text:p>-57.22%</text:p>
          </table:table-cell>
          <table:table-cell office:value-type="percentage" office:value="-0.44258198142051702" table:style-name="ce5">
            <text:p>-44.26%</text:p>
          </table:table-cell>
          <table:table-cell office:value-type="percentage" office:value="-0.180595368146896" table:style-name="ce5">
            <text:p>-18.06%</text:p>
          </table:table-cell>
          <table:table-cell office:value-type="percentage" office:value="-0.46012726426124601" table:style-name="ce5">
            <text:p>-46.01%</text:p>
          </table:table-cell>
          <table:table-cell office:value-type="percentage" office:value="-0.40630286931991599" table:style-name="ce5">
            <text:p>-40.63%</text:p>
          </table:table-cell>
          <table:table-cell office:value-type="percentage" office:value="-0.17892055213451399" table:style-name="ce5">
            <text:p>-17.89%</text:p>
          </table:table-cell>
          <table:table-cell office:value-type="percentage" office:value="1.7532452940940899E-2" table:style-name="ce5">
            <text:p>1.75%</text:p>
          </table:table-cell>
          <table:table-cell office:value-type="percentage" office:value="-0.25193354487419101" table:style-name="ce5">
            <text:p>-25.19%</text:p>
          </table:table-cell>
          <table:table-cell office:value-type="percentage" office:value="-0.24357977509498599" table:style-name="ce5">
            <text:p>-24.36%</text:p>
          </table:table-cell>
          <table:table-cell office:value-type="percentage" office:value="-0.21062654256820701" table:style-name="ce5">
            <text:p>-21.06%</text:p>
          </table:table-cell>
          <table:table-cell office:value-type="percentage" office:value="-0.27196919918060303" table:style-name="ce5">
            <text:p>-27.20%</text:p>
          </table:table-cell>
          <table:table-cell office:value-type="percentage" office:value="2.32237819582224E-2" table:style-name="ce5">
            <text:p>2.32%</text:p>
          </table:table-cell>
          <table:table-cell office:value-type="percentage" office:value="-1.18378670886159E-2" table:style-name="ce5">
            <text:p>-1.18%</text:p>
          </table:table-cell>
          <table:table-cell office:value-type="percentage" office:value="0.103554122149944" table:style-name="ce5">
            <text:p>10.36%</text:p>
          </table:table-cell>
          <table:table-cell office:value-type="percentage" office:value="-0.13337142765522" table:style-name="ce5">
            <text:p>-13.34%</text:p>
          </table:table-cell>
          <table:table-cell office:value-type="percentage" office:value="-0.26024100184440602" table:style-name="ce5">
            <text:p>-26.02%</text:p>
          </table:table-cell>
          <table:table-cell office:value-type="percentage" office:value="1.60000137984753E-2" table:style-name="ce5">
            <text:p>1.60%</text:p>
          </table:table-cell>
          <table:table-cell table:number-columns-repeated="16362"/>
        </table:table-row>
        <table:table-row table:style-name="ro3">
          <table:table-cell office:value-type="date" office:date-value="2020-04-30T00:00:00" table:style-name="ce4">
            <text:p>2020-04</text:p>
          </table:table-cell>
          <table:table-cell office:value-type="percentage" office:value="0.12684409999999999" table:style-name="ce5">
            <text:p>12.68%</text:p>
          </table:table-cell>
          <table:table-cell office:value-type="percentage" office:value="0.130680456757546" table:style-name="ce5">
            <text:p>13.07%</text:p>
          </table:table-cell>
          <table:table-cell office:value-type="percentage" office:value="0.42627117037773099" table:style-name="ce5">
            <text:p>42.63%</text:p>
          </table:table-cell>
          <table:table-cell office:value-type="percentage" office:value="0.48888897895812999" table:style-name="ce5">
            <text:p>48.89%</text:p>
          </table:table-cell>
          <table:table-cell office:value-type="percentage" office:value="0.408695667982101" table:style-name="ce5">
            <text:p>40.87%</text:p>
          </table:table-cell>
          <table:table-cell office:value-type="percentage" office:value="0.42100018262863198" table:style-name="ce5">
            <text:p>42.10%</text:p>
          </table:table-cell>
          <table:table-cell office:value-type="percentage" office:value="-2.6517685502767601E-2" table:style-name="ce5">
            <text:p>-2.65%</text:p>
          </table:table-cell>
          <table:table-cell office:value-type="percentage" office:value="0.15742027759551999" table:style-name="ce5">
            <text:p>15.74%</text:p>
          </table:table-cell>
          <table:table-cell office:value-type="percentage" office:value="0.187744945287705" table:style-name="ce5">
            <text:p>18.77%</text:p>
          </table:table-cell>
          <table:table-cell office:value-type="percentage" office:value="0.11956524848937999" table:style-name="ce5">
            <text:p>11.96%</text:p>
          </table:table-cell>
          <table:table-cell office:value-type="percentage" office:value="0.118109203875065" table:style-name="ce5">
            <text:p>11.81%</text:p>
          </table:table-cell>
          <table:table-cell office:value-type="percentage" office:value="-1.29784466698766E-2" table:style-name="ce5">
            <text:p>-1.30%</text:p>
          </table:table-cell>
          <table:table-cell office:value-type="percentage" office:value="0.15329214930534399" table:style-name="ce5">
            <text:p>15.33%</text:p>
          </table:table-cell>
          <table:table-cell office:value-type="percentage" office:value="0.100553631782532" table:style-name="ce5">
            <text:p>10.06%</text:p>
          </table:table-cell>
          <table:table-cell office:value-type="percentage" office:value="0.31063959002494801" table:style-name="ce5">
            <text:p>31.06%</text:p>
          </table:table-cell>
          <table:table-cell office:value-type="percentage" office:value="7.8345663845539107E-2" table:style-name="ce5">
            <text:p>7.83%</text:p>
          </table:table-cell>
          <table:table-cell office:value-type="percentage" office:value="0.14066091179847701" table:style-name="ce5">
            <text:p>14.07%</text:p>
          </table:table-cell>
          <table:table-cell office:value-type="percentage" office:value="2.0571641623973898E-2" table:style-name="ce5">
            <text:p>2.06%</text:p>
          </table:table-cell>
          <table:table-cell office:value-type="percentage" office:value="0.227278187870979" table:style-name="ce5">
            <text:p>22.73%</text:p>
          </table:table-cell>
          <table:table-cell office:value-type="percentage" office:value="0.16775247454643299" table:style-name="ce5">
            <text:p>16.78%</text:p>
          </table:table-cell>
          <table:table-cell office:value-type="percentage" office:value="0.16535429656505601" table:style-name="ce5">
            <text:p>16.54%</text:p>
          </table:table-cell>
          <table:table-cell table:number-columns-repeated="16362"/>
        </table:table-row>
        <table:table-row table:style-name="ro3">
          <table:table-cell office:value-type="date" office:date-value="2020-05-29T00:00:00" table:style-name="ce4">
            <text:p>2020-05</text:p>
          </table:table-cell>
          <table:table-cell office:value-type="percentage" office:value="4.5281780000000001E-2" table:style-name="ce5">
            <text:p>4.53%</text:p>
          </table:table-cell>
          <table:table-cell office:value-type="percentage" office:value="-1.6660105902701599E-3" table:style-name="ce5">
            <text:p>-0.17%</text:p>
          </table:table-cell>
          <table:table-cell office:value-type="percentage" office:value="2.0796220749616599E-2" table:style-name="ce5">
            <text:p>2.08%</text:p>
          </table:table-cell>
          <table:table-cell office:value-type="percentage" office:value="0.65391784906387296" table:style-name="ce5">
            <text:p>65.39%</text:p>
          </table:table-cell>
          <table:table-cell office:value-type="percentage" office:value="0.84118980169296298" table:style-name="ce5">
            <text:p>84.12%</text:p>
          </table:table-cell>
          <table:table-cell office:value-type="percentage" office:value="-2.6306560263037699E-2" table:style-name="ce5">
            <text:p>-2.63%</text:p>
          </table:table-cell>
          <table:table-cell office:value-type="percentage" office:value="0.32378762960433999" table:style-name="ce5">
            <text:p>32.38%</text:p>
          </table:table-cell>
          <table:table-cell office:value-type="percentage" office:value="0.28100648522376998" table:style-name="ce5">
            <text:p>28.10%</text:p>
          </table:table-cell>
          <table:table-cell office:value-type="percentage" office:value="0.20395918190479301" table:style-name="ce5">
            <text:p>20.40%</text:p>
          </table:table-cell>
          <table:table-cell office:value-type="percentage" office:value="8.46047252416611E-2" table:style-name="ce5">
            <text:p>8.46%</text:p>
          </table:table-cell>
          <table:table-cell office:value-type="percentage" office:value="-2.8580473735928498E-4" table:style-name="ce5">
            <text:p>-0.03%</text:p>
          </table:table-cell>
          <table:table-cell office:value-type="percentage" office:value="9.5609560608863803E-2" table:style-name="ce5">
            <text:p>9.56%</text:p>
          </table:table-cell>
          <table:table-cell office:value-type="percentage" office:value="-2.9884034767746901E-2" table:style-name="ce5">
            <text:p>-2.99%</text:p>
          </table:table-cell>
          <table:table-cell office:value-type="percentage" office:value="-4.0275650098919903E-3" table:style-name="ce5">
            <text:p>-0.40%</text:p>
          </table:table-cell>
          <table:table-cell office:value-type="percentage" office:value="4.0476705878973E-2" table:style-name="ce5">
            <text:p>4.05%</text:p>
          </table:table-cell>
          <table:table-cell office:value-type="percentage" office:value="0.12945243716239899" table:style-name="ce5">
            <text:p>12.95%</text:p>
          </table:table-cell>
          <table:table-cell office:value-type="percentage" office:value="7.5441926717758206E-2" table:style-name="ce5">
            <text:p>7.54%</text:p>
          </table:table-cell>
          <table:table-cell office:value-type="percentage" office:value="0.12490701675415" table:style-name="ce5">
            <text:p>12.49%</text:p>
          </table:table-cell>
          <table:table-cell office:value-type="percentage" office:value="9.9555417895317105E-2" table:style-name="ce5">
            <text:p>9.96%</text:p>
          </table:table-cell>
          <table:table-cell office:value-type="percentage" office:value="7.98465460538864E-2" table:style-name="ce5">
            <text:p>7.98%</text:p>
          </table:table-cell>
          <table:table-cell office:value-type="percentage" office:value="0.15696468949317899" table:style-name="ce5">
            <text:p>15.70%</text:p>
          </table:table-cell>
          <table:table-cell table:number-columns-repeated="16362"/>
        </table:table-row>
        <table:table-row table:style-name="ro3">
          <table:table-cell office:value-type="date" office:date-value="2020-06-30T00:00:00" table:style-name="ce4">
            <text:p>2020-06</text:p>
          </table:table-cell>
          <table:table-cell office:value-type="percentage" office:value="1.8388399999999999E-2" table:style-name="ce5">
            <text:p>1.84%</text:p>
          </table:table-cell>
          <table:table-cell office:value-type="percentage" office:value="-5.0062533468008E-2" table:style-name="ce5">
            <text:p>-5.01%</text:p>
          </table:table-cell>
          <table:table-cell office:value-type="percentage" office:value="-2.1973285824060398E-2" table:style-name="ce5">
            <text:p>-2.20%</text:p>
          </table:table-cell>
          <table:table-cell office:value-type="percentage" office:value="0.12972369790077201" table:style-name="ce5">
            <text:p>12.97%</text:p>
          </table:table-cell>
          <table:table-cell office:value-type="percentage" office:value="-6.9186232984065996E-2" table:style-name="ce5">
            <text:p>-6.92%</text:p>
          </table:table-cell>
          <table:table-cell office:value-type="percentage" office:value="-0.105547562241554" table:style-name="ce5">
            <text:p>-10.55%</text:p>
          </table:table-cell>
          <table:table-cell office:value-type="percentage" office:value="3.6179674789309502E-3" table:style-name="ce5">
            <text:p>0.36%</text:p>
          </table:table-cell>
          <table:table-cell office:value-type="percentage" office:value="-2.2450868040323299E-2" table:style-name="ce5">
            <text:p>-2.25%</text:p>
          </table:table-cell>
          <table:table-cell office:value-type="percentage" office:value="-0.15097154676914201" table:style-name="ce5">
            <text:p>-15.10%</text:p>
          </table:table-cell>
          <table:table-cell office:value-type="percentage" office:value="-4.9360621720552403E-2" table:style-name="ce5">
            <text:p>-4.94%</text:p>
          </table:table-cell>
          <table:table-cell office:value-type="percentage" office:value="8.4125503897666903E-2" table:style-name="ce5">
            <text:p>8.41%</text:p>
          </table:table-cell>
          <table:table-cell office:value-type="percentage" office:value="-9.8250567913055406E-2" table:style-name="ce5">
            <text:p>-9.83%</text:p>
          </table:table-cell>
          <table:table-cell office:value-type="percentage" office:value="-2.98850405961275E-2" table:style-name="ce5">
            <text:p>-2.99%</text:p>
          </table:table-cell>
          <table:table-cell office:value-type="percentage" office:value="-0.13913148641586301" table:style-name="ce5">
            <text:p>-13.91%</text:p>
          </table:table-cell>
          <table:table-cell office:value-type="percentage" office:value="-5.8353137224912602E-2" table:style-name="ce5">
            <text:p>-5.84%</text:p>
          </table:table-cell>
          <table:table-cell office:value-type="percentage" office:value="5.4459545761346803E-2" table:style-name="ce5">
            <text:p>5.45%</text:p>
          </table:table-cell>
          <table:table-cell office:value-type="percentage" office:value="7.4625700712203993E-2" table:style-name="ce5">
            <text:p>7.46%</text:p>
          </table:table-cell>
          <table:table-cell office:value-type="percentage" office:value="2.4968856945633899E-2" table:style-name="ce5">
            <text:p>2.50%</text:p>
          </table:table-cell>
          <table:table-cell office:value-type="percentage" office:value="8.7965307757258398E-3" table:style-name="ce5">
            <text:p>0.88%</text:p>
          </table:table-cell>
          <table:table-cell office:value-type="percentage" office:value="-3.81013378500938E-2" table:style-name="ce5">
            <text:p>-3.81%</text:p>
          </table:table-cell>
          <table:table-cell office:value-type="percentage" office:value="0.20226866006851199" table:style-name="ce5">
            <text:p>20.23%</text:p>
          </table:table-cell>
          <table:table-cell table:number-columns-repeated="16362"/>
        </table:table-row>
        <table:table-row table:style-name="ro3">
          <table:table-cell office:value-type="date" office:date-value="2020-07-31T00:00:00" table:style-name="ce4">
            <text:p>2020-07</text:p>
          </table:table-cell>
          <table:table-cell office:value-type="percentage" office:value="5.5101299999999999E-2" table:style-name="ce5">
            <text:p>5.51%</text:p>
          </table:table-cell>
          <table:table-cell office:value-type="percentage" office:value="-4.17215973138809E-2" table:style-name="ce5">
            <text:p>-4.17%</text:p>
          </table:table-cell>
          <table:table-cell office:value-type="percentage" office:value="-4.2261853814125103E-2" table:style-name="ce5">
            <text:p>-4.23%</text:p>
          </table:table-cell>
          <table:table-cell office:value-type="percentage" office:value="-0.22491267323493999" table:style-name="ce5">
            <text:p>-22.49%</text:p>
          </table:table-cell>
          <table:table-cell office:value-type="percentage" office:value="0.10838236659765201" table:style-name="ce5">
            <text:p>10.84%</text:p>
          </table:table-cell>
          <table:table-cell office:value-type="percentage" office:value="-2.7654686942696599E-2" table:style-name="ce5">
            <text:p>-2.77%</text:p>
          </table:table-cell>
          <table:table-cell office:value-type="percentage" office:value="4.0330532938242E-2" table:style-name="ce5">
            <text:p>4.03%</text:p>
          </table:table-cell>
          <table:table-cell office:value-type="percentage" office:value="0.13253590464591999" table:style-name="ce5">
            <text:p>13.25%</text:p>
          </table:table-cell>
          <table:table-cell office:value-type="percentage" office:value="6.1913046985864598E-2" table:style-name="ce5">
            <text:p>6.19%</text:p>
          </table:table-cell>
          <table:table-cell office:value-type="percentage" office:value="4.8695184290409102E-2" table:style-name="ce5">
            <text:p>4.87%</text:p>
          </table:table-cell>
          <table:table-cell office:value-type="percentage" office:value="7.4367076158523601E-2" table:style-name="ce5">
            <text:p>7.44%</text:p>
          </table:table-cell>
          <table:table-cell office:value-type="percentage" office:value="5.5944044142961502E-2" table:style-name="ce5">
            <text:p>5.59%</text:p>
          </table:table-cell>
          <table:table-cell office:value-type="percentage" office:value="0" table:style-name="ce5">
            <text:p>0.00%</text:p>
          </table:table-cell>
          <table:table-cell office:value-type="percentage" office:value="4.6293165534734698E-2" table:style-name="ce5">
            <text:p>4.63%</text:p>
          </table:table-cell>
          <table:table-cell office:value-type="percentage" office:value="7.2727270424365997E-2" table:style-name="ce5">
            <text:p>7.27%</text:p>
          </table:table-cell>
          <table:table-cell office:value-type="percentage" office:value="8.86692404747009E-2" table:style-name="ce5">
            <text:p>8.87%</text:p>
          </table:table-cell>
          <table:table-cell office:value-type="percentage" office:value="7.2472482919692993E-2" table:style-name="ce5">
            <text:p>7.25%</text:p>
          </table:table-cell>
          <table:table-cell office:value-type="percentage" office:value="0.17518088221549999" table:style-name="ce5">
            <text:p>17.52%</text:p>
          </table:table-cell>
          <table:table-cell office:value-type="percentage" office:value="0.117144450545311" table:style-name="ce5">
            <text:p>11.71%</text:p>
          </table:table-cell>
          <table:table-cell office:value-type="percentage" office:value="0.22188654541969299" table:style-name="ce5">
            <text:p>22.19%</text:p>
          </table:table-cell>
          <table:table-cell office:value-type="percentage" office:value="-8.3046816289424896E-3" table:style-name="ce5">
            <text:p>-0.83%</text:p>
          </table:table-cell>
          <table:table-cell table:number-columns-repeated="16362"/>
        </table:table-row>
        <table:table-row table:style-name="ro3">
          <table:table-cell office:value-type="date" office:date-value="2020-08-31T00:00:00" table:style-name="ce4">
            <text:p>2020-08</text:p>
          </table:table-cell>
          <table:table-cell office:value-type="percentage" office:value="7.0064689999999999E-2" table:style-name="ce5">
            <text:p>7.01%</text:p>
          </table:table-cell>
          <table:table-cell office:value-type="percentage" office:value="0.162007331848145" table:style-name="ce5">
            <text:p>16.20%</text:p>
          </table:table-cell>
          <table:table-cell office:value-type="percentage" office:value="0.39838406443595897" table:style-name="ce5">
            <text:p>39.84%</text:p>
          </table:table-cell>
          <table:table-cell office:value-type="percentage" office:value="0.47504025697708102" table:style-name="ce5">
            <text:p>47.50%</text:p>
          </table:table-cell>
          <table:table-cell office:value-type="percentage" office:value="0.50960117578506503" table:style-name="ce5">
            <text:p>50.96%</text:p>
          </table:table-cell>
          <table:table-cell office:value-type="percentage" office:value="0.207372590899468" table:style-name="ce5">
            <text:p>20.74%</text:p>
          </table:table-cell>
          <table:table-cell office:value-type="percentage" office:value="0.26162278652191201" table:style-name="ce5">
            <text:p>26.16%</text:p>
          </table:table-cell>
          <table:table-cell office:value-type="percentage" office:value="0.131389975547791" table:style-name="ce5">
            <text:p>13.14%</text:p>
          </table:table-cell>
          <table:table-cell office:value-type="percentage" office:value="0.271345674991608" table:style-name="ce5">
            <text:p>27.13%</text:p>
          </table:table-cell>
          <table:table-cell office:value-type="percentage" office:value="0.12767224013805401" table:style-name="ce5">
            <text:p>12.77%</text:p>
          </table:table-cell>
          <table:table-cell office:value-type="percentage" office:value="8.3210587501525907E-2" table:style-name="ce5">
            <text:p>8.32%</text:p>
          </table:table-cell>
          <table:table-cell office:value-type="percentage" office:value="0.21341589093208299" table:style-name="ce5">
            <text:p>21.34%</text:p>
          </table:table-cell>
          <table:table-cell office:value-type="percentage" office:value="4.5734602957963902E-2" table:style-name="ce5">
            <text:p>4.57%</text:p>
          </table:table-cell>
          <table:table-cell office:value-type="percentage" office:value="6.7083075642585796E-2" table:style-name="ce5">
            <text:p>6.71%</text:p>
          </table:table-cell>
          <table:table-cell office:value-type="percentage" office:value="-5.4494760930538198E-2" table:style-name="ce5">
            <text:p>-5.45%</text:p>
          </table:table-cell>
          <table:table-cell office:value-type="percentage" office:value="1.07708992436528E-2" table:style-name="ce5">
            <text:p>1.08%</text:p>
          </table:table-cell>
          <table:table-cell office:value-type="percentage" office:value="-1.51814287528396E-2" table:style-name="ce5">
            <text:p>-1.52%</text:p>
          </table:table-cell>
          <table:table-cell office:value-type="percentage" office:value="4.3714169412851299E-2" table:style-name="ce5">
            <text:p>4.37%</text:p>
          </table:table-cell>
          <table:table-cell office:value-type="percentage" office:value="0.155832439661026" table:style-name="ce5">
            <text:p>15.58%</text:p>
          </table:table-cell>
          <table:table-cell office:value-type="percentage" office:value="0.114835165441036" table:style-name="ce5">
            <text:p>11.48%</text:p>
          </table:table-cell>
          <table:table-cell office:value-type="percentage" office:value="8.7439179420471205E-2" table:style-name="ce5">
            <text:p>8.74%</text:p>
          </table:table-cell>
          <table:table-cell table:number-columns-repeated="16362"/>
        </table:table-row>
        <table:table-row table:style-name="ro3">
          <table:table-cell office:value-type="date" office:date-value="2020-09-30T00:00:00" table:style-name="ce4">
            <text:p>2020-09</text:p>
          </table:table-cell>
          <table:table-cell office:value-type="percentage" office:value="-3.9227959999999999E-2" table:style-name="ce5">
            <text:p>-3.92%</text:p>
          </table:table-cell>
          <table:table-cell office:value-type="percentage" office:value="-7.9865887761116E-2" table:style-name="ce5">
            <text:p>-7.99%</text:p>
          </table:table-cell>
          <table:table-cell office:value-type="percentage" office:value="-3.3222220838069902E-2" table:style-name="ce5">
            <text:p>-3.32%</text:p>
          </table:table-cell>
          <table:table-cell office:value-type="percentage" office:value="0.22401751577854201" table:style-name="ce5">
            <text:p>22.40%</text:p>
          </table:table-cell>
          <table:table-cell office:value-type="percentage" office:value="0.42270058393478399" table:style-name="ce5">
            <text:p>42.27%</text:p>
          </table:table-cell>
          <table:table-cell office:value-type="percentage" office:value="-0.17884504795074499" table:style-name="ce5">
            <text:p>-17.88%</text:p>
          </table:table-cell>
          <table:table-cell office:value-type="percentage" office:value="-6.2600068747997298E-2" table:style-name="ce5">
            <text:p>-6.26%</text:p>
          </table:table-cell>
          <table:table-cell office:value-type="percentage" office:value="0.146004468202591" table:style-name="ce5">
            <text:p>14.60%</text:p>
          </table:table-cell>
          <table:table-cell office:value-type="percentage" office:value="-3.0645510181784599E-2" table:style-name="ce5">
            <text:p>-3.06%</text:p>
          </table:table-cell>
          <table:table-cell office:value-type="percentage" office:value="-5.9073280543088899E-2" table:style-name="ce5">
            <text:p>-5.91%</text:p>
          </table:table-cell>
          <table:table-cell office:value-type="percentage" office:value="-5.5763274431228603E-2" table:style-name="ce5">
            <text:p>-5.58%</text:p>
          </table:table-cell>
          <table:table-cell office:value-type="percentage" office:value="-5.1408417522907299E-2" table:style-name="ce5">
            <text:p>-5.14%</text:p>
          </table:table-cell>
          <table:table-cell office:value-type="percentage" office:value="-1.3369592837989301E-2" table:style-name="ce5">
            <text:p>-1.34%</text:p>
          </table:table-cell>
          <table:table-cell office:value-type="percentage" office:value="-8.2439050078392001E-2" table:style-name="ce5">
            <text:p>-8.24%</text:p>
          </table:table-cell>
          <table:table-cell office:value-type="percentage" office:value="-7.8965246677398696E-2" table:style-name="ce5">
            <text:p>-7.90%</text:p>
          </table:table-cell>
          <table:table-cell office:value-type="percentage" office:value="-3.0771071091294299E-2" table:style-name="ce5">
            <text:p>-3.08%</text:p>
          </table:table-cell>
          <table:table-cell office:value-type="percentage" office:value="-6.4960189163684803E-2" table:style-name="ce5">
            <text:p>-6.50%</text:p>
          </table:table-cell>
          <table:table-cell office:value-type="percentage" office:value="-3.4873537719249698E-2" table:style-name="ce5">
            <text:p>-3.49%</text:p>
          </table:table-cell>
          <table:table-cell office:value-type="percentage" office:value="-0.10675312578678101" table:style-name="ce5">
            <text:p>-10.68%</text:p>
          </table:table-cell>
          <table:table-cell office:value-type="percentage" office:value="9.6599258482456193E-2" table:style-name="ce5">
            <text:p>9.66%</text:p>
          </table:table-cell>
          <table:table-cell office:value-type="percentage" office:value="-9.2227682471275295E-3" table:style-name="ce5">
            <text:p>-0.92%</text:p>
          </table:table-cell>
          <table:table-cell table:number-columns-repeated="16362"/>
        </table:table-row>
        <table:table-row table:style-name="ro3">
          <table:table-cell office:value-type="date" office:date-value="2020-10-30T00:00:00" table:style-name="ce4">
            <text:p>2020-10</text:p>
          </table:table-cell>
          <table:table-cell office:value-type="percentage" office:value="-2.7665780000000001E-2" table:style-name="ce5">
            <text:p>-2.77%</text:p>
          </table:table-cell>
          <table:table-cell office:value-type="percentage" office:value="3.0004318803548799E-2" table:style-name="ce5">
            <text:p>3.00%</text:p>
          </table:table-cell>
          <table:table-cell office:value-type="percentage" office:value="-5.4252889007329899E-2" table:style-name="ce5">
            <text:p>-5.43%</text:p>
          </table:table-cell>
          <table:table-cell office:value-type="percentage" office:value="-0.20049948990345001" table:style-name="ce5">
            <text:p>-20.05%</text:p>
          </table:table-cell>
          <table:table-cell office:value-type="percentage" office:value="-0.25749653577804599" table:style-name="ce5">
            <text:p>-25.75%</text:p>
          </table:table-cell>
          <table:table-cell office:value-type="percentage" office:value="8.6339339613914507E-3" table:style-name="ce5">
            <text:p>0.86%</text:p>
          </table:table-cell>
          <table:table-cell office:value-type="percentage" office:value="-8.9549586176872295E-2" table:style-name="ce5">
            <text:p>-8.95%</text:p>
          </table:table-cell>
          <table:table-cell office:value-type="percentage" office:value="3.3561378717422499E-2" table:style-name="ce5">
            <text:p>3.36%</text:p>
          </table:table-cell>
          <table:table-cell office:value-type="percentage" office:value="-2.7130024507641799E-2" table:style-name="ce5">
            <text:p>-2.71%</text:p>
          </table:table-cell>
          <table:table-cell office:value-type="percentage" office:value="-2.28078812360764E-2" table:style-name="ce5">
            <text:p>-2.28%</text:p>
          </table:table-cell>
          <table:table-cell office:value-type="percentage" office:value="-4.8577103763818699E-2" table:style-name="ce5">
            <text:p>-4.86%</text:p>
          </table:table-cell>
          <table:table-cell office:value-type="percentage" office:value="-9.4283625483512906E-2" table:style-name="ce5">
            <text:p>-9.43%</text:p>
          </table:table-cell>
          <table:table-cell office:value-type="percentage" office:value="-7.0280231535434695E-2" table:style-name="ce5">
            <text:p>-7.03%</text:p>
          </table:table-cell>
          <table:table-cell office:value-type="percentage" office:value="-5.8745324611663798E-2" table:style-name="ce5">
            <text:p>-5.87%</text:p>
          </table:table-cell>
          <table:table-cell office:value-type="percentage" office:value="-0.101556718349457" table:style-name="ce5">
            <text:p>-10.16%</text:p>
          </table:table-cell>
          <table:table-cell office:value-type="percentage" office:value="-6.4484171569347395E-2" table:style-name="ce5">
            <text:p>-6.45%</text:p>
          </table:table-cell>
          <table:table-cell office:value-type="percentage" office:value="-8.1128761172294603E-2" table:style-name="ce5">
            <text:p>-8.11%</text:p>
          </table:table-cell>
          <table:table-cell office:value-type="percentage" office:value="-6.2341138720512397E-2" table:style-name="ce5">
            <text:p>-6.23%</text:p>
          </table:table-cell>
          <table:table-cell office:value-type="percentage" office:value="4.6200514771044298E-3" table:style-name="ce5">
            <text:p>0.46%</text:p>
          </table:table-cell>
          <table:table-cell office:value-type="percentage" office:value="-7.0561781525611905E-2" table:style-name="ce5">
            <text:p>-7.06%</text:p>
          </table:table-cell>
          <table:table-cell office:value-type="percentage" office:value="5.5399883538484601E-2" table:style-name="ce5">
            <text:p>5.54%</text:p>
          </table:table-cell>
          <table:table-cell table:number-columns-repeated="16362"/>
        </table:table-row>
        <table:table-row table:style-name="ro3">
          <table:table-cell office:value-type="date" office:date-value="2020-11-30T00:00:00" table:style-name="ce4">
            <text:p>2020-11</text:p>
          </table:table-cell>
          <table:table-cell office:value-type="percentage" office:value="0.10754569999999999" table:style-name="ce5">
            <text:p>10.75%</text:p>
          </table:table-cell>
          <table:table-cell office:value-type="percentage" office:value="0.15917597711086301" table:style-name="ce5">
            <text:p>15.92%</text:p>
          </table:table-cell>
          <table:table-cell office:value-type="percentage" office:value="0.37335929274558999" table:style-name="ce5">
            <text:p>37.34%</text:p>
          </table:table-cell>
          <table:table-cell office:value-type="percentage" office:value="0.51985728740692105" table:style-name="ce5">
            <text:p>51.99%</text:p>
          </table:table-cell>
          <table:table-cell office:value-type="percentage" office:value="0.296776592731476" table:style-name="ce5">
            <text:p>29.68%</text:p>
          </table:table-cell>
          <table:table-cell office:value-type="percentage" office:value="0.38754659891128501" table:style-name="ce5">
            <text:p>38.75%</text:p>
          </table:table-cell>
          <table:table-cell office:value-type="percentage" office:value="0.20630241930484799" table:style-name="ce5">
            <text:p>20.63%</text:p>
          </table:table-cell>
          <table:table-cell office:value-type="percentage" office:value="0.21343009173870101" table:style-name="ce5">
            <text:p>21.34%</text:p>
          </table:table-cell>
          <table:table-cell office:value-type="percentage" office:value="0.27264350652694702" table:style-name="ce5">
            <text:p>27.26%</text:p>
          </table:table-cell>
          <table:table-cell office:value-type="percentage" office:value="0.220700979232788" table:style-name="ce5">
            <text:p>22.07%</text:p>
          </table:table-cell>
          <table:table-cell office:value-type="percentage" office:value="3.1445793807506603E-2" table:style-name="ce5">
            <text:p>3.14%</text:p>
          </table:table-cell>
          <table:table-cell office:value-type="percentage" office:value="0.345286935567856" table:style-name="ce5">
            <text:p>34.53%</text:p>
          </table:table-cell>
          <table:table-cell office:value-type="percentage" office:value="0.329545468091965" table:style-name="ce5">
            <text:p>32.95%</text:p>
          </table:table-cell>
          <table:table-cell office:value-type="percentage" office:value="0.19598980247974401" table:style-name="ce5">
            <text:p>19.60%</text:p>
          </table:table-cell>
          <table:table-cell office:value-type="percentage" office:value="0.18371838331222501" table:style-name="ce5">
            <text:p>18.37%</text:p>
          </table:table-cell>
          <table:table-cell office:value-type="percentage" office:value="4.9518022686243099E-2" table:style-name="ce5">
            <text:p>4.95%</text:p>
          </table:table-cell>
          <table:table-cell office:value-type="percentage" office:value="6.6093616187572493E-2" table:style-name="ce5">
            <text:p>6.61%</text:p>
          </table:table-cell>
          <table:table-cell office:value-type="percentage" office:value="0.165182009339333" table:style-name="ce5">
            <text:p>16.52%</text:p>
          </table:table-cell>
          <table:table-cell office:value-type="percentage" office:value="5.26776500046253E-2" table:style-name="ce5">
            <text:p>5.27%</text:p>
          </table:table-cell>
          <table:table-cell office:value-type="percentage" office:value="0.12451638281345399" table:style-name="ce5">
            <text:p>12.45%</text:p>
          </table:table-cell>
          <table:table-cell office:value-type="percentage" office:value="0.192070633172989" table:style-name="ce5">
            <text:p>19.21%</text:p>
          </table:table-cell>
          <table:table-cell table:number-columns-repeated="16362"/>
        </table:table-row>
        <table:table-row table:style-name="ro3">
          <table:table-cell office:value-type="date" office:date-value="2020-12-31T00:00:00" table:style-name="ce4">
            <text:p>2020-12</text:p>
          </table:table-cell>
          <table:table-cell office:value-type="percentage" office:value="3.7121410000000001E-2" table:style-name="ce5">
            <text:p>3.71%</text:p>
          </table:table-cell>
          <table:table-cell office:value-type="percentage" office:value="6.9825872778892503E-2" table:style-name="ce5">
            <text:p>6.98%</text:p>
          </table:table-cell>
          <table:table-cell office:value-type="percentage" office:value="0.115486733615398" table:style-name="ce5">
            <text:p>11.55%</text:p>
          </table:table-cell>
          <table:table-cell office:value-type="percentage" office:value="9.0281762182712597E-2" table:style-name="ce5">
            <text:p>9.03%</text:p>
          </table:table-cell>
          <table:table-cell office:value-type="percentage" office:value="0.23385718464851399" table:style-name="ce5">
            <text:p>23.39%</text:p>
          </table:table-cell>
          <table:table-cell office:value-type="percentage" office:value="0.122686587274075" table:style-name="ce5">
            <text:p>12.27%</text:p>
          </table:table-cell>
          <table:table-cell office:value-type="percentage" office:value="8.6104907095432295E-2" table:style-name="ce5">
            <text:p>8.61%</text:p>
          </table:table-cell>
          <table:table-cell office:value-type="percentage" office:value="0.11509473621845299" table:style-name="ce5">
            <text:p>11.51%</text:p>
          </table:table-cell>
          <table:table-cell office:value-type="percentage" office:value="0.10865627974271801" table:style-name="ce5">
            <text:p>10.87%</text:p>
          </table:table-cell>
          <table:table-cell office:value-type="percentage" office:value="0.224106475710869" table:style-name="ce5">
            <text:p>22.41%</text:p>
          </table:table-cell>
          <table:table-cell office:value-type="percentage" office:value="0.10195632278919201" table:style-name="ce5">
            <text:p>10.20%</text:p>
          </table:table-cell>
          <table:table-cell office:value-type="percentage" office:value="0.119268871843815" table:style-name="ce5">
            <text:p>11.93%</text:p>
          </table:table-cell>
          <table:table-cell office:value-type="percentage" office:value="0.118171691894531" table:style-name="ce5">
            <text:p>11.82%</text:p>
          </table:table-cell>
          <table:table-cell office:value-type="percentage" office:value="8.6776934564113603E-2" table:style-name="ce5">
            <text:p>8.68%</text:p>
          </table:table-cell>
          <table:table-cell office:value-type="percentage" office:value="0.11919140815734899" table:style-name="ce5">
            <text:p>11.92%</text:p>
          </table:table-cell>
          <table:table-cell office:value-type="percentage" office:value="0.168218344449997" table:style-name="ce5">
            <text:p>16.82%</text:p>
          </table:table-cell>
          <table:table-cell office:value-type="percentage" office:value="0.12540122866630601" table:style-name="ce5">
            <text:p>12.54%</text:p>
          </table:table-cell>
          <table:table-cell office:value-type="percentage" office:value="0.15112735331058499" table:style-name="ce5">
            <text:p>15.11%</text:p>
          </table:table-cell>
          <table:table-cell office:value-type="percentage" office:value="-1.37559939175844E-2" table:style-name="ce5">
            <text:p>-1.38%</text:p>
          </table:table-cell>
          <table:table-cell office:value-type="percentage" office:value="0.16426582634449" table:style-name="ce5">
            <text:p>16.43%</text:p>
          </table:table-cell>
          <table:table-cell office:value-type="percentage" office:value="8.6056999862194103E-2" table:style-name="ce5">
            <text:p>8.61%</text:p>
          </table:table-cell>
          <table:table-cell table:number-columns-repeated="16362"/>
        </table:table-row>
        <table:table-row table:number-rows-repeated="1048513" table:style-name="ro3">
          <table:table-cell table:number-columns-repeated="16384"/>
        </table:table-row>
      </table:table>
      <table:table table:name="Equity_Betas" table:style-name="ta3">
        <table:table-column table:style-name="co11" table:default-cell-style-name="ce1"/>
        <table:table-column table:style-name="co25" table:default-cell-style-name="ce1"/>
        <table:table-column table:style-name="co26" table:default-cell-style-name="ce1"/>
        <table:table-column table:style-name="co11" table:default-cell-style-name="ce1"/>
        <table:table-column table:style-name="co27" table:default-cell-style-name="ce1"/>
        <table:table-column table:style-name="co28" table:default-cell-style-name="ce1"/>
        <table:table-column table:style-name="co4" table:number-columns-repeated="16378" table:default-cell-style-name="ce1"/>
        <table:table-row table:style-name="ro1">
          <table:table-cell office:value-type="string" table:number-columns-spanned="6" table:number-rows-spanned="1" table:style-name="ce6">
            <text:p>Equity Betas: five years regression vs S&amp;P 500 (from Returns)</text:p>
          </table:table-cell>
          <table:covered-table-cell table:number-columns-repeated="5"/>
          <table:table-cell table:number-columns-repeated="16378" table:style-name="ce1"/>
        </table:table-row>
        <table:table-row table:style-name="ro3">
          <table:table-cell office:value-type="string" table:number-columns-spanned="6" table:number-rows-spanned="1" table:style-name="ce8">
            <text:p>Method: βe = SLOPE(firm returns, S&amp;P 500 returns) over Jan 2016 – Dec 2020</text:p>
          </table:table-cell>
          <table:covered-table-cell table:number-columns-repeated="5"/>
          <table:table-cell table:style-name="ce7"/>
          <table:table-cell table:number-columns-repeated="16377"/>
        </table:table-row>
        <table:table-row table:style-name="ro2">
          <table:table-cell table:number-columns-repeated="6" table:style-name="ce37"/>
          <table:table-cell table:number-columns-repeated="16378" table:style-name="ce1"/>
        </table:table-row>
        <table:table-row table:style-name="ro2">
          <table:table-cell office:value-type="string" table:style-name="ce54">
            <text:p>Firm</text:p>
          </table:table-cell>
          <table:table-cell office:value-type="string" table:style-name="ce54">
            <text:p>Equity Beta (βe)</text:p>
          </table:table-cell>
          <table:table-cell office:value-type="string" table:style-name="ce54">
            <text:p>R²</text:p>
          </table:table-cell>
          <table:table-cell office:value-type="string" table:style-name="ce54">
            <text:p>StDev of returns</text:p>
          </table:table-cell>
          <table:table-cell office:value-type="string" table:style-name="ce54">
            <text:p>Intercept (α)</text:p>
          </table:table-cell>
          <table:table-cell office:value-type="string" table:style-name="ce54">
            <text:p>GICS Group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51">
            <text:p>Penn Entertainment</text:p>
          </table:table-cell>
          <table:table-cell office:value-type="float" office:value="2.7915455117456096" table:formula="of:=SLOPE([Returns.$F$4:.$F$63];[Returns.$B$4:.$B$63])" table:style-name="ce52">
            <text:p>2.79</text:p>
          </table:table-cell>
          <table:table-cell office:value-type="float" office:value="0.37958264659670621" table:formula="of:=RSQ([Returns.$F$4:.$F$63];[Returns.$B$4:.$B$63])" table:style-name="ce52">
            <text:p>0.38</text:p>
          </table:table-cell>
          <table:table-cell office:value-type="percentage" office:value="0.1993767620589863" table:formula="of:=STDEV([Returns.$F$4:.$F$63])" table:style-name="ce53">
            <text:p>19.94%</text:p>
          </table:table-cell>
          <table:table-cell office:value-type="percentage" office:value="1.6136255143015286E-2" table:formula="of:=INTERCEPT([Returns.$F$4:.$F$63];[Returns.$B$4:.$B$63])" table:style-name="ce53">
            <text:p>1.61%</text:p>
          </table:table-cell>
          <table:table-cell office:value-type="string" table:style-name="ce51">
            <text:p>Casinos &amp; Gaming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8">
            <text:p>Caesars</text:p>
          </table:table-cell>
          <table:table-cell office:value-type="float" office:value="3.1436580169857851" table:formula="of:=SLOPE([Returns.$E$4:.$E$63];[Returns.$B$4:.$B$63])" table:style-name="ce49">
            <text:p>3.14</text:p>
          </table:table-cell>
          <table:table-cell office:value-type="float" office:value="0.47315717912308219" table:formula="of:=RSQ([Returns.$E$4:.$E$63];[Returns.$B$4:.$B$63])" table:style-name="ce49">
            <text:p>0.47</text:p>
          </table:table-cell>
          <table:table-cell office:value-type="percentage" office:value="0.20110162452442482" table:formula="of:=STDEV([Returns.$E$4:.$E$63])" table:style-name="ce50">
            <text:p>20.11%</text:p>
          </table:table-cell>
          <table:table-cell office:value-type="percentage" office:value="2.0141742433106256E-2" table:formula="of:=INTERCEPT([Returns.$E$4:.$E$63];[Returns.$B$4:.$B$63])" table:style-name="ce50">
            <text:p>2.01%</text:p>
          </table:table-cell>
          <table:table-cell office:value-type="string" table:style-name="ce48">
            <text:p>Casinos &amp; Gaming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8">
            <text:p>Churchill Downs</text:p>
          </table:table-cell>
          <table:table-cell office:value-type="float" office:value="1.3628825877194999" table:formula="of:=SLOPE([Returns.$H$4:.$H$63];[Returns.$B$4:.$B$63])" table:style-name="ce49">
            <text:p>1.36</text:p>
          </table:table-cell>
          <table:table-cell office:value-type="float" office:value="0.42534138764273577" table:formula="of:=RSQ([Returns.$H$4:.$H$63];[Returns.$B$4:.$B$63])" table:style-name="ce49">
            <text:p>0.43</text:p>
          </table:table-cell>
          <table:table-cell office:value-type="percentage" office:value="9.1954422635012523E-2" table:formula="of:=STDEV([Returns.$H$4:.$H$63])" table:style-name="ce50">
            <text:p>9.20%</text:p>
          </table:table-cell>
          <table:table-cell office:value-type="percentage" office:value="1.3161867878026116E-2" table:formula="of:=INTERCEPT([Returns.$H$4:.$H$63];[Returns.$B$4:.$B$63])" table:style-name="ce50">
            <text:p>1.32%</text:p>
          </table:table-cell>
          <table:table-cell office:value-type="string" table:style-name="ce48">
            <text:p>Casinos &amp; Gaming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8">
            <text:p>Boyd Gaming</text:p>
          </table:table-cell>
          <table:table-cell office:value-type="float" office:value="2.238502777343653" table:formula="of:=SLOPE([Returns.$I$4:.$I$63];[Returns.$B$4:.$B$63])" table:style-name="ce49">
            <text:p>2.24</text:p>
          </table:table-cell>
          <table:table-cell office:value-type="float" office:value="0.62859061576796904" table:formula="of:=RSQ([Returns.$I$4:.$I$63];[Returns.$B$4:.$B$63])" table:style-name="ce49">
            <text:p>0.63</text:p>
          </table:table-cell>
          <table:table-cell office:value-type="percentage" office:value="0.1242386408576398" table:formula="of:=STDEV([Returns.$I$4:.$I$63])" table:style-name="ce50">
            <text:p>12.42%</text:p>
          </table:table-cell>
          <table:table-cell office:value-type="percentage" office:value="-3.3897717031867447E-3" table:formula="of:=INTERCEPT([Returns.$I$4:.$I$63];[Returns.$B$4:.$B$63])" table:style-name="ce50">
            <text:p>-0.34%</text:p>
          </table:table-cell>
          <table:table-cell office:value-type="string" table:style-name="ce48">
            <text:p>Casinos &amp; Gaming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55">
            <text:p>MGM Resorts</text:p>
          </table:table-cell>
          <table:table-cell office:value-type="float" office:value="2.4257070716660705" table:formula="of:=SLOPE([Returns.$D$4:.$D$63];[Returns.$B$4:.$B$63])" table:style-name="ce49">
            <text:p>2.43</text:p>
          </table:table-cell>
          <table:table-cell office:value-type="float" office:value="0.63483026805094367" table:formula="of:=RSQ([Returns.$D$4:.$D$63];[Returns.$B$4:.$B$63])" table:style-name="ce49">
            <text:p>0.63</text:p>
          </table:table-cell>
          <table:table-cell office:value-type="percentage" office:value="0.13396536828396211" table:formula="of:=STDEV([Returns.$D$4:.$D$63])" table:style-name="ce50">
            <text:p>13.40%</text:p>
          </table:table-cell>
          <table:table-cell office:value-type="percentage" office:value="-1.1211747245492249E-2" table:formula="of:=INTERCEPT([Returns.$D$4:.$D$63];[Returns.$B$4:.$B$63])" table:style-name="ce50">
            <text:p>-1.12%</text:p>
          </table:table-cell>
          <table:table-cell office:value-type="string" table:style-name="ce48">
            <text:p>Casinos &amp; Gaming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55">
            <text:p>Wynn Resorts</text:p>
          </table:table-cell>
          <table:table-cell office:value-type="float" office:value="2.3769287261312892" table:formula="of:=SLOPE([Returns.$G$4:.$G$63];[Returns.$B$4:.$B$63])" table:style-name="ce49">
            <text:p>2.38</text:p>
          </table:table-cell>
          <table:table-cell office:value-type="float" office:value="0.51626541003138193" table:formula="of:=RSQ([Returns.$G$4:.$G$63];[Returns.$B$4:.$B$63])" table:style-name="ce49">
            <text:p>0.52</text:p>
          </table:table-cell>
          <table:table-cell office:value-type="percentage" office:value="0.14556690421275717" table:formula="of:=STDEV([Returns.$G$4:.$G$63])" table:style-name="ce50">
            <text:p>14.56%</text:p>
          </table:table-cell>
          <table:table-cell office:value-type="percentage" office:value="-5.9764894816351742E-3" table:formula="of:=INTERCEPT([Returns.$G$4:.$G$63];[Returns.$B$4:.$B$63])" table:style-name="ce50">
            <text:p>-0.60%</text:p>
          </table:table-cell>
          <table:table-cell office:value-type="string" table:style-name="ce48">
            <text:p>Casinos &amp; Gaming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55">
            <text:p>Las Vegas Sands</text:p>
          </table:table-cell>
          <table:table-cell office:value-type="float" office:value="1.3474388692203747" table:formula="of:=SLOPE([Returns.$C$4:.$C$63];[Returns.$B$4:.$B$63])" table:style-name="ce68">
            <text:p>1.35</text:p>
          </table:table-cell>
          <table:table-cell office:value-type="float" office:value="0.44415886642634667" table:formula="of:=RSQ([Returns.$C$4:.$C$63];[Returns.$B$4:.$B$63])" table:style-name="ce49">
            <text:p>0.44</text:p>
          </table:table-cell>
          <table:table-cell office:value-type="percentage" office:value="8.8965762196829376E-2" table:formula="of:=STDEV([Returns.$C$4:.$C$63])" table:style-name="ce50">
            <text:p>8.90%</text:p>
          </table:table-cell>
          <table:table-cell office:value-type="percentage" office:value="-2.2482180931665523E-3" table:formula="of:=INTERCEPT([Returns.$C$4:.$C$63];[Returns.$B$4:.$B$63])" table:style-name="ce50">
            <text:p>-0.22%</text:p>
          </table:table-cell>
          <table:table-cell office:value-type="string" table:style-name="ce48">
            <text:p>Casinos &amp; Gaming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55">
            <text:p>Monarch</text:p>
          </table:table-cell>
          <table:table-cell office:value-type="float" office:value="1.6613447015628491" table:formula="of:=SLOPE([Returns.$J$4:.$J$63];[Returns.$B$4:.$B$63])" table:style-name="ce68">
            <text:p>1.66</text:p>
          </table:table-cell>
          <table:table-cell office:value-type="float" office:value="0.49586114180429586" table:formula="of:=RSQ([Returns.$J$4:.$J$63];[Returns.$B$4:.$B$63])" table:style-name="ce49">
            <text:p>0.50</text:p>
          </table:table-cell>
          <table:table-cell office:value-type="percentage" office:value="0.10381562272272996" table:formula="of:=STDEV([Returns.$J$4:.$J$63])" table:style-name="ce50">
            <text:p>10.38%</text:p>
          </table:table-cell>
          <table:table-cell office:value-type="percentage" office:value="3.7961425879496254E-3" table:formula="of:=INTERCEPT([Returns.$J$4:.$J$63];[Returns.$B$4:.$B$63])" table:style-name="ce50">
            <text:p>0.38%</text:p>
          </table:table-cell>
          <table:table-cell office:value-type="string" table:style-name="ce48">
            <text:p>Casinos &amp; Gaming</text:p>
          </table:table-cell>
          <table:table-cell table:number-columns-repeated="16378" table:style-name="ce1"/>
        </table:table-row>
        <table:table-row table:number-rows-repeated="1048564" table:style-name="ro3">
          <table:table-cell table:number-columns-repeated="16384"/>
        </table:table-row>
      </table:table>
      <table:table table:name="Leverage" table:style-name="ta3">
        <table:table-column table:style-name="co11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27" table:default-cell-style-name="ce1"/>
        <table:table-column table:style-name="co34" table:default-cell-style-name="ce1"/>
        <table:table-column table:style-name="co4" table:number-columns-repeated="16376" table:default-cell-style-name="ce1"/>
        <table:table-row table:style-name="ro4">
          <table:table-cell office:value-type="string" table:style-name="ce9">
            <text:p>Exhibit 8</text:p>
          </table:table-cell>
          <table:table-cell office:value-type="string" table:number-columns-spanned="7" table:number-rows-spanned="1" table:style-name="ce22">
            <text:p>Comparable Firms, Leverage</text:p>
          </table:table-cell>
          <table:covered-table-cell table:number-columns-repeated="6"/>
          <table:table-cell table:number-columns-repeated="16376" table:style-name="ce1"/>
        </table:table-row>
        <table:table-row table:style-name="ro3">
          <table:table-cell table:style-name="ce10"/>
          <table:table-cell office:value-type="string" table:number-columns-spanned="3" table:number-rows-spanned="1" table:style-name="ce23">
            <text:p>2016-2020 Average Quarter-End</text:p>
          </table:table-cell>
          <table:covered-table-cell table:number-columns-repeated="2"/>
          <table:table-cell office:value-type="string" table:number-columns-spanned="4" table:number-rows-spanned="1" table:style-name="ce24">
            <text:p>Year-End 2020<text:s/></text:p>
          </table:table-cell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spanned="4" table:number-rows-spanned="1" table:style-name="ce25"/>
          <table:covered-table-cell table:number-columns-repeated="3"/>
        </table:table-row>
        <table:table-row table:style-name="ro2">
          <table:table-cell table:style-name="ce11"/>
          <table:table-cell table:number-columns-repeated="2" table:style-name="ce2"/>
          <table:table-cell table:style-name="ce12"/>
          <table:table-cell table:number-columns-repeated="3" table:style-name="ce2"/>
          <table:table-cell table:style-name="ce12"/>
          <table:table-cell table:number-columns-repeated="16376" table:style-name="ce1"/>
        </table:table-row>
        <table:table-row table:style-name="ro2">
          <table:table-cell office:value-type="string" table:style-name="ce13">
            <text:p>Firm</text:p>
          </table:table-cell>
          <table:table-cell office:value-type="string" table:style-name="ce13">
            <text:p>Book Leverage (%)</text:p>
          </table:table-cell>
          <table:table-cell office:value-type="string" table:style-name="ce13">
            <text:p>Market Leverage (%)</text:p>
          </table:table-cell>
          <table:table-cell office:value-type="string" table:style-name="ce13">
            <text:p>Credit Rating</text:p>
          </table:table-cell>
          <table:table-cell office:value-type="string" table:style-name="ce13">
            <text:p>Cash ($M)</text:p>
          </table:table-cell>
          <table:table-cell office:value-type="string" table:style-name="ce13">
            <text:p>Debt ($M)</text:p>
          </table:table-cell>
          <table:table-cell office:value-type="string" table:style-name="ce13">
            <text:p>Book Equity</text:p>
          </table:table-cell>
          <table:table-cell office:value-type="string" table:style-name="ce13">
            <text:p>Market Equity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14">
            <text:p>Penn Entertainment</text:p>
          </table:table-cell>
          <table:table-cell office:value-type="percentage" office:value="0.97" table:style-name="ce15">
            <text:p>97.00%</text:p>
          </table:table-cell>
          <table:table-cell office:value-type="percentage" office:value="0.71" table:style-name="ce15">
            <text:p>71.00%</text:p>
          </table:table-cell>
          <table:table-cell office:value-type="string" table:style-name="ce16">
            <text:p>B</text:p>
          </table:table-cell>
          <table:table-cell office:value-type="float" office:value="1854" table:style-name="ce17">
            <text:p>1,854</text:p>
          </table:table-cell>
          <table:table-cell office:value-type="float" office:value="10906" table:style-name="ce17">
            <text:p>10,906</text:p>
          </table:table-cell>
          <table:table-cell office:value-type="float" office:value="2633" table:style-name="ce17">
            <text:p>2,633</text:p>
          </table:table-cell>
          <table:table-cell office:value-type="float" office:value="13448" table:style-name="ce17">
            <text:p>13,448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18">
            <text:p>Caesars</text:p>
          </table:table-cell>
          <table:table-cell office:value-type="percentage" office:value="0.74" table:style-name="ce19">
            <text:p>74.00%</text:p>
          </table:table-cell>
          <table:table-cell office:value-type="percentage" office:value="0.53" table:style-name="ce19">
            <text:p>53.00%</text:p>
          </table:table-cell>
          <table:table-cell office:value-type="string" table:style-name="ce20">
            <text:p>B</text:p>
          </table:table-cell>
          <table:table-cell office:value-type="float" office:value="1758" table:style-name="ce21">
            <text:p>1,758</text:p>
          </table:table-cell>
          <table:table-cell office:value-type="float" office:value="26813" table:style-name="ce21">
            <text:p>26,813</text:p>
          </table:table-cell>
          <table:table-cell office:value-type="float" office:value="5016" table:style-name="ce21">
            <text:p>5,016</text:p>
          </table:table-cell>
          <table:table-cell office:value-type="float" office:value="15452" table:style-name="ce21">
            <text:p>15,452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18">
            <text:p>Churchill Downs</text:p>
          </table:table-cell>
          <table:table-cell office:value-type="percentage" office:value="0.66" table:style-name="ce19">
            <text:p>66.00%</text:p>
          </table:table-cell>
          <table:table-cell office:value-type="percentage" office:value="0.22" table:style-name="ce19">
            <text:p>22.00%</text:p>
          </table:table-cell>
          <table:table-cell office:value-type="string" table:style-name="ce20">
            <text:p>BB</text:p>
          </table:table-cell>
          <table:table-cell office:value-type="float" office:value="67" table:style-name="ce21">
            <text:p>67</text:p>
          </table:table-cell>
          <table:table-cell office:value-type="float" office:value="1643" table:style-name="ce21">
            <text:p>1,643</text:p>
          </table:table-cell>
          <table:table-cell office:value-type="float" office:value="367" table:style-name="ce21">
            <text:p>367</text:p>
          </table:table-cell>
          <table:table-cell office:value-type="float" office:value="7694" table:style-name="ce21">
            <text:p>7,694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18">
            <text:p>Boyd Gaming</text:p>
          </table:table-cell>
          <table:table-cell office:value-type="percentage" office:value="0.77" table:style-name="ce56">
            <text:p>77.00%</text:p>
          </table:table-cell>
          <table:table-cell office:value-type="percentage" office:value="0.55000000000000004" table:style-name="ce56">
            <text:p>55.00%</text:p>
          </table:table-cell>
          <table:table-cell office:value-type="string" table:style-name="ce57">
            <text:p>B</text:p>
          </table:table-cell>
          <table:table-cell office:value-type="float" office:value="519" table:style-name="ce58">
            <text:p>519</text:p>
          </table:table-cell>
          <table:table-cell office:value-type="float" office:value="4716" table:style-name="ce58">
            <text:p>4,716</text:p>
          </table:table-cell>
          <table:table-cell office:value-type="float" office:value="1124" table:style-name="ce58">
            <text:p>1,124</text:p>
          </table:table-cell>
          <table:table-cell office:value-type="float" office:value="4800" table:style-name="ce58">
            <text:p>4,80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55">
            <text:p>MGM Resorts</text:p>
          </table:table-cell>
          <table:table-cell office:value-type="percentage" office:value="0.66" table:style-name="ce59">
            <text:p>66.00%</text:p>
          </table:table-cell>
          <table:table-cell office:value-type="percentage" office:value="0.47" table:style-name="ce59">
            <text:p>47.00%</text:p>
          </table:table-cell>
          <table:table-cell office:value-type="string" table:style-name="ce60">
            <text:p>BB</text:p>
          </table:table-cell>
          <table:table-cell office:value-type="float" office:value="5102" table:style-name="ce61">
            <text:p>5,102</text:p>
          </table:table-cell>
          <table:table-cell office:value-type="float" office:value="20901" table:style-name="ce61">
            <text:p>20,901</text:p>
          </table:table-cell>
          <table:table-cell office:value-type="float" office:value="6505" table:style-name="ce61">
            <text:p>6,505</text:p>
          </table:table-cell>
          <table:table-cell office:value-type="float" office:value="15576" table:style-name="ce61">
            <text:p>15,576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55">
            <text:p>Wynn Resorts</text:p>
          </table:table-cell>
          <table:table-cell office:value-type="percentage" office:value="0.91" table:style-name="ce59">
            <text:p>91.00%</text:p>
          </table:table-cell>
          <table:table-cell office:value-type="percentage" office:value="0.4" table:style-name="ce59">
            <text:p>40.00%</text:p>
          </table:table-cell>
          <table:table-cell office:value-type="string" table:style-name="ce60">
            <text:p>BB</text:p>
          </table:table-cell>
          <table:table-cell office:value-type="float" office:value="3482" table:style-name="ce61">
            <text:p>3,482</text:p>
          </table:table-cell>
          <table:table-cell office:value-type="float" office:value="12647" table:style-name="ce61">
            <text:p>12,647</text:p>
          </table:table-cell>
          <table:table-cell office:value-type="float" office:value="-352" table:style-name="ce61">
            <text:p>(352)</text:p>
          </table:table-cell>
          <table:table-cell office:value-type="float" office:value="12173" table:style-name="ce61">
            <text:p>12,173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55">
            <text:p>Las Vegas Sands</text:p>
          </table:table-cell>
          <table:table-cell office:value-type="percentage" office:value="0.59" table:style-name="ce59">
            <text:p>59.00%</text:p>
          </table:table-cell>
          <table:table-cell office:value-type="percentage" office:value="0.16" table:style-name="ce59">
            <text:p>16.00%</text:p>
          </table:table-cell>
          <table:table-cell office:value-type="string" table:style-name="ce60">
            <text:p>BBB</text:p>
          </table:table-cell>
          <table:table-cell office:value-type="float" office:value="2121" table:style-name="ce61">
            <text:p>2,121</text:p>
          </table:table-cell>
          <table:table-cell office:value-type="float" office:value="14225" table:style-name="ce61">
            <text:p>14,225</text:p>
          </table:table-cell>
          <table:table-cell office:value-type="float" office:value="2973" table:style-name="ce61">
            <text:p>2,973</text:p>
          </table:table-cell>
          <table:table-cell office:value-type="float" office:value="45525" table:style-name="ce61">
            <text:p>45,525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55">
            <text:p>Monarch</text:p>
          </table:table-cell>
          <table:table-cell office:value-type="percentage" office:value="0.13" table:style-name="ce59">
            <text:p>13.00%</text:p>
          </table:table-cell>
          <table:table-cell office:value-type="percentage" office:value="7.0000000000000007E-2" table:style-name="ce59">
            <text:p>7.00%</text:p>
          </table:table-cell>
          <table:table-cell office:value-type="string" table:style-name="ce60">
            <text:p>A</text:p>
          </table:table-cell>
          <table:table-cell office:value-type="float" office:value="28" table:style-name="ce61">
            <text:p>28</text:p>
          </table:table-cell>
          <table:table-cell office:value-type="float" office:value="181" table:style-name="ce61">
            <text:p>181</text:p>
          </table:table-cell>
          <table:table-cell office:value-type="float" office:value="368" table:style-name="ce61">
            <text:p>368</text:p>
          </table:table-cell>
          <table:table-cell office:value-type="float" office:value="1128" table:style-name="ce61">
            <text:p>1,128</text:p>
          </table:table-cell>
          <table:table-cell table:number-columns-repeated="16376" table:style-name="ce1"/>
        </table:table-row>
        <table:table-row table:number-rows-repeated="1048564" table:style-name="ro3">
          <table:table-cell table:number-columns-repeated="16384"/>
        </table:table-row>
      </table:table>
      <table:table table:name="Asset_Betas" table:style-name="ta3">
        <table:table-column table:style-name="co11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28" table:default-cell-style-name="ce1"/>
        <table:table-column table:style-name="co4" table:number-columns-repeated="16377" table:default-cell-style-name="ce1"/>
        <table:table-row table:style-name="ro4">
          <table:table-cell office:value-type="string" table:number-columns-spanned="7" table:number-rows-spanned="1" table:style-name="ce67">
            <text:p>Asset Betas: Unlevered by βa = (1 − Leverage)·βe + Leverage·βd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table:number-columns-repeated="7" table:style-name="ce26"/>
          <table:table-cell table:number-columns-repeated="16377" table:style-name="ce1"/>
        </table:table-row>
        <table:table-row table:style-name="ro3">
          <table:table-cell office:value-type="string" table:style-name="ce27">
            <text:p>Firm</text:p>
          </table:table-cell>
          <table:table-cell office:value-type="string" table:style-name="ce27">
            <text:p>βe</text:p>
          </table:table-cell>
          <table:table-cell office:value-type="string" table:style-name="ce27">
            <text:p>Market Leverage</text:p>
          </table:table-cell>
          <table:table-cell office:value-type="string" table:style-name="ce27">
            <text:p>Rating</text:p>
          </table:table-cell>
          <table:table-cell office:value-type="string" table:style-name="ce27">
            <text:p>βd</text:p>
          </table:table-cell>
          <table:table-cell office:value-type="string" table:style-name="ce27">
            <text:p>βa</text:p>
          </table:table-cell>
          <table:table-cell office:value-type="string" table:style-name="ce27">
            <text:p>Group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4">
            <text:p>Penn Entertainment</text:p>
          </table:table-cell>
          <table:table-cell office:value-type="float" office:value="2.7915455117456096" table:formula="of:=[Equity_Betas.B5]" table:style-name="ce31">
            <text:p>2.79</text:p>
          </table:table-cell>
          <table:table-cell office:value-type="percentage" office:value="0.71" table:formula="of:=[Leverage.C5]" table:style-name="ce32">
            <text:p>71.00%</text:p>
          </table:table-cell>
          <table:table-cell office:value-type="string" office:string-value="B" table:formula="of:=[Leverage.D5]" table:style-name="ce33">
            <text:p>B</text:p>
          </table:table-cell>
          <table:table-cell office:value-type="float" office:value="0.41" table:formula="of:=VLOOKUP([.D4]; [Assumptions.$A$14:.$B$20]; 2; FALSE())" table:style-name="ce28">
            <text:p>0.41</text:p>
          </table:table-cell>
          <table:table-cell office:value-type="float" office:value="1.1006481984062269" table:formula="of:=(1-[.C4])*[.B4] + [.C4]*[.E4]" table:style-name="ce29">
            <text:p>1.10</text:p>
          </table:table-cell>
          <table:table-cell office:value-type="string" table:style-name="ce14">
            <text:p>Casinos &amp; Gaming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8">
            <text:p>Caesars</text:p>
          </table:table-cell>
          <table:table-cell office:value-type="float" office:value="3.1436580169857851" table:formula="of:=[Equity_Betas.B6]" table:style-name="ce34">
            <text:p>3.14</text:p>
          </table:table-cell>
          <table:table-cell office:value-type="percentage" office:value="0.53" table:formula="of:=[Leverage.C6]" table:style-name="ce35">
            <text:p>53.00%</text:p>
          </table:table-cell>
          <table:table-cell office:value-type="string" office:string-value="B" table:formula="of:=[Leverage.D6]" table:style-name="ce36">
            <text:p>B</text:p>
          </table:table-cell>
          <table:table-cell office:value-type="float" office:value="0.41" table:formula="of:=VLOOKUP([.D5]; [Assumptions.$A$14:.$B$20]; 2; FALSE())" table:style-name="ce28">
            <text:p>0.41</text:p>
          </table:table-cell>
          <table:table-cell office:value-type="float" office:value="1.6948192679833189" table:formula="of:=(1-[.C5])*[.B5] + [.C5]*[.E5]" table:style-name="ce30">
            <text:p>1.69</text:p>
          </table:table-cell>
          <table:table-cell office:value-type="string" table:style-name="ce18">
            <text:p>Casinos &amp; Gaming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8">
            <text:p>Churchill Downs</text:p>
          </table:table-cell>
          <table:table-cell office:value-type="float" office:value="1.3628825877194999" table:formula="of:=[Equity_Betas.B7]" table:style-name="ce34">
            <text:p>1.36</text:p>
          </table:table-cell>
          <table:table-cell office:value-type="percentage" office:value="0.22" table:formula="of:=[Leverage.C7]" table:style-name="ce35">
            <text:p>22.00%</text:p>
          </table:table-cell>
          <table:table-cell office:value-type="string" office:string-value="BB" table:formula="of:=[Leverage.D7]" table:style-name="ce36">
            <text:p>BB</text:p>
          </table:table-cell>
          <table:table-cell office:value-type="float" office:value="0.35" table:formula="of:=VLOOKUP([.D6]; [Assumptions.$A$14:.$B$20]; 2; FALSE())" table:style-name="ce28">
            <text:p>0.35</text:p>
          </table:table-cell>
          <table:table-cell office:value-type="float" office:value="1.1400484184212099" table:formula="of:=(1-[.C6])*[.B6] + [.C6]*[.E6]" table:style-name="ce30">
            <text:p>1.14</text:p>
          </table:table-cell>
          <table:table-cell office:value-type="string" table:style-name="ce18">
            <text:p>Casinos &amp; Gaming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8">
            <text:p>Boyd Gaming</text:p>
          </table:table-cell>
          <table:table-cell office:value-type="float" office:value="2.238502777343653" table:formula="of:=[Equity_Betas.B8]" table:style-name="ce34">
            <text:p>2.24</text:p>
          </table:table-cell>
          <table:table-cell office:value-type="percentage" office:value="0.55000000000000004" table:formula="of:=[Leverage.C8]" table:style-name="ce35">
            <text:p>55.00%</text:p>
          </table:table-cell>
          <table:table-cell office:value-type="string" office:string-value="B" table:formula="of:=[Leverage.D8]" table:style-name="ce36">
            <text:p>B</text:p>
          </table:table-cell>
          <table:table-cell office:value-type="float" office:value="0.41" table:formula="of:=VLOOKUP([.D7]; [Assumptions.$A$14:.$B$20]; 2; FALSE())" table:style-name="ce28">
            <text:p>0.41</text:p>
          </table:table-cell>
          <table:table-cell office:value-type="float" office:value="1.2328262498046438" table:formula="of:=(1-[.C7])*[.B7] + [.C7]*[.E7]" table:style-name="ce30">
            <text:p>1.23</text:p>
          </table:table-cell>
          <table:table-cell office:value-type="string" table:style-name="ce18">
            <text:p>Casinos &amp; Gaming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55">
            <text:p>MGM Resorts</text:p>
          </table:table-cell>
          <table:table-cell office:value-type="float" office:value="2.4257070716660705" table:formula="of:=[Equity_Betas.B9]" table:style-name="ce34">
            <text:p>2.43</text:p>
          </table:table-cell>
          <table:table-cell office:value-type="percentage" office:value="0.47" table:formula="of:=[Leverage.C9]" table:style-name="ce35">
            <text:p>47.00%</text:p>
          </table:table-cell>
          <table:table-cell office:value-type="string" office:string-value="BB" table:formula="of:=[Leverage.D9]" table:style-name="ce36">
            <text:p>BB</text:p>
          </table:table-cell>
          <table:table-cell office:value-type="float" office:value="0.35" table:formula="of:=VLOOKUP([.D8]; [Assumptions.$A$14:.$B$20]; 2; FALSE())" table:style-name="ce28">
            <text:p>0.35</text:p>
          </table:table-cell>
          <table:table-cell office:value-type="float" office:value="1.4501247479830175" table:formula="of:=(1-[.C8])*[.B8] + [.C8]*[.E8]" table:style-name="ce30">
            <text:p>1.45</text:p>
          </table:table-cell>
          <table:table-cell office:value-type="string" table:style-name="ce18">
            <text:p>Casinos &amp; Gaming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55">
            <text:p>Wynn Resorts</text:p>
          </table:table-cell>
          <table:table-cell office:value-type="float" office:value="2.3769287261312892" table:formula="of:=[Equity_Betas.B10]" table:style-name="ce34">
            <text:p>2.38</text:p>
          </table:table-cell>
          <table:table-cell office:value-type="percentage" office:value="0.4" table:formula="of:=[Leverage.C10]" table:style-name="ce35">
            <text:p>40.00%</text:p>
          </table:table-cell>
          <table:table-cell office:value-type="string" office:string-value="BB" table:formula="of:=[Leverage.D10]" table:style-name="ce36">
            <text:p>BB</text:p>
          </table:table-cell>
          <table:table-cell office:value-type="float" office:value="0.35" table:formula="of:=VLOOKUP([.D9]; [Assumptions.$A$14:.$B$20]; 2; FALSE())" table:style-name="ce28">
            <text:p>0.35</text:p>
          </table:table-cell>
          <table:table-cell office:value-type="float" office:value="1.5661572356787734" table:formula="of:=(1-[.C9])*[.B9] + [.C9]*[.E9]" table:style-name="ce30">
            <text:p>1.57</text:p>
          </table:table-cell>
          <table:table-cell office:value-type="string" table:style-name="ce18">
            <text:p>Casinos &amp; Gaming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55">
            <text:p>Las Vegas Sands</text:p>
          </table:table-cell>
          <table:table-cell office:value-type="float" office:value="1.3474388692203747" table:formula="of:=[Equity_Betas.B11]" table:style-name="ce34">
            <text:p>1.35</text:p>
          </table:table-cell>
          <table:table-cell office:value-type="percentage" office:value="0.16" table:formula="of:=[Leverage.C11]" table:style-name="ce35">
            <text:p>16.00%</text:p>
          </table:table-cell>
          <table:table-cell office:value-type="string" office:string-value="BBB" table:formula="of:=[Leverage.D11]" table:style-name="ce36">
            <text:p>BBB</text:p>
          </table:table-cell>
          <table:table-cell office:value-type="float" office:value="0.27" table:formula="of:=VLOOKUP([.D10]; [Assumptions.$A$14:.$B$20]; 2; FALSE())" table:style-name="ce28">
            <text:p>0.27</text:p>
          </table:table-cell>
          <table:table-cell office:value-type="float" office:value="1.1750486501451145" table:formula="of:=(1-[.C10])*[.B10] + [.C10]*[.E10]" table:style-name="ce30">
            <text:p>1.18</text:p>
          </table:table-cell>
          <table:table-cell office:value-type="string" table:style-name="ce18">
            <text:p>Casinos &amp; Gaming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55">
            <text:p>Monarch</text:p>
          </table:table-cell>
          <table:table-cell office:value-type="float" office:value="1.6613447015628491" table:formula="of:=[Equity_Betas.B12]" table:style-name="ce69">
            <text:p>1.66</text:p>
          </table:table-cell>
          <table:table-cell office:value-type="percentage" office:value="7.0000000000000007E-2" table:formula="of:=[Leverage.C12]" table:style-name="ce35">
            <text:p>7.00%</text:p>
          </table:table-cell>
          <table:table-cell office:value-type="string" office:string-value="A" table:formula="of:=[Leverage.D12]" table:style-name="ce36">
            <text:p>A</text:p>
          </table:table-cell>
          <table:table-cell office:value-type="float" office:value="0.13" table:formula="of:=VLOOKUP([.D11]; [Assumptions.$A$14:.$B$20]; 2; FALSE())" table:style-name="ce28">
            <text:p>0.13</text:p>
          </table:table-cell>
          <table:table-cell office:value-type="float" office:value="1.5541505724534497" table:formula="of:=(1-[.C11])*[.B11] + [.C11]*[.E11]" table:style-name="ce30">
            <text:p>1.55</text:p>
          </table:table-cell>
          <table:table-cell office:value-type="string" table:style-name="ce18">
            <text:p>Casinos &amp; Gaming</text:p>
          </table:table-cell>
          <table:table-cell table:number-columns-repeated="16377" table:style-name="ce1"/>
        </table:table-row>
        <table:table-row table:style-name="ro2">
          <table:table-cell table:number-columns-repeated="7" table:style-name="ce37"/>
          <table:table-cell table:number-columns-repeated="16377" table:style-name="ce1"/>
        </table:table-row>
        <table:table-row table:style-name="ro4">
          <table:table-cell office:value-type="string" table:number-columns-spanned="7" table:number-rows-spanned="1" table:style-name="ce85">
            <text:p>Primary Peer Set (Top 6 US Casino Firms)</text:p>
          </table:table-cell>
          <table:covered-table-cell table:number-columns-repeated="6"/>
          <table:table-cell table:number-columns-repeated="16377" table:style-name="ce1"/>
        </table:table-row>
        <table:table-row table:style-name="ro5">
          <table:table-cell office:value-type="string" table:style-name="ce65">
            <text:p>Firms included:</text:p>
          </table:table-cell>
          <table:table-cell office:value-type="string" table:number-columns-spanned="6" table:number-rows-spanned="1" table:style-name="ce86">
            <text:p>Penn Entertainment, Ceasars, Boyd Gaming, MGM Resorts, Wynn Resorts, Churchill Downs</text:p>
          </table:table-cell>
          <table:covered-table-cell table:number-columns-repeated="5"/>
          <table:table-cell table:number-columns-repeated="2" table:style-name="ce62"/>
          <table:table-cell table:number-columns-repeated="16375"/>
        </table:table-row>
        <table:table-row table:style-name="ro6">
          <table:table-cell office:value-type="string" table:style-name="ce63">
            <text:p>Average βa for the firms included</text:p>
          </table:table-cell>
          <table:table-cell office:value-type="float" office:value="1.3641040197128651" table:formula="of:=AVERAGE([.F4:.F9])" table:number-columns-spanned="6" table:number-rows-spanned="1" table:style-name="ce64">
            <text:p>1.36</text:p>
          </table:table-cell>
          <table:covered-table-cell table:number-columns-repeated="5"/>
          <table:table-cell table:number-columns-repeated="16377" table:style-name="ce1"/>
        </table:table-row>
        <table:table-row table:style-name="ro2">
          <table:table-cell table:number-columns-repeated="7" table:style-name="ce70"/>
          <table:table-cell table:number-columns-repeated="16377" table:style-name="ce1"/>
        </table:table-row>
        <table:table-row table:style-name="ro4">
          <table:table-cell office:value-type="string" table:number-columns-spanned="7" table:number-rows-spanned="1" table:style-name="ce83">
            <text:p>Other Peer Sets</text:p>
          </table:table-cell>
          <table:covered-table-cell table:number-columns-repeated="6"/>
          <table:table-cell table:number-columns-repeated="16377"/>
        </table:table-row>
        <table:table-row table:style-name="ro7">
          <table:table-cell office:value-type="string" table:style-name="ce77">
            <text:p>Competition to DraftKings (Wynn Resorts, Ceasers, Penn Entertainment, MGM Resorts)</text:p>
          </table:table-cell>
          <table:table-cell office:value-type="float" office:value="1.4529373625128343" table:formula="of:=AVERAGE([.F4];[.F5];[.F8];[.F9])" table:number-columns-spanned="6" table:number-rows-spanned="1" table:style-name="ce84">
            <text:p>1.45</text:p>
          </table:table-cell>
          <table:covered-table-cell table:number-columns-repeated="5"/>
          <table:table-cell table:number-columns-repeated="16377"/>
        </table:table-row>
        <table:table-row table:style-name="ro8">
          <table:table-cell office:value-type="string" table:style-name="ce78">
            <text:p>Whole industry (all casinos)</text:p>
          </table:table-cell>
          <table:table-cell office:value-type="float" office:value="1.3642279176094694" table:formula="of:=AVERAGE([.F4:.F11])" table:number-columns-spanned="6" table:number-rows-spanned="1" table:style-name="ce64">
            <text:p>1.36</text:p>
          </table:table-cell>
          <table:covered-table-cell table:number-columns-repeated="5"/>
          <table:table-cell table:number-columns-repeated="16377"/>
        </table:table-row>
        <table:table-row table:number-rows-repeated="1048557" table:style-name="ro3">
          <table:table-cell table:number-columns-repeated="16384"/>
        </table:table-row>
      </table:table>
      <table:table table:name="WACC_Sensitivity" table:style-name="ta1">
        <table:table-column table:style-name="co40" table:default-cell-style-name="ce1"/>
        <table:table-column table:style-name="co41" table:default-cell-style-name="ce1"/>
        <table:table-column table:style-name="co28" table:number-columns-repeated="4" table:default-cell-style-name="ce1"/>
        <table:table-column table:style-name="co4" table:number-columns-repeated="16378" table:default-cell-style-name="ce1"/>
        <table:table-row table:style-name="ro4">
          <table:table-cell office:value-type="string" table:number-columns-spanned="6" table:number-rows-spanned="1" table:style-name="ce67">
            <text:p>WACC Sensitivity: Peer Set × (rf, MRP)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79">
            <text:p>Method: WACC = rf + βa × MR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6" table:style-name="ce37"/>
          <table:table-cell table:number-columns-repeated="16378"/>
        </table:table-row>
        <table:table-row table:style-name="ro2">
          <table:table-cell office:value-type="string" table:style-name="ce42">
            <text:p>Peer Set</text:p>
          </table:table-cell>
          <table:table-cell office:value-type="string" table:style-name="ce42">
            <text:p>Asset Beta (βa​)</text:p>
          </table:table-cell>
          <table:table-cell office:value-type="string" table:style-name="ce42">
            <text:p>rf​=0.9%MRP=5.0%</text:p>
          </table:table-cell>
          <table:table-cell office:value-type="string" table:style-name="ce42">
            <text:p>rf​=2.0%MRP=5.0%</text:p>
          </table:table-cell>
          <table:table-cell office:value-type="string" table:style-name="ce42">
            <text:p>rf​=2.0%MRP=6.4%</text:p>
          </table:table-cell>
          <table:table-cell office:value-type="string" table:style-name="ce42">
            <text:p>rf​=0.9%MRP=6.4%</text:p>
          </table:table-cell>
          <table:table-cell table:number-columns-repeated="16378"/>
        </table:table-row>
        <table:table-row table:style-name="ro3">
          <table:table-cell office:value-type="string" table:style-name="ce40">
            <text:p>Primary: 6 US Casino Ops</text:p>
          </table:table-cell>
          <table:table-cell office:value-type="float" office:value="1.3641040197128651" table:formula="of:=[Asset_Betas.B15]" table:style-name="ce72">
            <text:p>1.36</text:p>
          </table:table-cell>
          <table:table-cell office:value-type="percentage" office:value="7.7205200985643249E-2" table:formula="of:=[Assumptions.$B$7] + [WACC_Sensitivity.B5]*[Assumptions.$C$26]" table:style-name="ce81">
            <text:p>7.72%</text:p>
          </table:table-cell>
          <table:table-cell office:value-type="percentage" office:value="8.8205200985643259E-2" table:formula="of:=[Assumptions.$C$7] + [WACC_Sensitivity.B5]*[Assumptions.$C$26]" table:style-name="ce80">
            <text:p>8.82%</text:p>
          </table:table-cell>
          <table:table-cell office:value-type="percentage" office:value="0.10730265726162337" table:formula="of:=[Assumptions.$C$7] + [WACC_Sensitivity.B5]*[Assumptions.$C$28]" table:style-name="ce41">
            <text:p>10.73%</text:p>
          </table:table-cell>
          <table:table-cell office:value-type="percentage" office:value="9.6302657261623362E-2" table:formula="of:=[Assumptions.$B$7] + [WACC_Sensitivity.B5]*[Assumptions.$C$28]" table:style-name="ce41">
            <text:p>9.63%</text:p>
          </table:table-cell>
          <table:table-cell table:number-columns-repeated="16378"/>
        </table:table-row>
        <table:table-row table:style-name="ro3">
          <table:table-cell office:value-type="string" table:style-name="ce38">
            <text:p>4 Direct OSB Competitors</text:p>
          </table:table-cell>
          <table:table-cell office:value-type="float" office:value="1.4529373625128343" table:formula="of:=[Asset_Betas.B18]" table:style-name="ce71">
            <text:p>1.45</text:p>
          </table:table-cell>
          <table:table-cell office:value-type="percentage" office:value="8.1646868125641717E-2" table:formula="of:=[Assumptions.$B$7] + [WACC_Sensitivity.B6]*[Assumptions.$C$26]" table:style-name="ce39">
            <text:p>8.16%</text:p>
          </table:table-cell>
          <table:table-cell office:value-type="percentage" office:value="9.2646868125641726E-2" table:formula="of:=[Assumptions.$C$7] + [WACC_Sensitivity.B6]*[Assumptions.$C$26]" table:style-name="ce39">
            <text:p>9.26%</text:p>
          </table:table-cell>
          <table:table-cell office:value-type="percentage" office:value="0.1129879912008214" table:formula="of:=[Assumptions.$C$7] + [WACC_Sensitivity.B6]*[Assumptions.$C$28]" table:style-name="ce39">
            <text:p>11.30%</text:p>
          </table:table-cell>
          <table:table-cell office:value-type="percentage" office:value="0.10198799120082139" table:formula="of:=[Assumptions.$B$7] + [WACC_Sensitivity.B6]*[Assumptions.$C$28]" table:style-name="ce39">
            <text:p>10.20%</text:p>
          </table:table-cell>
          <table:table-cell table:number-columns-repeated="16378"/>
        </table:table-row>
        <table:table-row table:style-name="ro3">
          <table:table-cell office:value-type="string" table:style-name="ce38">
            <text:p>All 8 Casinos &amp; Gaming</text:p>
          </table:table-cell>
          <table:table-cell office:value-type="float" office:value="1.3642279176094694" table:formula="of:=[Asset_Betas.B19]" table:style-name="ce71">
            <text:p>1.36</text:p>
          </table:table-cell>
          <table:table-cell office:value-type="percentage" office:value="7.721139588047346E-2" table:formula="of:=[Assumptions.$B$7] + [WACC_Sensitivity.B7]*[Assumptions.$C$26]" table:style-name="ce39">
            <text:p>7.72%</text:p>
          </table:table-cell>
          <table:table-cell office:value-type="percentage" office:value="8.821139588047347E-2" table:formula="of:=[Assumptions.$C$7] + [WACC_Sensitivity.B7]*[Assumptions.$C$26]" table:style-name="ce39">
            <text:p>8.82%</text:p>
          </table:table-cell>
          <table:table-cell office:value-type="percentage" office:value="0.10731058672700605" table:formula="of:=[Assumptions.$C$7] + [WACC_Sensitivity.B7]*[Assumptions.$C$28]" table:style-name="ce39">
            <text:p>10.73%</text:p>
          </table:table-cell>
          <table:table-cell office:value-type="percentage" office:value="9.6310586727006042E-2" table:formula="of:=[Assumptions.$B$7] + [WACC_Sensitivity.B7]*[Assumptions.$C$28]" table:style-name="ce39">
            <text:p>9.63%</text:p>
          </table:table-cell>
          <table:table-cell table:number-columns-repeated="16378"/>
        </table:table-row>
        <table:table-row table:number-rows-repeated="104856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date-style style:name="N20">
      <number:day/>
      <number:text>-</number:text>
      <number:month number:textual="true"/>
      <number:text>-</number:text>
      <number:year/>
    </number:date-style>
    <number:number-style style:name="N36P0">
      <number:number number:decimal-places="0" number:min-decimal-places="0" number:min-integer-digits="1" number:grouping="true"/>
    </number:number-style>
    <number:number-style style:name="N36P1">
      <number:text>(</number:text>
      <number:number number:decimal-places="0" number:min-decimal-places="0" number:min-integer-digits="1" number:grouping="true">
        <number:embedded-text number:position="0">)</number:embedded-text>
      </number:number>
    </number:number-style>
    <number:text-style style:name="N36">
      <number:text>-</number:text>
      <style:map style:condition="value()&gt;0" style:apply-style-name="N36P0"/>
      <style:map style:condition="value()&lt;0" style:apply-style-name="N36P1"/>
    </number:text-style>
    <number:date-style style:name="N37">
      <number:year number:style="long"/>
      <number:text>-</number:text>
      <number:month number:style="long"/>
    </number:date-style>
    <number:number-style style:name="N47P0">
      <number:number number:decimal-places="0" number:min-decimal-places="0" number:min-integer-digits="1" number:grouping="true"/>
    </number:number-style>
    <number:number-style style:name="N47P1">
      <number:text>(</number:text>
      <number:number number:decimal-places="0" number:min-decimal-places="0" number:min-integer-digits="1" number:grouping="true">
        <number:embedded-text number:position="0">)</number:embedded-text>
      </number:number>
    </number:number-style>
    <number:text-style style:name="N47">
      <number:text>-</number:text>
      <style:map style:condition="value()&gt;0" style:apply-style-name="N47P0"/>
      <style:map style:condition="value()&lt;0" style:apply-style-name="N47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25in" fo:margin-right="0.25in" style:print-orientation="landscape" style:print-page-order="ttb" style:first-page-number="continue" style:scale-to-X="1" style:scale-to-Y="1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929</meta:generator>
    <meta:initial-creator>PAVEL ANDREEV</meta:initial-creator>
    <dc:creator>PAVEL ANDREEV</dc:creator>
    <meta:creation-date>2026-04-26T15:36:55Z</meta:creation-date>
    <dc:date>2026-04-26T21:30:04Z</dc:date>
    <meta:print-date>2026-04-26T21:29:59Z</meta:print-date>
  </office:meta>
</office:document-meta>
</file>